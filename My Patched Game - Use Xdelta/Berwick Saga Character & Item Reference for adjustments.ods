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office:value-type="float" office:value="11000" calcext:value-type="float">
            <text:p>1100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77934936350778" calcext:value-type="float">
            <text:p>7.77934936350778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" calcext:value-type="float">
            <text:p>1584.7619047619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3" calcext:value-type="float">
            <text:p>533.3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668.57142857143" calcext:value-type="float">
            <text:p>1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7:30:07.79594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2H6M51S</meta:editing-duration>
    <meta:editing-cycles>171</meta:editing-cycles>
    <meta:generator>LibreOffice/26.2.4.2$Windows_X86_64 LibreOffice_project/0229ac93fcf0d7cbc6376066c6f35021cef002dc</meta:generator>
    <dc:date>2026-07-20T18:34:30.872567200</dc:date>
    <meta:document-statistic meta:table-count="2" meta:cell-count="4251" meta:object-count="0"/>
  </office:meta>
</office:document-meta>
</file>