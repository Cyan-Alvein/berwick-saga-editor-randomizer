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00" calcext:value-type="float">
            <text:p>800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909.09090909091" calcext:value-type="float">
            <text:p>2909.09090909091</text:p>
          </table:table-cell>
          <table:table-cell table:number-columns-repeated="50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100" calcext:value-type="float">
            <text:p>10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.02" calcext:value-type="float">
            <text:p>2.0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table:number-columns-repeated="8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table:number-columns-repeated="9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table:number-columns-repeated="8"/>
          <table:table-cell table:style-name="Default"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table:number-columns-repeated="8"/>
          <table:table-cell table:style-name="Default"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337.25490196078" calcext:value-type="float">
            <text:p>6337.2549019607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table:number-columns-repeated="8"/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table:number-columns-repeated="8"/>
          <table:table-cell table:style-name="Default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table:number-columns-repeated="8"/>
          <table:table-cell table:style-name="Default"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84313725490196" calcext:value-type="float">
            <text:p>7.84313725490196</text:p>
          </table:table-cell>
          <table:table-cell table:number-columns-repeated="20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18"/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3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40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50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4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3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44"/>
          <table:table-cell table:formula="of:=33-18" office:value-type="float" office:value="15" calcext:value-type="float">
            <text:p>15</text:p>
          </table:table-cell>
          <table:table-cell table:number-columns-repeated="21"/>
          <table:table-cell table:style-name="ce1" table:number-columns-repeated="16318"/>
        </table:table-row>
        <table:table-row table:style-name="ro1" table:number-rows-repeated="3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47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6"/>
          <table:table-cell table:style-name="Default"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1" table:number-columns-repeated="16318"/>
        </table:table-row>
        <table:table-row table:style-name="ro1" table:number-rows-repeated="1048486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42:Sheet2.K163">
        <office:forms form:automatic-focus="false" form:apply-design-mode="false"/>
        <table:table-column table:style-name="co1" table:number-columns-repeated="10" table:default-cell-style-name="ce12"/>
        <table:table-column table:style-name="co1" table:default-cell-style-name="ce16"/>
        <table:table-column table:style-name="co2" table:default-cell-style-name="ce12"/>
        <table:table-column table:style-name="co1" table:number-columns-repeated="2" table:default-cell-style-name="ce12"/>
        <table:table-column table:style-name="co1" table:number-columns-repeated="12" table:default-cell-style-name="Default"/>
        <table:table-row table:style-name="ro1" table:number-rows-repeated="6">
          <table:table-cell table:style-name="Default" table:number-columns-repeated="14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9" table:formula="of:=SUM([.D22:.D26])*100" office:value-type="float" office:value="100" calcext:value-type="float">
            <text:p>100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9" table:formula="of:=SUM([.H22:.H2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style-name="ce13" table:formula="of:=12*[.D22]+[.C22]+[.B22]" office:value-type="float" office:value="32.6" calcext:value-type="float">
            <text:p>32.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22]+[.G22]+[.F22]" office:value-type="float" office:value="30.2" calcext:value-type="float">
            <text:p>30.2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formula="of:=[.I22]-[.E22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style-name="ce13" table:formula="of:=12*[.D23]+[.C23]+[.B23]" office:value-type="float" office:value="10.2" calcext:value-type="float">
            <text:p>1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14*[.H23]+[.G23]+[.F23]" office:value-type="float" office:value="5.4" calcext:value-type="float">
            <text:p>5.4</text:p>
          </table:table-cell>
          <table:table-cell table:style-name="ce13" office:value-type="float" office:value="7" calcext:value-type="float">
            <text:p>7</text:p>
          </table:table-cell>
          <table:table-cell table:style-name="ce14" table:formula="of:=[.I23]-[.E23]" office:value-type="float" office:value="-4.8" calcext:value-type="float">
            <text:p>-4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3" table:formula="of:=12*[.D24]+[.C24]+[.B24]"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24]+[.G24]+[.F24]" office:value-type="float" office:value="9.2" calcext:value-type="float">
            <text:p>9.2</text:p>
          </table:table-cell>
          <table:table-cell table:style-name="ce13" office:value-type="float" office:value="8" calcext:value-type="float">
            <text:p>8</text:p>
          </table:table-cell>
          <table:table-cell table:style-name="ce14" table:formula="of:=[.I24]-[.E24]" office:value-type="float" office:value="5.6" calcext:value-type="float">
            <text:p>5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style-name="ce13" table:formula="of:=12*[.D25]+[.C25]+[.B25]" office:value-type="float" office:value="16.6" calcext:value-type="float">
            <text:p>16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25]+[.G25]+[.F25]" office:value-type="float" office:value="14.6" calcext:value-type="float">
            <text:p>14.6</text:p>
          </table:table-cell>
          <table:table-cell table:style-name="ce13" office:value-type="float" office:value="15" calcext:value-type="float">
            <text:p>15</text:p>
          </table:table-cell>
          <table:table-cell table:style-name="ce14" table:formula="of:=[.I25]-[.E25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3"/>
          <table:table-cell table:formula="of:=SUM([.E22:.E25])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I22:.I25])" office:value-type="float" office:value="59.4" calcext:value-type="float">
            <text:p>59.4</text:p>
          </table:table-cell>
          <table:table-cell table:style-name="ce13" office:value-type="float" office:value="1" calcext:value-type="float">
            <text:p>1</text:p>
          </table:table-cell>
          <table:table-cell table:style-name="ce12" table:formula="of:=SUM([.K22:.K25])" office:value-type="float" office:value="-3.6" calcext:value-type="float">
            <text:p>-3.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9" table:formula="of:=SUM([.H28:.H3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2*[.H28]+[.F28]" office:value-type="float" office:value="28.4" calcext:value-type="float">
            <text:p>28.4</text:p>
          </table:table-cell>
          <table:table-cell office:value-type="float" office:value="28" calcext:value-type="float">
            <text:p>28</text:p>
          </table:table-cell>
          <table:table-cell table:style-name="ce14" table:formula="of:=[.J28]-[.E22]" office:value-type="float" office:value="-4.6" calcext:value-type="float">
            <text:p>-4.6</text:p>
          </table:table-cell>
          <table:table-cell table:formula="of:=[.J28]-[.J22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12*[.H29]+[.F29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style-name="ce14" table:formula="of:=[.J29]-[.E23]" office:value-type="float" office:value="0.800000000000001" calcext:value-type="float">
            <text:p>0.800000000000001</text:p>
          </table:table-cell>
          <table:table-cell table:formula="of:=[.J29]-[.J23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12*[.H30]+[.F30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4" table:formula="of:=[.J30]-[.E24]" office:value-type="float" office:value="-1.6" calcext:value-type="float">
            <text:p>-1.6</text:p>
          </table:table-cell>
          <table:table-cell table:formula="of:=[.J30]-[.J24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2*[.H31]+[.F31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14" table:formula="of:=[.J31]-[.E25]" office:value-type="float" office:value="0.399999999999999" calcext:value-type="float">
            <text:p>0.399999999999999</text:p>
          </table:table-cell>
          <table:table-cell table:formula="of:=[.J31]-[.J25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I28:.I31])" office:value-type="float" office:value="59" calcext:value-type="float">
            <text:p>59</text:p>
          </table:table-cell>
          <table:table-cell/>
          <table:table-cell table:style-name="ce12"/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9" table:formula="of:=SUM([.H34:.H3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1" office:value-type="string" calcext:value-type="string">
            <text:p>To sylvis</text:p>
          </table:table-cell>
          <table:table-cell office:value-type="string" calcext:value-type="string">
            <text:p>To Sherlock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12*[.H34]+[.G34]+[.F34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5" table:formula="of:=[.J34]-[.J28]" office:value-type="float" office:value="1" calcext:value-type="float">
            <text:p>1</text:p>
          </table:table-cell>
          <table:table-cell table:style-name="ce16" table:formula="of:=[.J34]-[.E22]" office:value-type="float" office:value="-3.6" calcext:value-type="float">
            <text:p>-3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12*[.H35]+[.G35]+[.F35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style-name="ce15" table:formula="of:=[.J35]-[.J29]" office:value-type="float" office:value="-1" calcext:value-type="float">
            <text:p>-1</text:p>
          </table:table-cell>
          <table:table-cell table:style-name="ce16" table:formula="of:=[.J35]-[.E23]" office:value-type="float" office:value="-0.199999999999999" calcext:value-type="float">
            <text:p>-0.19999999999999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12*[.H36]+[.G36]+[.F36]"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style-name="ce15" table:formula="of:=[.J36]-[.J30]" office:value-type="float" office:value="1" calcext:value-type="float">
            <text:p>1</text:p>
          </table:table-cell>
          <table:table-cell table:style-name="ce16" table:formula="of:=[.J36]-[.E24]" office:value-type="float" office:value="-0.6" calcext:value-type="float">
            <text:p>-0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formula="of:=12*[.H37]+[.G37]+[.F37]"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style-name="ce15" table:formula="of:=[.J37]-[.J31]" office:value-type="float" office:value="1" calcext:value-type="float">
            <text:p>1</text:p>
          </table:table-cell>
          <table:table-cell table:style-name="ce16" table:formula="of:=[.J37]-[.E25]"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34:.I37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5" table:formula="of:=[.J38]-[.J32]" office:value-type="float" office:value="0" calcext:value-type="float">
            <text:p>0</text:p>
          </table:table-cell>
          <table:table-cell table:style-name="ce16" table:formula="of:=SUM([.L34:.L37])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9" table:formula="of:=SUM([.H40:.H4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ean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0*[.H40]+[.G40]+[.F40]" office:value-type="float" office:value="38" calcext:value-type="float">
            <text:p>38</text:p>
          </table:table-cell>
          <table:table-cell/>
          <table:table-cell table:style-name="ce19" table:formula="of:=[.I40]-[.I46]" office:value-type="float" office:value="-2.4" calcext:value-type="float">
            <text:p>-2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0*[.H41]+[.G41]+[.F41]" office:value-type="float" office:value="14" calcext:value-type="float">
            <text:p>14</text:p>
          </table:table-cell>
          <table:table-cell/>
          <table:table-cell table:style-name="ce19" table:formula="of:=[.I41]-[.I47]" office:value-type="float" office:value="-1.3" calcext:value-type="float">
            <text:p>-1.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10*[.H42]+[.G42]+[.F42]" office:value-type="float" office:value="4.5" calcext:value-type="float">
            <text:p>4.5</text:p>
          </table:table-cell>
          <table:table-cell/>
          <table:table-cell table:style-name="ce19" table:formula="of:=[.I42]-[.I48]" office:value-type="float" office:value="-0.0499999999999998" calcext:value-type="float">
            <text:p>-0.049999999999999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10*[.H43]+[.G43]+[.F43]" office:value-type="float" office:value="9.5" calcext:value-type="float">
            <text:p>9.5</text:p>
          </table:table-cell>
          <table:table-cell/>
          <table:table-cell table:style-name="ce19" table:formula="of:=[.I43]-[.I49]" office:value-type="float" office:value="-5.25" calcext:value-type="float">
            <text:p>-5.2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40:.I43])" office:value-type="float" office:value="66" calcext:value-type="float">
            <text:p>66</text:p>
          </table:table-cell>
          <table:table-cell/>
          <table:table-cell table:style-name="ce19" table:formula="of:=[.I44]-[.I50]" office:value-type="float" office:value="-9" calcext:value-type="float">
            <text:p>-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9" table:formula="of:=SUM([.H46:.H5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1*[.H46]+[.G46]+[.F46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1*[.H47]+[.G47]+[.F47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11*[.H48]+[.G48]+[.F48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11*[.H49]+[.G49]+[.F49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I46:.I49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9" table:formula="of:=SUM([.H52:.H5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Faye</text:p>
          </table:table-cell>
          <table:table-cell table:style-name="ce11" office:value-type="string" calcext:value-type="string">
            <text:p>To Dean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3*[.H52]+[.G52]+[.F52]" office:value-type="float" office:value="35.9" calcext:value-type="float">
            <text:p>35.9</text:p>
          </table:table-cell>
          <table:table-cell table:formula="of:=[.I52]" office:value-type="float" office:value="35.9" calcext:value-type="float">
            <text:p>35.9</text:p>
          </table:table-cell>
          <table:table-cell table:style-name="ce12" table:formula="of:=[.I52]-[.I82]" office:value-type="float" office:value="9.8" calcext:value-type="float">
            <text:p>9.8</text:p>
          </table:table-cell>
          <table:table-cell table:style-name="ce19" table:formula="of:=[.J52]-[.J46]" office:value-type="float" office:value="-4.1" calcext:value-type="float">
            <text:p>-4.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3*[.H53]+[.G53]+[.F53]" office:value-type="float" office:value="13.9" calcext:value-type="float">
            <text:p>13.9</text:p>
          </table:table-cell>
          <table:table-cell table:formula="of:=[.I53]" office:value-type="float" office:value="13.9" calcext:value-type="float">
            <text:p>13.9</text:p>
          </table:table-cell>
          <table:table-cell table:style-name="ce12" table:formula="of:=[.I53]-[.I83]-1" office:value-type="float" office:value="2.3" calcext:value-type="float">
            <text:p>2.3</text:p>
          </table:table-cell>
          <table:table-cell table:style-name="ce19" table:formula="of:=[.J53]-[.J47]" office:value-type="float" office:value="-3.1" calcext:value-type="float">
            <text:p>-3.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13*[.H54]+[.G54]+[.F54]" office:value-type="float" office:value="5.6" calcext:value-type="float">
            <text:p>5.6</text:p>
          </table:table-cell>
          <table:table-cell table:formula="of:=[.I54]" office:value-type="float" office:value="5.6" calcext:value-type="float">
            <text:p>5.6</text:p>
          </table:table-cell>
          <table:table-cell table:style-name="ce12" table:formula="of:=[.I54]-[.I84]" office:value-type="float" office:value="2.9" calcext:value-type="float">
            <text:p>2.9</text:p>
          </table:table-cell>
          <table:table-cell table:style-name="ce19" table:formula="of:=[.J54]-[.J48]"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13*[.H55]+[.G55]+[.F55]" office:value-type="float" office:value="14.6" calcext:value-type="float">
            <text:p>14.6</text:p>
          </table:table-cell>
          <table:table-cell table:formula="of:=[.I55]" office:value-type="float" office:value="14.6" calcext:value-type="float">
            <text:p>14.6</text:p>
          </table:table-cell>
          <table:table-cell table:style-name="ce12" table:formula="of:=[.I55]-[.I85]" office:value-type="float" office:value="-8" calcext:value-type="float">
            <text:p>-8</text:p>
          </table:table-cell>
          <table:table-cell table:style-name="ce19" table:formula="of:=[.J55]-[.J49]" office:value-type="float" office:value="-1.4" calcext:value-type="float">
            <text:p>-1.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I52:.I55])" office:value-type="float" office:value="70" calcext:value-type="float">
            <text:p>70</text:p>
          </table:table-cell>
          <table:table-cell table:formula="of:=[.I56]" office:value-type="float" office:value="70" calcext:value-type="float">
            <text:p>70</text:p>
          </table:table-cell>
          <table:table-cell table:style-name="ce12" table:formula="of:=SUM([.K52:.K55])" office:value-type="float" office:value="7" calcext:value-type="float">
            <text:p>7</text:p>
          </table:table-cell>
          <table:table-cell table:style-name="ce19" table:formula="of:=[.J56]-[.J50]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9" table:formula="of:=SUM([.H58:.H62])*100" office:value-type="float" office:value="100" calcext:value-type="float">
            <text:p>100</text:p>
          </table:table-cell>
          <table:table-cell table:number-columns-repeated="2"/>
          <table:table-cell table:style-name="ce12"/>
          <table:table-cell table:style-name="ce11" office:value-type="string" calcext:value-type="string">
            <text:p>To Kramer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*[.H58]+[.G58]+[.F58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12"/>
          <table:table-cell table:style-name="ce19" table:formula="of:=[.I58]-[.I52]" office:value-type="float" office:value="0.399999999999999" calcext:value-type="float">
            <text:p>0.39999999999999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*[.H59]+[.G59]+[.F59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59]-[.I53]" office:value-type="float" office:value="-0.5" calcext:value-type="float">
            <text:p>-0.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1*[.H60]+[.G60]+[.F60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12"/>
          <table:table-cell table:style-name="ce19" table:formula="of:=[.I60]-[.I54]"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1*[.H61]+[.G61]+[.F61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61]-[.I55]" office:value-type="float" office:value="-1.35" calcext:value-type="float">
            <text:p>-1.3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58:.I6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9" table:formula="of:=[.I62]-[.I56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9" table:formula="of:=SUM([.H64:.H6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0*[.H64]+[.G64]+[.F64]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9" table:formula="of:=[.J64]-[.J76]" office:value-type="float" office:value="-3" calcext:value-type="float">
            <text:p>-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p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0*[.H65]+[.G65]+[.F6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9" table:formula="of:=[.J65]-[.J77]" office:value-type="float" office:value="-1" calcext:value-type="float">
            <text:p>-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h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0*[.H66]+[.G66]+[.F6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table:formula="of:=[.J66]-[.J78]" office:value-type="float" office:value="-4" calcext:value-type="float">
            <text:p>-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0*[.H67]+[.G67]+[.F67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9" table:formula="of:=[.J67]-[.J79]" office:value-type="float" office:value="-1" calcext:value-type="float">
            <text:p>-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8 To reach</text:p>
          </table:table-cell>
          <table:table-cell/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64:.I67])" office:value-type="float" office:value="56" calcext:value-type="float">
            <text:p>56</text:p>
          </table:table-cell>
          <table:table-cell table:formula="of:=SUM([.I64:.I67])" office:value-type="float" office:value="56" calcext:value-type="float">
            <text:p>56</text:p>
          </table:table-cell>
          <table:table-cell table:style-name="ce19" table:formula="of:=[.J68]-[.J80]" office:value-type="float" office:value="-9.3" calcext:value-type="float">
            <text:p>-9.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9" table:formula="of:=SUM([.H70:.H7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Larentia</text:p>
          </table:table-cell>
          <table:table-cell office:value-type="string" calcext:value-type="string">
            <text:p>To Elbert</text:p>
          </table:table-cell>
          <table:table-cell table:style-name="ce11" office:value-type="string" calcext:value-type="string">
            <text:p>To Alvin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14*[.H70]+[.G70]+[.F70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19" table:formula="of:=[.J70]-[.I64]" office:value-type="float" office:value="4" calcext:value-type="float">
            <text:p>4</text:p>
          </table:table-cell>
          <table:table-cell table:formula="of:=[.I70]-[.I130]" office:value-type="float" office:value="-6.8" calcext:value-type="float">
            <text:p>-6.8</text:p>
          </table:table-cell>
          <table:table-cell table:formula="of:=[.I70]-[.I76]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14*[.H71]+[.G71]+[.F71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19" table:formula="of:=[.J71]-[.I65]" office:value-type="float" office:value="-3" calcext:value-type="float">
            <text:p>-3</text:p>
          </table:table-cell>
          <table:table-cell table:formula="of:=[.I71]-[.I131]" office:value-type="float" office:value="-3.9" calcext:value-type="float">
            <text:p>-3.9</text:p>
          </table:table-cell>
          <table:table-cell table:formula="of:=[.I71]-[.I77]" office:value-type="float" office:value="-0.25" calcext:value-type="float">
            <text:p>-0.2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72]+[.G72]+[.F72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19" table:formula="of:=[.J72]-[.I66]" office:value-type="float" office:value="1" calcext:value-type="float">
            <text:p>1</text:p>
          </table:table-cell>
          <table:table-cell table:formula="of:=[.I72]-[.I132]" office:value-type="float" office:value="-0.399999999999999" calcext:value-type="float">
            <text:p>-0.399999999999999</text:p>
          </table:table-cell>
          <table:table-cell table:formula="of:=[.I72]-[.I78]" office:value-type="float" office:value="0.0500000000000007" calcext:value-type="float">
            <text:p>0.05000000000000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73]+[.G73]+[.F73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19" table:formula="of:=[.J73]-[.I67]" office:value-type="float" office:value="-1" calcext:value-type="float">
            <text:p>-1</text:p>
          </table:table-cell>
          <table:table-cell table:formula="of:=[.I73]-[.I133]" office:value-type="float" office:value="0.400000000000002" calcext:value-type="float">
            <text:p>0.400000000000002</text:p>
          </table:table-cell>
          <table:table-cell table:formula="of:=[.I73]-[.I79]" office:value-type="float" office:value="-0.449999999999999" calcext:value-type="float">
            <text:p>-0.4499999999999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8 To reach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I70:.I73])" office:value-type="float" office:value="64.4" calcext:value-type="float">
            <text:p>64.4</text:p>
          </table:table-cell>
          <table:table-cell table:formula="of:=SUM([.I70:.I73])" office:value-type="float" office:value="64.4" calcext:value-type="float">
            <text:p>64.4</text:p>
          </table:table-cell>
          <table:table-cell table:style-name="ce19" table:formula="of:=[.J74]-[.I68]" office:value-type="float" office:value="8.40000000000001" calcext:value-type="float">
            <text:p>8.40000000000001</text:p>
          </table:table-cell>
          <table:table-cell table:formula="of:=SUM([.L70:.L73])" office:value-type="float" office:value="-10.7" calcext:value-type="float">
            <text:p>-10.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9" table:formula="of:=SUM([.H76:.H80])*100" office:value-type="float" office:value="110" calcext:value-type="float">
            <text:p>110</text:p>
          </table:table-cell>
          <table:table-cell table:number-columns-repeated="2"/>
          <table:table-cell table:style-name="ce11" office:value-type="string" calcext:value-type="string">
            <text:p>To ruby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3*[.H76]+[.G76]+[.F76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19" table:formula="of:=[.J76]-[.J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3*[.H77]+[.G77]+[.F77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77]-[.J71]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3*[.H78]+[.G78]+[.F78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78]-[.J72]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3*[.H79]+[.G79]+[.F79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19" table:formula="of:=[.J79]-[.J73]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68 To reach</text:p>
          </table:table-cell>
          <table:table-cell/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76:.I79])" office:value-type="float" office:value="65.3" calcext:value-type="float">
            <text:p>65.3</text:p>
          </table:table-cell>
          <table:table-cell table:formula="of:=SUM([.I76:.I79])" office:value-type="float" office:value="65.3" calcext:value-type="float">
            <text:p>65.3</text:p>
          </table:table-cell>
          <table:table-cell table:style-name="ce19" table:formula="of:=[.J80]-[.J74]" office:value-type="float" office:value="0.899999999999992" calcext:value-type="float">
            <text:p>0.89999999999999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9" table:formula="of:=SUM([.H82:.H8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14*[.H82]+[.G82]+[.F82]"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83]+[.G83]+[.F8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14*[.H84]+[.G84]+[.F84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14*[.H85]+[.G85]+[.F85]" office:value-type="float" office:value="22.6" calcext:value-type="float">
            <text:p>22.6</text:p>
          </table:table-cell>
          <table:table-cell office:value-type="float" office:value="22" calcext:value-type="float">
            <text:p>22</text:p>
          </table:table-cell>
          <table:table-cell table:style-name="ce1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3 To reach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82:.I85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table:formula="of:=SUM([.I82:.I85])"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9" table:formula="of:=SUM([.H88:.H9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5*[.H88]+[.G88]+[.F8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J88]-[.J82]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5*[.H89]+[.G89]+[.F89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89]-[.J83]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5*[.H90]+[.G90]+[.F90]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formula="of:=[.J90]-[.J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5*[.H91]+[.G91]+[.F91]" office:value-type="float" office:value="16.75" calcext:value-type="float">
            <text:p>16.75</text:p>
          </table:table-cell>
          <table:table-cell office:value-type="float" office:value="16" calcext:value-type="float">
            <text:p>16</text:p>
          </table:table-cell>
          <table:table-cell table:formula="of:=[.J91]-[.J85]" office:value-type="float" office:value="-6" calcext:value-type="float">
            <text:p>-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3 To reach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88:.I91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SUM([.I88:.I92])"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9" table:formula="of:=SUM([.H94:.H97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ramir</text:p>
          </table:table-cell>
          <table:table-cell office:value-type="string" calcext:value-type="string">
            <text:p>To Faye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2*[.H94]+[.G94]+[.F94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94]-[.J88]" office:value-type="float" office:value="-3" calcext:value-type="float">
            <text:p>-3</text:p>
          </table:table-cell>
          <table:table-cell table:style-name="ce16" table:formula="of:=[.J94]-[.J82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2*[.H95]+[.G95]+[.F95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95]-[.J89]" office:value-type="float" office:value="-1" calcext:value-type="float">
            <text:p>-1</text:p>
          </table:table-cell>
          <table:table-cell table:style-name="ce16" table:formula="of:=[.J95]-[.J8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2*[.H96]+[.G96]+[.F96]"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formula="of:=[.J96]-[.J90]" office:value-type="float" office:value="2" calcext:value-type="float">
            <text:p>2</text:p>
          </table:table-cell>
          <table:table-cell table:style-name="ce16" table:formula="of:=[.J96]-[.J84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2*[.H97]+[.G97]+[.F97]"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table:formula="of:=[.J97]-[.J91]" office:value-type="float" office:value="0" calcext:value-type="float">
            <text:p>0</text:p>
          </table:table-cell>
          <table:table-cell table:style-name="ce16" table:formula="of:=[.J97]-[.J85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63 To reach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94:.I97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I94:.I98])" office:value-type="float" office:value="120" calcext:value-type="float">
            <text:p>120</text:p>
          </table:table-cell>
          <table:table-cell table:style-name="ce16" table:formula="of:=[.J98]-[.J86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9" table:formula="of:=SUM([.H100:.H104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style-name="ce11" office:value-type="string" calcext:value-type="string">
            <text:p>To Alvina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-1*[.H100]+[.G100]+[.F100]" office:value-type="float" office:value="31.8" calcext:value-type="float">
            <text:p>31.8</text:p>
          </table:table-cell>
          <table:table-cell office:value-type="float" office:value="32" calcext:value-type="float">
            <text:p>32</text:p>
          </table:table-cell>
          <table:table-cell table:formula="of:=[.J100]-[.J82]" office:value-type="float" office:value="5" calcext:value-type="float">
            <text:p>5</text:p>
          </table:table-cell>
          <table:table-cell table:style-name="ce16" table:formula="of:=[.J100]-[.J76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-1*[.H101]+[.G101]+[.F101]"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table:formula="of:=[.J101]-[.J83]" office:value-type="float" office:value="-1" calcext:value-type="float">
            <text:p>-1</text:p>
          </table:table-cell>
          <table:table-cell table:style-name="ce16" table:formula="of:=[.J101]-[.J77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-1*[.H102]+[.G102]+[.F102]"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table:formula="of:=[.J102]-[.J84]" office:value-type="float" office:value="7" calcext:value-type="float">
            <text:p>7</text:p>
          </table:table-cell>
          <table:table-cell table:style-name="ce16" table:formula="of:=[.J102]-[.J78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-1*[.H103]+[.G103]+[.F10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03]-[.J85]" office:value-type="float" office:value="-6" calcext:value-type="float">
            <text:p>-6</text:p>
          </table:table-cell>
          <table:table-cell table:style-name="ce16" table:formula="of:=[.J103]-[.J79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SUM([.I100:.I103])" office:value-type="float" office:value="65.1" calcext:value-type="float">
            <text:p>65.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table:formula="of:=[.J104]-[.J80]" office:value-type="float" office:value="-57.3" calcext:value-type="float">
            <text:p>-57.3</text:p>
          </table:table-cell>
          <table:table-cell table:formula="of:=SUM([.I100:.I104])" office:value-type="float" office:value="130.2" calcext:value-type="float">
            <text:p>130.2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9" table:formula="of:=SUM([.H106:.H109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ico Stat</text:p>
          </table:table-cell>
          <table:table-cell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14*[.H106]+[.G106]+[.F106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 table:formula="of:=[.K106]+[.J106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107]+[.G107]+[.F107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table:formula="of:=[.K107]+[.J107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14*[.H108]+[.G108]+[.F108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K108]+[.J108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109]+[.G109]+[.F109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6" table:formula="of:=[.K109]+[.J109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/>
          <table:table-cell table:formula="of:=SUM([.I106:.I109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formula="of:=[.K110]+[.J110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9" table:formula="of:=SUM([.H112:.H11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Czene</text:p>
          </table:table-cell>
          <table:table-cell table:style-name="ce11" office:value-type="string" calcext:value-type="string">
            <text:p>To Tico Czene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14*[.H112]+[.G112]+[.F11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table:formula="of:=[.J112]-[.J106]" office:value-type="float" office:value="0" calcext:value-type="float">
            <text:p>0</text:p>
          </table:table-cell>
          <table:table-cell table:style-name="ce16" table:formula="of:=[.J112]-[.L106]" office:value-type="float" office:value="0" calcext:value-type="float">
            <text:p>0</text:p>
          </table:table-cell>
          <table:table-cell/>
          <table:table-cell office:value-type="string" calcext:value-type="string">
            <text:p>Hp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4*[.H113]+[.G113]+[.F113]"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table:formula="of:=[.J113]-[.J107]" office:value-type="float" office:value="2" calcext:value-type="float">
            <text:p>2</text:p>
          </table:table-cell>
          <table:table-cell table:style-name="ce16" table:formula="of:=[.J113]-[.L107]" office:value-type="float" office:value="1" calcext:value-type="float">
            <text:p>1</text:p>
          </table:table-cell>
          <table:table-cell/>
          <table:table-cell office:value-type="string" calcext:value-type="string">
            <text:p>Strengh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14*[.H114]+[.G114]+[.F114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J114]-[.J108]" office:value-type="float" office:value="-1" calcext:value-type="float">
            <text:p>-1</text:p>
          </table:table-cell>
          <table:table-cell table:style-name="ce16" table:formula="of:=[.J114]-[.L108]" office:value-type="float" office:value="-1" calcext:value-type="float">
            <text:p>-1</text:p>
          </table:table-cell>
          <table:table-cell/>
          <table:table-cell office:value-type="string" calcext:value-type="string">
            <text:p>Defe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4*[.H115]+[.G115]+[.F115]" office:value-type="float" office:value="20.6" calcext:value-type="float">
            <text:p>20.6</text:p>
          </table:table-cell>
          <table:table-cell office:value-type="float" office:value="19" calcext:value-type="float">
            <text:p>19</text:p>
          </table:table-cell>
          <table:table-cell table:formula="of:=[.J115]-[.J109]" office:value-type="float" office:value="0" calcext:value-type="float">
            <text:p>0</text:p>
          </table:table-cell>
          <table:table-cell table:style-name="ce16" table:formula="of:=[.J115]-[.L109]" office:value-type="float" office:value="-5" calcext:value-type="float">
            <text:p>-5</text:p>
          </table:table-cell>
          <table:table-cell/>
          <table:table-cell office:value-type="string" calcext:value-type="string">
            <text:p>Speed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/>
          <table:table-cell table:formula="of:=SUM([.I112:.I115])" office:value-type="float" office:value="51" calcext:value-type="float">
            <text:p>51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Magic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9" table:formula="of:=SUM([.H118:.H12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14*[.H118]+[.G118]+[.F118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18]-[.J76]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119]+[.G119]+[.F119]"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table:formula="of:=[.J119]-[.J77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4*[.H120]+[.G120]+[.F120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20]-[.J78]" office:value-type="float" office:value="-2" calcext:value-type="float">
            <text:p>-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4*[.H121]+[.G121]+[.F121]"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table:formula="of:=[.J121]-[.J79]" office:value-type="float" office:value="-2" calcext:value-type="float">
            <text:p>-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68 To reach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18:.I121])"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table:style-name="ce12" table:formula="of:=[.J122]-[.J80]" office:value-type="float" office:value="-65.3" calcext:value-type="float">
            <text:p>-65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9" table:formula="of:=SUM([.H124:.H12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lvina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3*[.H124]+[.G124]+[.F124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24]-[.J76]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13*[.H125]+[.G125]+[.F125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25]-[.J77]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3*[.H126]+[.G126]+[.F126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26]-[.J78]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13*[.H127]+[.G127]+[.F127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27]-[.J79]" office:value-type="float" office:value="-2" calcext:value-type="float">
            <text:p>-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24:.I127])"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table:formula="of:=[.J128]-[.J80]" office:value-type="float" office:value="-65.3" calcext:value-type="float">
            <text:p>-65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9" table:formula="of:=SUM([.H130:.H13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1*[.H130]+[.G130]+[.F130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30]-[.J124]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1*[.H131]+[.G131]+[.F131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31]-[.J125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11*[.H132]+[.G132]+[.F13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32]-[.J126]"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1*[.H133]+[.G133]+[.F133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33]-[.J127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+[.G134]" office:value-type="float" office:value="0" calcext:value-type="float">
            <text:p>0</text:p>
          </table:table-cell>
          <table:table-cell table:formula="of:=SUM([.I130:.I133])" office:value-type="float" office:value="75.1" calcext:value-type="float">
            <text:p>75.1</text:p>
          </table:table-cell>
          <table:table-cell/>
          <table:table-cell table:style-name="ce12" table:formula="of:=SUM([.K130:.K133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9" table:formula="of:=SUM([.H136:.H13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/>
          <table:table-cell table:style-name="ce11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136]+[.G136]+[.F136]" office:value-type="float" office:value="33.8" calcext:value-type="float">
            <text:p>33.8</text:p>
          </table:table-cell>
          <table:table-cell office:value-type="float" office:value="34" calcext:value-type="float">
            <text:p>34</text:p>
          </table:table-cell>
          <table:table-cell table:style-name="ce12" table:formula="of:=[.J136]-[.J124]" office:value-type="float" office:value="-2" calcext:value-type="float">
            <text:p>-2</text:p>
          </table:table-cell>
          <table:table-cell/>
          <table:table-cell table:formula="of:=[.J136]-[.J130]"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137]+[.G137]+[.F137]"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12" table:formula="of:=[.J137]-[.J125]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J137]-[.J131]"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138]+[.G138]+[.F138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style-name="ce12" table:formula="of:=[.J138]-[.J126]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J138]-[.J132]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139]+[.G139]+[.F139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style-name="ce12" table:formula="of:=[.J139]-[.J12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J139]-[.J1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 To reach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36:.I139])" office:value-type="float" office:value="65.4" calcext:value-type="float">
            <text:p>65.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8" calcext:value-type="float">
            <text:p>-8</text:p>
          </table:table-cell>
          <table:table-cell/>
          <table:table-cell table:formula="of:=SUM([.M136:.M139])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9" table:formula="of:=SUM([.H142:.H14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del</text:p>
          </table:table-cell>
          <table:table-cell office:value-type="string" calcext:value-type="string">
            <text:p>To Arthur</text:p>
          </table:table-cell>
          <table:table-cell table:style-name="ce11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142]+[.G142]+[.F142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42]-[.J136]" office:value-type="float" office:value="-1" calcext:value-type="float">
            <text:p>-1</text:p>
          </table:table-cell>
          <table:table-cell table:style-name="ce16" table:formula="of:=[.J142]-[.J130]" office:value-type="float" office:value="-5" calcext:value-type="float">
            <text:p>-5</text:p>
          </table:table-cell>
          <table:table-cell table:formula="of:=[.J142]-[.J76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14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137]" office:value-type="float" office:value="3" calcext:value-type="float">
            <text:p>3</text:p>
          </table:table-cell>
          <table:table-cell table:style-name="ce16" table:formula="of:=[.J143]-[.J131]" office:value-type="float" office:value="-2" calcext:value-type="float">
            <text:p>-2</text:p>
          </table:table-cell>
          <table:table-cell table:formula="of:=[.J143]-[.J77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14*[.H144]+[.G144]+[.F144]"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formula="of:=[.J144]-[.J138]" office:value-type="float" office:value="1" calcext:value-type="float">
            <text:p>1</text:p>
          </table:table-cell>
          <table:table-cell table:style-name="ce16" table:formula="of:=[.J144]-[.J132]" office:value-type="float" office:value="-1" calcext:value-type="float">
            <text:p>-1</text:p>
          </table:table-cell>
          <table:table-cell table:formula="of:=[.J144]-[.J78]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145]+[.G145]+[.F145]"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table:formula="of:=[.J145]-[.J139]" office:value-type="float" office:value="-2" calcext:value-type="float">
            <text:p>-2</text:p>
          </table:table-cell>
          <table:table-cell table:style-name="ce16" table:formula="of:=[.J145]-[.J133]" office:value-type="float" office:value="-1" calcext:value-type="float">
            <text:p>-1</text:p>
          </table:table-cell>
          <table:table-cell table:formula="of:=[.J145]-[.J79]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 To reach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42:.I145])" office:value-type="float" office:value="66.4" calcext:value-type="float">
            <text:p>66.4</text:p>
          </table:table-cell>
          <table:table-cell table:formula="of:=SUM([.I142:.I145])" office:value-type="float" office:value="66.4" calcext:value-type="float">
            <text:p>66.4</text:p>
          </table:table-cell>
          <table:table-cell table:style-name="ce12" office:value-type="float" office:value="-8" calcext:value-type="float">
            <text:p>-8</text:p>
          </table:table-cell>
          <table:table-cell table:formula="of:=[.J146]-[.J134]" office:value-type="float" office:value="66.4" calcext:value-type="float">
            <text:p>66.4</text:p>
          </table:table-cell>
          <table:table-cell table:number-columns-repeated="4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9" table:formula="of:=SUM([.H148:.H15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style-name="ce11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0*[.H148]+[.G148]+[.F148]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12" table:formula="of:=[.J148]-[.J130]" office:value-type="float" office:value="-4" calcext:value-type="float">
            <text:p>-4</text:p>
          </table:table-cell>
          <table:table-cell table:style-name="ce16" table:formula="of:=[.J148]-[.J160]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0*[.H149]+[.G149]+[.F14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2" table:formula="of:=[.J149]-[.J131]" office:value-type="float" office:value="-5" calcext:value-type="float">
            <text:p>-5</text:p>
          </table:table-cell>
          <table:table-cell table:style-name="ce16" table:formula="of:=[.J149]-[.J161]" office:value-type="float" office:value="-7" calcext:value-type="float">
            <text:p>-7</text:p>
          </table:table-cell>
          <table:table-cell table:number-columns-repeated="4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0*[.H150]+[.G150]+[.F150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table:formula="of:=[.J150]-[.J132]" office:value-type="float" office:value="1" calcext:value-type="float">
            <text:p>1</text:p>
          </table:table-cell>
          <table:table-cell table:style-name="ce16" table:formula="of:=[.J150]-[.J162]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0*[.H151]+[.G151]+[.F151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table:formula="of:=[.J151]-[.J133]" office:value-type="float" office:value="-2" calcext:value-type="float">
            <text:p>-2</text:p>
          </table:table-cell>
          <table:table-cell table:style-name="ce16" table:formula="of:=[.J151]-[.J163]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83 To reach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48:.I151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2" table:formula="of:=[.J152]-[.J134]" office:value-type="float" office:value="0" calcext:value-type="float">
            <text:p>0</text:p>
          </table:table-cell>
          <table:table-cell table:formula="of:=[.J152]-[.J164]" office:value-type="float" office:value="-82" calcext:value-type="float">
            <text:p>-82</text:p>
          </table:table-cell>
          <table:table-cell table:number-columns-repeated="4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9" table:formula="of:=SUM([.H154:.H15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aoud</text:p>
          </table:table-cell>
          <table:table-cell table:number-columns-repeated="5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4*[.H154]+[.G154]+[.F154]" office:value-type="float" office:value="35.6" calcext:value-type="float">
            <text:p>35.6</text:p>
          </table:table-cell>
          <table:table-cell office:value-type="float" office:value="34" calcext:value-type="float">
            <text:p>34</text:p>
          </table:table-cell>
          <table:table-cell table:formula="of:=[.I154]-[.I160]" office:value-type="float" office:value="-4.3" calcext:value-type="float">
            <text:p>-4.3</text:p>
          </table:table-cell>
          <table:table-cell table:number-columns-repeated="5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4*[.H155]+[.G155]+[.F155]"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table:formula="of:=[.I155]-[.I161]" office:value-type="float" office:value="-7.4" calcext:value-type="float">
            <text:p>-7.4</text:p>
          </table:table-cell>
          <table:table-cell table:number-columns-repeated="5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4*[.H156]+[.G156]+[.F156]" office:value-type="float" office:value="13.4" calcext:value-type="float">
            <text:p>13.4</text:p>
          </table:table-cell>
          <table:table-cell office:value-type="float" office:value="15" calcext:value-type="float">
            <text:p>15</text:p>
          </table:table-cell>
          <table:table-cell table:formula="of:=[.I156]-[.I162]" office:value-type="float" office:value="0.700000000000001" calcext:value-type="float">
            <text:p>0.700000000000001</text:p>
          </table:table-cell>
          <table:table-cell table:number-columns-repeated="5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4*[.H157]+[.G157]+[.F157]"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table:formula="of:=[.I157]-[.I163]" office:value-type="float" office:value="-4.5" calcext:value-type="float">
            <text:p>-4.5</text:p>
          </table:table-cell>
          <table:table-cell table:number-columns-repeated="5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3 To reach</text:p>
          </table:table-cell>
          <table:table-cell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54:.I157])"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table:formula="of:=[.I158]-[.I164]" office:value-type="float" office:value="-15.5" calcext:value-type="float">
            <text:p>-15.5</text:p>
          </table:table-cell>
          <table:table-cell table:number-columns-repeated="5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</table:table-row>
        <table:table-row table:style-name="ro1">
          <table:table-cell/>
          <table:table-cell table:formula="of:=SUM([.C154:.C156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9" table:formula="of:=SUM([.H160:.H16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number-columns-repeated="5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9*[.H160]+[.G160]+[.F160]"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  <table:table-cell table:formula="of:=[.J160]-[.J130]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9*[.H161]+[.G161]+[.F161]"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table:formula="of:=[.J161]-[.J131]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9*[.H162]+[.G162]+[.F162]"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formula="of:=[.J162]-[.J132]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9*[.H163]+[.G163]+[.F163]"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formula="of:=[.J163]-[.J133]"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I160:.I163])" office:value-type="float" office:value="82.9" calcext:value-type="float">
            <text:p>82.9</text:p>
          </table:table-cell>
          <table:table-cell table:formula="of:=SUM([.J160:.J163])" office:value-type="float" office:value="82" calcext:value-type="float">
            <text:p>82</text:p>
          </table:table-cell>
          <table:table-cell table:style-name="ce12" table:formula="of:=SUM([.K160:.K163])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9" table:formula="of:=SUM([.H166:.H17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style-name="Default" table:number-columns-repeated="3"/>
          <table:table-cell table:number-columns-repeated="2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4*[.H166]+[.G166]+[.F166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14*[.H167]+[.G167]+[.F167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9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14*[.H168]+[.G168]+[.F168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169]+[.G169]+[.F169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14*[.H170]+[.G170]+[.F170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Default"/>
          <table:table-cell table:style-name="Default" table:formula="of:=SUM([.I166:.I170])" office:value-type="float" office:value="59.8" calcext:value-type="float">
            <text:p>59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[.I170]+[.I169]+[.I166]" office:value-type="float" office:value="50" calcext:value-type="float">
            <text:p>50</text:p>
          </table:table-cell>
          <table:table-cell table:style-name="Default" table:formula="of:=[.J170]+[.J169]+[.J166]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9" table:formula="of:=SUM([.H173:.H177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14*[.H173]+[.G173]+[.F173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73]-[.J166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174]+[.G174]+[.F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175]+[.G175]+[.F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4*[.H176]+[.G176]+[.F176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76]-[.J169]" office:value-type="float" office:value="-4" calcext:value-type="float">
            <text:p>-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peed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14*[.H177]+[.G177]+[.F17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77]-[.J170]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SUM([.I173:.I177])" office:value-type="float" office:value="47" calcext:value-type="float">
            <text:p>47</text:p>
          </table:table-cell>
          <table:table-cell table:style-name="Default" table:formula="of:=SUM([.J173:.J177])" office:value-type="float" office:value="47" calcext:value-type="float">
            <text:p>47</text:p>
          </table:table-cell>
          <table:table-cell table:style-name="Default" table:formula="of:=SUM([.K173:.K177])" office:value-type="float" office:value="-3" calcext:value-type="float">
            <text:p>-3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9" table:formula="of:=SUM([.H180:.H18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11*[.H180]+[.G180]+[.F180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80]-[.J166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1*[.H181]+[.G181]+[.F1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1*[.H182]+[.G182]+[.F1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1*[.H183]+[.G183]+[.F183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83]-[.J169]" office:value-type="float" office:value="-5" calcext:value-type="float">
            <text:p>-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peed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11*[.H184]+[.G184]+[.F184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184]-[.J170]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SUM([.I180:.I184])" office:value-type="float" office:value="48" calcext:value-type="float">
            <text:p>48</text:p>
          </table:table-cell>
          <table:table-cell table:style-name="Default" table:formula="of:=SUM([.J180:.J184])" office:value-type="float" office:value="48" calcext:value-type="float">
            <text:p>48</text:p>
          </table:table-cell>
          <table:table-cell table:style-name="Default" table:formula="of:=SUM([.K180:.K184])" office:value-type="float" office:value="-2" calcext:value-type="float">
            <text:p>-2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9" table:formula="of:=SUM([.H187:.H191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-2*[.H187]+[.F187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187]-[.I166]" office:value-type="float" office:value="2.4" calcext:value-type="float">
            <text:p>2.4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-2*[.H188]+[.F188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188]-[.I167]" office:value-type="float" office:value="-1.13" calcext:value-type="float">
            <text:p>-1.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-2*[.H189]+[.F189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189]-[.I168]" office:value-type="float" office:value="0.2" calcext:value-type="float">
            <text:p>0.2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-2*[.H190]+[.F190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190]-[.I169]" office:value-type="float" office:value="-5.8" calcext:value-type="float">
            <text:p>-5.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speed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-2*[.H191]+[.F191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191]-[.I170]" office:value-type="float" office:value="-4.6" calcext:value-type="float">
            <text:p>-4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agic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[.I191]+[.I190]+[.I187]" office:value-type="float" office:value="42" calcext:value-type="float">
            <text:p>42</text:p>
          </table:table-cell>
          <table:table-cell table:style-name="Default" table:formula="of:=SUM([.J187:.J191])" office:value-type="float" office:value="41" calcext:value-type="float">
            <text:p>41</text:p>
          </table:table-cell>
          <table:table-cell table:style-name="Default" table:formula="of:=SUM([.K187:.K191])" office:value-type="float" office:value="-8.93" calcext:value-type="float">
            <text:p>-8.93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9" table:formula="of:=SUM([.H194:.H19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14*[.H194]+[.G194]+[.F194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194]-[.J180]"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195]+[.G195]+[.F1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196]+[.G196]+[.F1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14*[.H197]+[.G197]+[.F197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197]-[.J183]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peed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14*[.H198]+[.G198]+[.F198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198]-[.J184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[.I198]+[.I197]+[.I194]" office:value-type="float" office:value="48" calcext:value-type="float">
            <text:p>48</text:p>
          </table:table-cell>
          <table:table-cell table:style-name="Default" table:formula="of:=SUM([.J194:.J198])" office:value-type="float" office:value="48" calcext:value-type="float">
            <text:p>48</text:p>
          </table:table-cell>
          <table:table-cell table:style-name="Default" table:formula="of:=SUM([.K194:.K19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9" table:formula="of:=SUM([.H201:.H20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14*[.H201]+[.G201]+[.F201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01]-[.J186]" office:value-type="float" office:value="22" calcext:value-type="float">
            <text:p>22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202]+[.G202]+[.F2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4*[.H203]+[.G203]+[.F2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14*[.H204]+[.G204]+[.F204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04]-[.J189]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14*[.H205]+[.G205]+[.F205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05]-[.J190]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[.I205]+[.I204]+[.I201]" office:value-type="float" office:value="46" calcext:value-type="float">
            <text:p>46</text:p>
          </table:table-cell>
          <table:table-cell table:style-name="Default" table:formula="of:=SUM([.J201:.J205])" office:value-type="float" office:value="48" calcext:value-type="float">
            <text:p>48</text:p>
          </table:table-cell>
          <table:table-cell table:style-name="Default" table:formula="of:=SUM([.K201:.K205])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9" table:formula="of:=SUM([.H208:.H21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3*[.H208]+[.G208]+[.F208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08]-[.J166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*[.H209]+[.G209]+[.F2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*[.H210]+[.G210]+[.F2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3*[.H211]+[.G211]+[.F211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11]-[.J169]" office:value-type="float" office:value="-8" calcext:value-type="float">
            <text:p>-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0 To reach</text:p>
          </table:table-cell>
          <table:table-cell table:style-name="Default"/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3*[.H212]+[.G212]+[.F212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12]-[.J170]" office:value-type="float" office:value="-2" calcext:value-type="float">
            <text:p>-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8"/>
          <table:table-cell table:style-name="Default" table:formula="of:=[.I212]+[.I211]+[.I208]" office:value-type="float" office:value="40" calcext:value-type="float">
            <text:p>40</text:p>
          </table:table-cell>
          <table:table-cell table:style-name="Default" table:formula="of:=SUM([.J208:.J212])" office:value-type="float" office:value="40" calcext:value-type="float">
            <text:p>40</text:p>
          </table:table-cell>
          <table:table-cell table:style-name="Default" table:formula="of:=SUM([.K208:.K212])" office:value-type="float" office:value="-10" calcext:value-type="float">
            <text:p>-10</text:p>
          </table:table-cell>
          <table:table-cell table:style-name="Default" table:number-columns-repeated="3"/>
          <table:table-cell table:number-columns-repeated="12"/>
        </table:table-row>
      </table:table>
      <table:named-expressions/>
      <table:database-ranges>
        <table:database-range table:name="__Anonymous_Sheet_DB__1" table:target-range-address="Sheet2.A21:Sheet2.N2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7:31:42.99294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T18H36M45S</meta:editing-duration>
    <meta:editing-cycles>60</meta:editing-cycles>
    <meta:generator>LibreOffice/26.2.4.2$Windows_X86_64 LibreOffice_project/0229ac93fcf0d7cbc6376066c6f35021cef002dc</meta:generator>
    <dc:date>2026-07-14T20:17:40.144440200</dc:date>
    <meta:document-statistic meta:table-count="2" meta:cell-count="2419" meta:object-count="0"/>
  </office:meta>
</office:document-meta>
</file>