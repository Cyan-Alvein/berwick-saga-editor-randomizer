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1.1535in"/>
    </style:style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  <style:text-properties fo:color="#c9211e"/>
    </style:style>
    <style:style style:name="ce14" style:family="table-cell" style:parent-style-name="Default">
      <style:table-cell-properties fo:background-color="#333333" style:text-align-source="fix" style:repeat-content="false" fo:wrap-option="wrap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in"/>
      <style:text-properties fo:color="#ffff00"/>
    </style:style>
    <style:style style:name="ce19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a1467e" style:text-align-source="fix" style:repeat-content="false" fo:wrap-option="wrap" fo:border="0.74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style:font-name-asian="Segoe UI" style:font-name-complex="Tahoma"/>
    </style:style>
    <style:style style:name="ce6" style:family="table-cell" style:parent-style-name="Default" style:data-style-name="N1"/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a1467e" style:text-align-source="fix" style:repeat-content="false" fo:wrap-option="wrap" fo:border="0.74pt solid #000000"/>
      <style:paragraph-properties fo:text-align="center" fo:margin-left="0in"/>
    </style:style>
    <style:style style:name="ce3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  <style:text-properties fo:color="#c9211e"/>
    </style:style>
    <style:style style:name="ce35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in"/>
    </style:style>
    <style:style style:name="ce36" style:family="table-cell" style:parent-style-name="Default">
      <style:table-cell-properties fo:background-color="#333333" style:text-align-source="fix" style:repeat-content="false" fo:wrap-option="wrap" fo:border="0.74pt solid #000000"/>
      <style:paragraph-properties fo:text-align="center" fo:margin-left="0in"/>
    </style:style>
    <style:style style:name="ce37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in"/>
    </style:style>
    <style:style style:name="ce38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 fo:margin-left="0in"/>
    </style:style>
    <style:style style:name="ce39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in"/>
      <style:text-properties fo:color="#ffff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/>
        <table:table-column table:style-name="co1" table:number-columns-repeated="66" table:default-cell-style-name="ce1"/>
        <table:table-column table:style-name="co1" table:number-columns-repeated="16318"/>
        <table:table-row table:style-name="ro1" table:number-rows-repeated="7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hinHorse</text:p>
          </table:table-cell>
          <table:table-cell office:value-type="float" office:value="30" calcext:value-type="float">
            <text:p>30</text:p>
          </table:table-cell>
          <table:table-cell table:formula="of:=[.D8]*50"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PlainHorse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table:formula="of:=[.E9]" office:value-type="float" office:value="2500" calcext:value-type="float">
            <text:p>2500</text:p>
          </table:table-cell>
          <table:table-cell table:formula="of:=25000/50" office:value-type="float" office:value="500" calcext:value-type="float">
            <text:p>500</text:p>
          </table:table-cell>
          <table:table-cell table:formula="of:=2500/50" office:value-type="float" office:value="50" calcext:value-type="float">
            <text:p>50</text:p>
          </table:table-cell>
          <table:table-cell table:number-columns-repeated="5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pryHorse</text:p>
          </table:table-cell>
          <table:table-cell office:value-type="float" office:value="80" calcext:value-type="float">
            <text:p>80</text:p>
          </table:table-cell>
          <table:table-cell table:formula="of:=[.D10]*50" office:value-type="float" office:value="4000" calcext:value-type="float">
            <text:p>4000</text:p>
          </table:table-cell>
          <table:table-cell table:formula="of:=[.E10]" office:value-type="float" office:value="4000" calcext:value-type="float">
            <text:p>4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turdyHorse</text:p>
          </table:table-cell>
          <table:table-cell office:value-type="float" office:value="120" calcext:value-type="float">
            <text:p>120</text:p>
          </table:table-cell>
          <table:table-cell table:formula="of:=[.D11]*50" office:value-type="float" office:value="6000" calcext:value-type="float">
            <text:p>6000</text:p>
          </table:table-cell>
          <table:table-cell table:formula="of:=[.E11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RobustHorse</text:p>
          </table:table-cell>
          <table:table-cell office:value-type="float" office:value="180" calcext:value-type="float">
            <text:p>180</text:p>
          </table:table-cell>
          <table:table-cell table:formula="of:=[.D12]*50" office:value-type="float" office:value="9000" calcext:value-type="float">
            <text:p>9000</text:p>
          </table:table-cell>
          <table:table-cell table:formula="of:=[.E12]"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inonStallion</text:p>
          </table:table-cell>
          <table:table-cell office:value-type="float" office:value="120" calcext:value-type="float">
            <text:p>120</text:p>
          </table:table-cell>
          <table:table-cell table:formula="of:=[.D13]*50" office:value-type="float" office:value="6000" calcext:value-type="float">
            <text:p>6000</text:p>
          </table:table-cell>
          <table:table-cell table:formula="of:=[.E13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Destrier</text:p>
          </table:table-cell>
          <table:table-cell office:value-type="float" office:value="150" calcext:value-type="float">
            <text:p>150</text:p>
          </table:table-cell>
          <table:table-cell table:formula="of:=[.D14]*50" office:value-type="float" office:value="7500" calcext:value-type="float">
            <text:p>7500</text:p>
          </table:table-cell>
          <table:table-cell table:formula="of:=[.E14]" office:value-type="float" office:value="7500" calcext:value-type="float">
            <text:p>7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Courser</text:p>
          </table:table-cell>
          <table:table-cell office:value-type="float" office:value="150" calcext:value-type="float">
            <text:p>150</text:p>
          </table:table-cell>
          <table:table-cell table:formula="of:=[.D15]*50"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Stallion</text:p>
          </table:table-cell>
          <table:table-cell office:value-type="float" office:value="100" calcext:value-type="float">
            <text:p>100</text:p>
          </table:table-cell>
          <table:table-cell table:formula="of:=[.D16]*50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Courser</text:p>
          </table:table-cell>
          <table:table-cell office:value-type="float" office:value="80" calcext:value-type="float">
            <text:p>80</text:p>
          </table:table-cell>
          <table:table-cell table:formula="of:=[.D17]*50"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MorachHorse</text:p>
          </table:table-cell>
          <table:table-cell office:value-type="float" office:value="150" calcext:value-type="float">
            <text:p>150</text:p>
          </table:table-cell>
          <table:table-cell table:formula="of:=[.D18]*50" office:value-type="float" office:value="7500" calcext:value-type="float">
            <text:p>75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ico</text:p>
          </table:table-cell>
          <table:table-cell office:value-type="float" office:value="120" calcext:value-type="float">
            <text:p>120</text:p>
          </table:table-cell>
          <table:table-cell table:formula="of:=[.D19]*50" office:value-type="float" office:value="6000" calcext:value-type="float">
            <text:p>60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[.E20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amage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([.D23]+[.E23])-[.C23])*[.B23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airblade</text:p>
          </table:table-cell>
          <table:table-cell office:value-type="float" office:value="2" calcext:value-type="float">
            <text:p>2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4]+[.E24])-[.C24])*[.B24]" office:value-type="float" office:value="-20" calcext:value-type="float">
            <text:p>-2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WindStorm</text:p>
          </table:table-cell>
          <table:table-cell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5]+[.E25])-[.C25])*[.B25]" office:value-type="float" office:value="-30" calcext:value-type="float">
            <text:p>-3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lasRiana</text:p>
          </table:table-cell>
          <table:table-cell office:value-type="float" office:value="4" calcext:value-type="float">
            <text:p>4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6]+[.E26])-[.C26])*[.B26]" office:value-type="float" office:value="-40" calcext:value-type="float">
            <text:p>-4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asLeia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([.D27]+[.E27])-[.C27])*[.B27]" office:value-type="float" office:value="12" calcext:value-type="float">
            <text:p>12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([.D28]+[.E28])-[.C28])*[.B28]" office:value-type="float" office:value="-5" calcext:value-type="float">
            <text:p>-5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3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400*655" office:value-type="float" office:value="262000" calcext:value-type="float">
            <text:p>262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style-name="ce3" office:value-type="float" office:value="183639.7" calcext:value-type="float">
            <text:p>183639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79478.28" calcext:value-type="float">
            <text:p>179478.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35]/[.A33]" office:value-type="float" office:value="0.0544544561987413" calcext:value-type="float">
            <text:p>0.0544544561987413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[.D35]*[.F33]/[.D33]" office:value-type="float" office:value="0.0557170483247332" calcext:value-type="float">
            <text:p>0.0557170483247332</text:p>
          </table:table-cell>
          <table:table-cell table:number-columns-repeated="60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P=UI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=P/U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Imperial spear</text:p>
          </table:table-cell>
          <table:table-cell table:number-columns-repeated="3"/>
          <table:table-cell table:style-name="Default"/>
          <table:table-cell table:number-columns-repeated="52"/>
          <table:table-cell table:style-name="ce1" table:number-columns-repeated="16318"/>
        </table:table-row>
        <table:table-row table:style-name="ro1">
          <table:table-cell table:number-columns-repeated="7"/>
          <table:table-cell table:formula="of:=6*[.E54]" office:value-type="float" office:value="1320" calcext:value-type="float">
            <text:p>132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43]*[.K44]" office:value-type="float" office:value="833.333333333333" calcext:value-type="float">
            <text:p>833.333333333333</text:p>
          </table:table-cell>
          <table:table-cell office:value-type="string" calcext:value-type="string">
            <text:p>IronBow</text:p>
          </table:table-cell>
          <table:table-cell/>
          <table:table-cell office:value-type="string" calcext:value-type="string">
            <text:p>Longbow</text:p>
          </table:table-cell>
          <table:table-cell office:value-type="string" calcext:value-type="string">
            <text:p>KnightSword</text:p>
          </table:table-cell>
          <table:table-cell office:value-type="string" calcext:value-type="string">
            <text:p>SwiftB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AltiumSword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table:formula="of:=12*[.E55]" office:value-type="float" office:value="4400" calcext:value-type="float">
            <text:p>440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formula="of:=[.N42]*[.M44]/[.N44]*[.M45]" office:value-type="float" office:value="576" calcext:value-type="float">
            <text:p>576</text:p>
          </table:table-cell>
          <table:table-cell office:value-type="float" office:value="1200" calcext:value-type="float">
            <text:p>1200</text:p>
          </table:table-cell>
          <table:table-cell office:value-type="float" office:value="4800" calcext:value-type="float">
            <text:p>48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Q42]*[.R44]/[.Q44]" office:value-type="float" office:value="1733.33333333333" calcext:value-type="float">
            <text:p>1733.33333333333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/>
          <table:table-cell table:formula="of:=[.E42]/[.A43]" office:value-type="float" office:value="50.5" calcext:value-type="float">
            <text:p>50.5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/>
          <table:table-cell table:formula="of:=101/[.A44]" office:value-type="float" office:value="33.6666666666667" calcext:value-type="float">
            <text:p>33.6666666666667</text:p>
          </table:table-cell>
          <table:table-cell table:number-columns-repeated="4"/>
          <table:table-cell table:formula="of:=[.J41]/[.J43]" office:value-type="float" office:value="125" calcext:value-type="float">
            <text:p>125</text:p>
          </table:table-cell>
          <table:table-cell table:formula="of:=[.E47]/[.E46]*125" office:value-type="float" office:value="104.166666666667" calcext:value-type="float">
            <text:p>104.1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/>
          <table:table-cell table:formula="of:=101/[.A45]" office:value-type="float" office:value="25.25" calcext:value-type="float">
            <text:p>25.25</text:p>
          </table:table-cell>
          <table:table-cell table:number-columns-repeated="6"/>
          <table:table-cell table:formula="of:=[.N42]*[.L44]/[.N44]" office:value-type="float" office:value="240" calcext:value-type="float">
            <text:p>240</text:p>
          </table:table-cell>
          <table:table-cell table:formula="of:=[.E46]/[.E45]" office:value-type="float" office:value="0.8" calcext:value-type="float">
            <text:p>0.8</text:p>
          </table:table-cell>
          <table:table-cell table:number-columns-repeated="2"/>
          <table:table-cell table:formula="of:=[.O42]*[.E46]/[.E44]" office:value-type="float" office:value="2880" calcext:value-type="float">
            <text:p>2880</text:p>
          </table:table-cell>
          <table:table-cell table:number-columns-repeated="50"/>
          <table:table-cell table:style-name="ce1" table:number-columns-repeated="163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/>
          <table:table-cell table:formula="of:=101/[.A46]" office:value-type="float" office:value="20.2" calcext:value-type="float">
            <text:p>20.2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</text:p>
          </table:table-cell>
          <table:table-cell/>
          <table:table-cell table:formula="of:=101/[.A47]" office:value-type="float" office:value="16.8333333333333" calcext:value-type="float">
            <text:p>16.8333333333333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</text:p>
          </table:table-cell>
          <table:table-cell/>
          <table:table-cell table:formula="of:=101/[.A48]" office:value-type="float" office:value="14.4285714285714" calcext:value-type="float">
            <text:p>14.4285714285714</text:p>
          </table:table-cell>
          <table:table-cell table:number-columns-repeated="6"/>
          <table:table-cell office:value-type="string" calcext:value-type="string">
            <text:p>Bowgun</text:p>
          </table:table-cell>
          <table:table-cell office:value-type="float" office:value="10" calcext:value-type="float">
            <text:p>10</text:p>
          </table:table-cell>
          <table:table-cell table:number-columns-repeated="53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IronCrossb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formula="of:=2000*[.M49]/[.M50]" office:value-type="float" office:value="1428.57142857143" calcext:value-type="float">
            <text:p>1428.5714285714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(Att+400)*1.5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Square Shield</text:p>
          </table:table-cell>
          <table:table-cell office:value-type="string" calcext:value-type="string">
            <text:p>VerianMs</text:p>
          </table:table-cell>
          <table:table-cell office:value-type="string" calcext:value-type="string">
            <text:p>ImpOffMs</text:p>
          </table:table-cell>
          <table:table-cell office:value-type="string" calcext:value-type="string">
            <text:p>ImpKnightS</text:p>
          </table:table-cell>
          <table:table-cell office:value-type="string" calcext:value-type="string">
            <text:p>KnightShield</text:p>
          </table:table-cell>
          <table:table-cell/>
          <table:table-cell office:value-type="string" calcext:value-type="string">
            <text:p>Paladin</text:p>
          </table:table-cell>
          <table:table-cell/>
          <table:table-cell office:value-type="string" calcext:value-type="string">
            <text:p>Gastraphet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+400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4000/1.5" office:value-type="float" office:value="2666.66666666667" calcext:value-type="float">
            <text:p>26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table:number-columns-repeated="2" office:value-type="float" office:value="2200" calcext:value-type="float">
            <text:p>2200</text:p>
          </table:table-cell>
          <table:table-cell table:formula="of:=[.F53]*[.E54]" office:value-type="float" office:value="2640" calcext:value-type="float">
            <text:p>2640</text:p>
          </table:table-cell>
          <table:table-cell table:formula="of:=[.G53]*[.E54]" office:value-type="float" office:value="3080" calcext:value-type="float">
            <text:p>3080</text:p>
          </table:table-cell>
          <table:table-cell table:formula="of:=[.H53]*[.E55]" office:value-type="float" office:value="4400" calcext:value-type="float">
            <text:p>4400</text:p>
          </table:table-cell>
          <table:table-cell table:formula="of:=14*[.E56]" office:value-type="float" office:value="0" calcext:value-type="float">
            <text:p>0</text:p>
          </table:table-cell>
          <table:table-cell table:formula="of:=[.E55]*[.J53]" office:value-type="float" office:value="5133.33333333333" calcext:value-type="float">
            <text:p>5133.33333333333</text:p>
          </table:table-cell>
          <table:table-cell/>
          <table:table-cell office:value-type="string" calcext:value-type="string">
            <text:p>HeavyCrossb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formula="of:=2000*[.M51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[.W50]-400" office:value-type="float" office:value="2266.66666666667" calcext:value-type="float">
            <text:p>22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rave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2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FireBrand</text:p>
          </table:table-cell>
          <table:table-cell table:style-name="Default" office:value-type="string" calcext:value-type="string">
            <text:p>InfernalEdge</text:p>
          </table:table-cell>
          <table:table-cell table:style-name="Default" office:value-type="string" calcext:value-type="string">
            <text:p>FlameSword</text:p>
          </table:table-cell>
          <table:table-cell table:style-name="Default" office:value-type="string" calcext:value-type="string">
            <text:p>AirKnife</text:p>
          </table:table-cell>
          <table:table-cell table:style-name="Default" office:value-type="string" calcext:value-type="string">
            <text:p>BoltAxe</text:p>
          </table:table-cell>
          <table:table-cell table:style-name="Default" office:value-type="string" calcext:value-type="string">
            <text:p>LongSword</text:p>
          </table:table-cell>
          <table:table-cell table:style-name="Default" table:number-columns-repeated="2"/>
          <table:table-cell table:style-name="Default" office:value-type="string" calcext:value-type="string">
            <text:p>IronAxe</text:p>
          </table:table-cell>
          <table:table-cell table:style-name="Default" office:value-type="string" calcext:value-type="string">
            <text:p>Triple</text:p>
          </table:table-cell>
          <table:table-cell table:style-name="Default" office:value-type="string" calcext:value-type="string">
            <text:p>IronSpear</text:p>
          </table:table-cell>
          <table:table-cell office:value-type="string" calcext:value-type="string">
            <text:p>Long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Gastraphete</text:p>
          </table:table-cell>
          <table:table-cell office:value-type="string" calcext:value-type="string">
            <text:p>BraveCross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Arbalest</text:p>
          </table:table-cell>
          <table:table-cell office:value-type="string" calcext:value-type="string">
            <text:p>KillerCross</text:p>
          </table:table-cell>
          <table:table-cell office:value-type="string" calcext:value-type="string">
            <text:p>IronCrossb</text:p>
          </table:table-cell>
          <table:table-cell office:value-type="string" calcext:value-type="string">
            <text:p>HeavyCross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IronAxe</text:p>
          </table:table-cell>
          <table:table-cell office:value-type="string" calcext:value-type="string">
            <text:p>BroadAxe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IronLance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formula="of:=50/33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Defen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u-Ko-N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formula="of:=2000*[.M53]/21" office:value-type="float" office:value="1142.85714285714" calcext:value-type="float">
            <text:p>1142.85714285714</text:p>
          </table:table-cell>
          <table:table-cell table:number-columns-repeated="2"/>
          <table:table-cell table:style-name="Default"/>
          <table:table-cell table:style-name="Default" table:formula="of:=[.U55]*[.S54]/1.5" office:value-type="float" office:value="1813.33333333333" calcext:value-type="float">
            <text:p>1813.33333333333</text:p>
          </table:table-cell>
          <table:table-cell table:style-name="Default" table:formula="of:=[.U55]*[.T54]" office:value-type="float" office:value="5440" calcext:value-type="float">
            <text:p>544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U53]/[.U54]*[.V54]" office:value-type="float" office:value="2720" calcext:value-type="float">
            <text:p>2720</text:p>
          </table:table-cell>
          <table:table-cell table:style-name="Default" table:formula="of:=[.U55]*[.W54]" office:value-type="float" office:value="3360" calcext:value-type="float">
            <text:p>336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table:formula="of:=[.X55]*[.Y54]" office:value-type="float" office:value="960" calcext:value-type="float">
            <text:p>960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" calcext:value-type="float">
            <text:p>1000</text:p>
          </table:table-cell>
          <table:table-cell table:formula="of:=[.AD54]*[.AD55]*[.AC56]" office:value-type="float" office:value="2550" calcext:value-type="float">
            <text:p>2550</text:p>
          </table:table-cell>
          <table:table-cell table:formula="of:=[.AE54]*[.AE55]*[.AC56]" office:value-type="float" office:value="1875" calcext:value-type="float">
            <text:p>1875</text:p>
          </table:table-cell>
          <table:table-cell office:value-type="float" office:value="2000" calcext:value-type="float">
            <text:p>2000</text:p>
          </table:table-cell>
          <table:table-cell table:formula="of:=[.AG54]*[.AG55]*[.AF56]" office:value-type="float" office:value="3428.57142857143" calcext:value-type="float">
            <text:p>3428.57142857143</text:p>
          </table:table-cell>
          <table:table-cell table:formula="of:=[.AH54]*[.AH55]*[.AF56]" office:value-type="float" office:value="4571.42857142857" calcext:value-type="float">
            <text:p>4571.42857142857</text:p>
          </table:table-cell>
          <table:table-cell table:formula="of:=[.AI54]*[.AI55]*[.AF56]" office:value-type="float" office:value="3142.85714285714" calcext:value-type="float">
            <text:p>3142.85714285714</text:p>
          </table:table-cell>
          <table:table-cell/>
          <table:table-cell table:formula="of:=[.AK54]*[.AK55]*[.AK56]" office:value-type="float" office:value="1050.42016806723" calcext:value-type="float">
            <text:p>1050.42016806723</text:p>
          </table:table-cell>
          <table:table-cell table:formula="of:=[.AL54]*[.AL55]*[.AL56]" office:value-type="float" office:value="2571.42857142857" calcext:value-type="float">
            <text:p>2571.42857142857</text:p>
          </table:table-cell>
          <table:table-cell table:formula="of:=[.AM54]*[.AM55]*[.AM56]" office:value-type="float" office:value="6857.14285714285" calcext:value-type="float">
            <text:p>6857.14285714285</text:p>
          </table:table-cell>
          <table:table-cell office:value-type="float" office:value="1000" calcext:value-type="float">
            <text:p>1000</text:p>
          </table:table-cell>
          <table:table-cell table:formula="of:=[.AO54]*[.AO55]*[.AO56]" office:value-type="float" office:value="1200" calcext:value-type="float">
            <text:p>1200</text:p>
          </table:table-cell>
          <table:table-cell table:formula="of:=[.AP54]*[.AP55]*[.AP56]" office:value-type="float" office:value="0" calcext:value-type="float">
            <text:p>0</text:p>
          </table:table-cell>
          <table:table-cell table:formula="of:=[.AQ54]*[.AQ55]*[.AQ56]" office:value-type="float" office:value="0" calcext:value-type="float">
            <text:p>0</text:p>
          </table:table-cell>
          <table:table-cell table:formula="of:=[.AR54]*[.AR55]*[.AR56]" office:value-type="float" office:value="0" calcext:value-type="float">
            <text:p>0</text:p>
          </table:table-cell>
          <table:table-cell table:formula="of:=[.AS54]*[.AS55]*[.AS56]" office:value-type="float" office:value="0" calcext:value-type="float">
            <text:p>0</text:p>
          </table:table-cell>
          <table:table-cell table:formula="of:=[.AT54]*[.AT55]*[.AT56]" office:value-type="float" office:value="0" calcext:value-type="float">
            <text:p>0</text:p>
          </table:table-cell>
          <table:table-cell table:formula="of:=[.AU54]*[.AU55]*[.AU56]" office:value-type="float" office:value="0" calcext:value-type="float">
            <text:p>0</text:p>
          </table:table-cell>
          <table:table-cell table:number-columns-repeated="1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table:formula="of:=14*[.E55]" office:value-type="float" office:value="5133.33333333333" calcext:value-type="float">
            <text:p>5133.33333333333</text:p>
          </table:table-cell>
          <table:table-cell table:number-columns-repeated="2"/>
          <table:table-cell office:value-type="string" calcext:value-type="string">
            <text:p>Arbale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formula="of:=2000*[.M54]/21" office:value-type="float" office:value="3142.85714285714" calcext:value-type="float">
            <text:p>3142.85714285714</text:p>
          </table:table-cell>
          <table:table-cell table:number-columns-repeated="2"/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A</text:p>
          </table:table-cell>
          <table:table-cell/>
          <table:table-cell table:formula="of:=[.E54]*[.A53]*1.1" office:value-type="float" office:value="366.666666666667" calcext:value-type="float">
            <text:p>366.666666666667</text:p>
          </table:table-cell>
          <table:table-cell table:number-columns-repeated="6"/>
          <table:table-cell office:value-type="string" calcext:value-type="string">
            <text:p>KillerCrossb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table:formula="of:=2000*[.M55]/21" office:value-type="float" office:value="1619.04761904762" calcext:value-type="float">
            <text:p>1619.04761904762</text:p>
          </table:table-cell>
          <table:table-cell table:number-columns-repeated="2"/>
          <table:table-cell table:style-name="Default" table:number-columns-repeated="3"/>
          <table:table-cell table:style-name="Default" table:formula="of:=[.U53]/[.U54]" office:value-type="float" office:value="160" calcext:value-type="float">
            <text:p>160</text:p>
          </table:table-cell>
          <table:table-cell table:style-name="Default" table:number-columns-repeated="2"/>
          <table:table-cell table:style-name="Default" table:formula="of:=[.X53]/[.X54]" office:value-type="float" office:value="48" calcext:value-type="float">
            <text:p>48</text:p>
          </table:table-cell>
          <table:table-cell table:style-name="Default"/>
          <table:table-cell table:style-name="Default" office:value-type="string" calcext:value-type="string">
            <text:p>at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12*4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18*4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formula="of:=[.A54]*1.1*[.E5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ller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table:formula="of:=2000*[.M56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4"/>
          <table:table-cell table:style-name="Default" table:formula="of:=[.V53]/1.5" office:value-type="float" office:value="1813.33333333333" calcext:value-type="float">
            <text:p>1813.33333333333</text:p>
          </table:table-cell>
          <table:table-cell table:style-name="Default" office:value-type="string" calcext:value-type="string">
            <text:p>To D</text:p>
          </table:table-cell>
          <table:table-cell table:style-name="Default" table:formula="of:=[.X55]/25*20" office:value-type="float" office:value="38.4" calcext:value-type="float">
            <text:p>38.4</text:p>
          </table:table-cell>
          <table:table-cell table:style-name="Default"/>
          <table:table-cell table:style-name="Default" office:value-type="string" calcext:value-type="string">
            <text:p>1 attack=</text:p>
          </table:table-cell>
          <table:table-cell table:style-name="Default" table:formula="of:=[.AA53]/[.AA55]" office:value-type="float" office:value="60" calcext:value-type="float">
            <text:p>60</text:p>
          </table:table-cell>
          <table:table-cell table:style-name="Default"/>
          <table:table-cell table:style-name="Default" table:formula="of:=[.AC53]/[.AC54]/[.AC55]" office:value-type="float" office:value="6.25" calcext:value-type="float">
            <text:p>6.25</text:p>
          </table:table-cell>
          <table:table-cell table:number-columns-repeated="2"/>
          <table:table-cell table:formula="of:=[.AF53]/[.AF54]/[.AF55]" office:value-type="float" office:value="2.80112044817927" calcext:value-type="float">
            <text:p>2.80112044817927</text:p>
          </table:table-cell>
          <table:table-cell table:number-columns-repeated="7" office:value-type="float" office:value="2.80112044817927" calcext:value-type="float">
            <text:p>2.80112044817927</text:p>
          </table:table-cell>
          <table:table-cell table:formula="of:=[.AN53]/[.AN54]/[.AN55]" office:value-type="float" office:value="5" calcext:value-type="float">
            <text:p>5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Rapid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7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 table:number-columns-repeated="12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Hawey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table:formula="of:=2000*[.M58]/21" office:value-type="float" office:value="2857.14285714286" calcext:value-type="float">
            <text:p>2857.14285714286</text:p>
          </table:table-cell>
          <table:table-cell table:number-columns-repeated="2"/>
          <table:table-cell table:style-name="Default" table:number-columns-repeated="11"/>
          <table:table-cell table:style-name="Default" office:value-type="string" calcext:value-type="string">
            <text:p>LongBow</text:p>
          </table:table-cell>
          <table:table-cell office:value-type="string" calcext:value-type="string">
            <text:p>Composite bow</text:p>
          </table:table-cell>
          <table:table-cell office:value-type="string" calcext:value-type="string">
            <text:p>Strongbow</text:p>
          </table:table-cell>
          <table:table-cell office:value-type="string" calcext:value-type="string">
            <text:p>GreatBow</text:p>
          </table:table-cell>
          <table:table-cell office:value-type="string" calcext:value-type="string">
            <text:p>Triple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table:number-columns-repeated="11"/>
          <table:table-cell table:style-name="Default" office:value-type="float" office:value="1200" calcext:value-type="float">
            <text:p>1200</text:p>
          </table:table-cell>
          <table:table-cell table:formula="of:=[.AD60]*[.AD61]*[.AD62]" office:value-type="float" office:value="2284.8" calcext:value-type="float">
            <text:p>2284.8</text:p>
          </table:table-cell>
          <table:table-cell table:formula="of:=[.AE60]*[.AE61]*[.AE62]" office:value-type="float" office:value="2937.6" calcext:value-type="float">
            <text:p>2937.6</text:p>
          </table:table-cell>
          <table:table-cell table:formula="of:=[.AF60]*[.AF61]*[.AF62]" office:value-type="float" office:value="3590.4" calcext:value-type="float">
            <text:p>3590.4</text:p>
          </table:table-cell>
          <table:table-cell table:formula="of:=[.AG60]*[.AG61]*[.AG62]" office:value-type="float" office:value="576" calcext:value-type="float">
            <text:p>576</text:p>
          </table:table-cell>
          <table:table-cell table:formula="of:=[.AH60]*[.AH61]*[.AH62]" office:value-type="float" office:value="0" calcext:value-type="float">
            <text:p>0</text:p>
          </table:table-cell>
          <table:table-cell table:formula="of:=[.AI60]*[.AI61]*[.AI62]" office:value-type="float" office:value="0" calcext:value-type="float">
            <text:p>0</text:p>
          </table:table-cell>
          <table:table-cell table:number-columns-repeated="20"/>
          <table:table-cell table:formula="of:=10*25*[.BD68]" office:value-type="float" office:value="1960.78431372549" calcext:value-type="float">
            <text:p>1960.78431372549</text:p>
          </table:table-cell>
          <table:table-cell table:formula="of:=25*8*[.AZ68]" office:value-type="float" office:value="1568.62745098039" calcext:value-type="float">
            <text:p>1568.62745098039</text:p>
          </table:table-cell>
          <table:table-cell table:formula="of:=1600/34*25" office:value-type="float" office:value="1176.47058823529" calcext:value-type="float">
            <text:p>1176.47058823529</text:p>
          </table:table-cell>
          <table:table-cell table:number-columns-repeated="8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IronShield</text:p>
          </table:table-cell>
          <table:table-cell/>
          <table:table-cell office:value-type="string" calcext:value-type="string">
            <text:p>General Shield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25" calcext:value-type="float">
            <text:p>2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400" calcext:value-type="float">
            <text:p>2400</text:p>
          </table:table-cell>
          <table:table-cell table:formula="of:=[.E63]*[.D64]" office:value-type="float" office:value="2250" calcext:value-type="float">
            <text:p>2250</text:p>
          </table:table-cell>
          <table:table-cell table:formula="of:=[.F63]*[.D65]*1.1" office:value-type="float" office:value="6325" calcext:value-type="float">
            <text:p>6325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formula="of:=[.E42]/[.E43]" office:value-type="float" office:value="2" calcext:value-type="float">
            <text:p>2</text:p>
          </table:table-cell>
          <table:table-cell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1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ce6" table:formula="of:=101/[.R62]" office:value-type="float" office:value="101" calcext:value-type="float">
            <text:p>10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table:number-columns-repeated="7"/>
          <table:table-cell table:number-columns-repeated="7" table:style-name="Default" office:value-type="float" office:value="9.6" calcext:value-type="float">
            <text:p>9.6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</text:p>
          </table:table-cell>
          <table:table-cell table:style-name="ce6" table:formula="of:=101/[.R63]" office:value-type="float" office:value="50.5" calcext:value-type="float">
            <text:p>5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number-columns-repeated="8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A</text:p>
          </table:table-cell>
          <table:table-cell table:formula="of:=[.D61]/[.D63]" office:value-type="float" office:value="150" calcext:value-type="float">
            <text:p>150</text:p>
          </table:table-cell>
          <table:table-cell table:number-columns-repeated="1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B</text:p>
          </table:table-cell>
          <table:table-cell table:style-name="ce6" table:formula="of:=101/[.R64]" office:value-type="float" office:value="33.6666666666667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Rapier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Knigh</text:p>
          </table:table-cell>
          <table:table-cell office:value-type="string" calcext:value-type="string">
            <text:p>MithrilSword</text:p>
          </table:table-cell>
          <table:table-cell office:value-type="string" calcext:value-type="string">
            <text:p>Cutlass=</text:p>
          </table:table-cell>
          <table:table-cell office:value-type="string" calcext:value-type="string">
            <text:p>Cutlass</text:p>
          </table:table-cell>
          <table:table-cell office:value-type="string" calcext:value-type="string">
            <text:p>Scimitar+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eax</text:p>
          </table:table-cell>
          <table:table-cell office:value-type="string" calcext:value-type="string">
            <text:p>Carn</text:p>
          </table:table-cell>
          <table:table-cell office:value-type="string" calcext:value-type="string">
            <text:p>Crota</text:p>
          </table:table-cell>
          <table:table-cell office:value-type="string" calcext:value-type="string">
            <text:p>thiefsk</text:p>
          </table:table-cell>
          <table:table-cell office:value-type="string" calcext:value-type="string">
            <text:p>Military Fork</text:p>
          </table:table-cell>
          <table:table-cell office:value-type="string" calcext:value-type="string">
            <text:p>GoreFork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Aspis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Volleden</text:p>
          </table:table-cell>
          <table:table-cell office:value-type="string" calcext:value-type="string">
            <text:p>MetalShield</text:p>
          </table:table-cell>
          <table:table-cell office:value-type="string" calcext:value-type="string">
            <text:p>MithrilSied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LeatherMs</text:p>
          </table:table-cell>
          <table:table-cell office:value-type="string" calcext:value-type="string">
            <text:p>kitesield</text:p>
          </table:table-cell>
          <table:table-cell office:value-type="string" calcext:value-type="string">
            <text:p>squareshield</text:p>
          </table:table-cell>
          <table:table-cell office:value-type="string" calcext:value-type="string">
            <text:p>KnightShield</text:p>
          </table:table-cell>
          <table:table-cell office:value-type="string" calcext:value-type="string">
            <text:p>Hestia</text:p>
          </table:table-cell>
          <table:table-cell office:value-type="string" calcext:value-type="string">
            <text:p>WyrmShield</text:p>
          </table:table-cell>
          <table:table-cell office:value-type="string" calcext:value-type="string">
            <text:p>PaladinShield</text:p>
          </table:table-cell>
          <table:table-cell office:value-type="string" calcext:value-type="string">
            <text:p>LeatherMshield</text:p>
          </table:table-cell>
          <table:table-cell office:value-type="string" calcext:value-type="string">
            <text:p>WideShield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GreatShield</text:p>
          </table:table-cell>
          <table:table-cell office:value-type="string" calcext:value-type="string">
            <text:p>Amaterasu</text:p>
          </table:table-cell>
          <table:table-cell office:value-type="string" calcext:value-type="string">
            <text:p>ImpSolLshield</text:p>
          </table:table-cell>
          <table:table-cell table:number-columns-repeated="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S</text:p>
          </table:table-cell>
          <table:table-cell table:formula="of:=[.D64]*[.A53]*1.1" office:value-type="float" office:value="250" calcext:value-type="float">
            <text:p>250</text:p>
          </table:table-cell>
          <table:table-cell table:number-columns-repeated="1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</text:p>
          </table:table-cell>
          <table:table-cell table:style-name="ce6" table:formula="of:=101/[.R65]" office:value-type="float" office:value="25.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number-columns-repeated="5"/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AD66]*[.AD67]*[.AD68]" office:value-type="float" office:value="5999.99999999998" calcext:value-type="float">
            <text:p>5999.99999999998</text:p>
          </table:table-cell>
          <table:table-cell office:value-type="float" office:value="1200" calcext:value-type="float">
            <text:p>1200</text:p>
          </table:table-cell>
          <table:table-cell table:formula="of:=[.AF66]*[.AF67]*[.AF68]" office:value-type="float" office:value="2901.33333333333" calcext:value-type="float">
            <text:p>2901.33333333333</text:p>
          </table:table-cell>
          <table:table-cell office:value-type="float" office:value="3000" calcext:value-type="float">
            <text:p>3000</text:p>
          </table:table-cell>
          <table:table-cell table:formula="of:=[.AH66]*[.AH67]*[.AH68]" office:value-type="float" office:value="3000" calcext:value-type="float">
            <text:p>3000</text:p>
          </table:table-cell>
          <table:table-cell table:formula="of:=[.AI66]*[.AI67]*[.AI68]" office:value-type="float" office:value="2076.92307692308" calcext:value-type="float">
            <text:p>2076.92307692308</text:p>
          </table:table-cell>
          <table:table-cell table:formula="of:=[.AJ66]*[.AJ67]*[.AJ68]" office:value-type="float" office:value="959.999999999999" calcext:value-type="float">
            <text:p>959.999999999999</text:p>
          </table:table-cell>
          <table:table-cell table:formula="of:=[.AK66]*[.AK67]*[.AK68]" office:value-type="float" office:value="650" calcext:value-type="float">
            <text:p>650</text:p>
          </table:table-cell>
          <table:table-cell table:formula="of:=[.AL66]*[.AL67]*[.AL68]" office:value-type="float" office:value="1300" calcext:value-type="float">
            <text:p>1300</text:p>
          </table:table-cell>
          <table:table-cell table:formula="of:=[.AM66]*[.AM67]*[.AM68]" office:value-type="float" office:value="1950" calcext:value-type="float">
            <text:p>1950</text:p>
          </table:table-cell>
          <table:table-cell table:formula="of:=[.AN66]*[.AN67]*[.AN68]" office:value-type="float" office:value="1950" calcext:value-type="float">
            <text:p>1950</text:p>
          </table:table-cell>
          <table:table-cell table:formula="of:=[.AO66]*[.AO67]*[.AO68]" office:value-type="float" office:value="5304" calcext:value-type="float">
            <text:p>5304</text:p>
          </table:table-cell>
          <table:table-cell table:formula="of:=[.AP66]*[.AP67]*[.AP68]" office:value-type="float" office:value="325" calcext:value-type="float">
            <text:p>325</text:p>
          </table:table-cell>
          <table:table-cell office:value-type="float" office:value="750" calcext:value-type="float">
            <text:p>750</text:p>
          </table:table-cell>
          <table:table-cell table:formula="of:=[.AR66]*[.AR67]*[.AR68]" office:value-type="float" office:value="1838.23529411765" calcext:value-type="float">
            <text:p>1838.23529411765</text:p>
          </table:table-cell>
          <table:table-cell table:formula="of:=[.AS66]*[.AS67]*[.AS68]" office:value-type="float" office:value="392.156862745098" calcext:value-type="float">
            <text:p>392.156862745098</text:p>
          </table:table-cell>
          <table:table-cell office:value-type="float" office:value="1600" calcext:value-type="float">
            <text:p>1600</text:p>
          </table:table-cell>
          <table:table-cell table:formula="of:=[.AU66]*[.AU67]*[.AU68]" office:value-type="float" office:value="2352.94117647059" calcext:value-type="float">
            <text:p>2352.94117647059</text:p>
          </table:table-cell>
          <table:table-cell table:formula="of:=[.AV66]*[.AV67]*[.AV68]" office:value-type="float" office:value="6337.25490196078" calcext:value-type="float">
            <text:p>6337.25490196078</text:p>
          </table:table-cell>
          <table:table-cell table:formula="of:=[.AW66]*[.AW67]*[.AW68]" office:value-type="float" office:value="3137.25490196078" calcext:value-type="float">
            <text:p>3137.25490196078</text:p>
          </table:table-cell>
          <table:table-cell table:formula="of:=[.AX66]*[.AX67]*[.AX68]" office:value-type="float" office:value="6337.25490196078" calcext:value-type="float">
            <text:p>6337.25490196078</text:p>
          </table:table-cell>
          <table:table-cell table:formula="of:=[.AY66]*[.AY67]*[.AY68]" office:value-type="float" office:value="5545.09803921569" calcext:value-type="float">
            <text:p>5545.09803921569</text:p>
          </table:table-cell>
          <table:table-cell table:formula="of:=[.AZ66]*[.AZ67]*[.AZ68]" office:value-type="float" office:value="1600" calcext:value-type="float">
            <text:p>1600</text:p>
          </table:table-cell>
          <table:table-cell table:formula="of:=[.BA66]*[.BA67]*[.BA68]" office:value-type="float" office:value="2133.33333333333" calcext:value-type="float">
            <text:p>2133.33333333333</text:p>
          </table:table-cell>
          <table:table-cell table:formula="of:=[.BB66]*[.BB67]*[.BB68]" office:value-type="float" office:value="3921.56862745098" calcext:value-type="float">
            <text:p>3921.56862745098</text:p>
          </table:table-cell>
          <table:table-cell table:formula="of:=[.BC66]*[.BC67]*[.BC68]" office:value-type="float" office:value="4705.88235294118" calcext:value-type="float">
            <text:p>4705.88235294118</text:p>
          </table:table-cell>
          <table:table-cell table:formula="of:=[.BD66]*[.BD67]*[.BD68]" office:value-type="float" office:value="9505.88235294118" calcext:value-type="float">
            <text:p>9505.88235294118</text:p>
          </table:table-cell>
          <table:table-cell table:formula="of:=[.BE66]*[.BE67]*[.BE68]" office:value-type="float" office:value="11090.1960784314" calcext:value-type="float">
            <text:p>11090.1960784314</text:p>
          </table:table-cell>
          <table:table-cell table:formula="of:=[.BF66]*[.BF67]*[.BF68]" office:value-type="float" office:value="5490.19607843137" calcext:value-type="float">
            <text:p>5490.19607843137</text:p>
          </table:table-cell>
          <table:table-cell table:formula="of:=[.BG66]*[.BG67]*[.BG68]" office:value-type="float" office:value="4000" calcext:value-type="float">
            <text:p>4000</text:p>
          </table:table-cell>
          <table:table-cell table:formula="of:=[.BH66]*[.BH67]*[.BH68]" office:value-type="float" office:value="6000" calcext:value-type="float">
            <text:p>6000</text:p>
          </table:table-cell>
          <table:table-cell table:formula="of:=[.BI66]*[.BI67]*[.BI68]" office:value-type="float" office:value="8000" calcext:value-type="float">
            <text:p>8000</text:p>
          </table:table-cell>
          <table:table-cell table:formula="of:=[.BJ66]*[.BJ67]*[.BJ68]" office:value-type="float" office:value="19803.9215686274" calcext:value-type="float">
            <text:p>19803.9215686274</text:p>
          </table:table-cell>
          <table:table-cell table:formula="of:=[.BK66]*[.BK67]*[.BK68]" office:value-type="float" office:value="15843.137254902" calcext:value-type="float">
            <text:p>15843.137254902</text:p>
          </table:table-cell>
          <table:table-cell table:formula="of:=[.BL66]*[.BL67]*[.BL68]" office:value-type="float" office:value="4533.33333333333" calcext:value-type="float">
            <text:p>4533.33333333333</text:p>
          </table:table-cell>
          <table:table-cell table:formula="of:=[.BM66]*[.BM67]*[.BM68]" office:value-type="float" office:value="5333.33333333333" calcext:value-type="float">
            <text:p>5333.33333333333</text:p>
          </table:table-cell>
          <table:table-cell table:formula="of:=[.BN66]*[.BN67]*[.BN68]" office:value-type="float" office:value="6133.33333333333" calcext:value-type="float">
            <text:p>6133.3333333333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table:style-name="ce6" table:formula="of:=101/[.R66]" office:value-type="float" office:value="20.2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"/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E</text:p>
          </table:table-cell>
          <table:table-cell table:style-name="ce6" table:formula="of:=101/[.R67]" office:value-type="float" office:value="16.8333333333333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table:style-name="ce6" table:formula="of:=101/[.R68]" office:value-type="float" office:value="14.42857142857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2"/>
          <table:table-cell table:formula="of:=[.AC65]/[.AC66]/[.AC67]" office:value-type="float" office:value="17.1428571428571" calcext:value-type="float">
            <text:p>17.1428571428571</text:p>
          </table:table-cell>
          <table:table-cell office:value-type="float" office:value="17.1428571428571" calcext:value-type="float">
            <text:p>17.1428571428571</text:p>
          </table:table-cell>
          <table:table-cell table:formula="of:=[.AE65]/[.AE66]/[.AE67]" office:value-type="float" office:value="5.33333333333333" calcext:value-type="float">
            <text:p>5.33333333333333</text:p>
          </table:table-cell>
          <table:table-cell office:value-type="float" office:value="5.33333333333333" calcext:value-type="float">
            <text:p>5.33333333333333</text:p>
          </table:table-cell>
          <table:table-cell table:formula="of:=[.AG65]/[.AG66]/[.AG67]" office:value-type="float" office:value="6.78733031674208" calcext:value-type="float">
            <text:p>6.78733031674208</text:p>
          </table:table-cell>
          <table:table-cell table:number-columns-repeated="2" office:value-type="float" office:value="6.78733031674208" calcext:value-type="float">
            <text:p>6.78733031674208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6" office:value-type="float" office:value="13" calcext:value-type="float">
            <text:p>13</text:p>
          </table:table-cell>
          <table:table-cell table:formula="of:=[.AQ65]/[.AQ66]/[.AQ67]" office:value-type="float" office:value="3.67647058823529" calcext:value-type="float">
            <text:p>3.67647058823529</text:p>
          </table:table-cell>
          <table:table-cell office:value-type="float" office:value="3.67647058823529" calcext:value-type="float">
            <text:p>3.67647058823529</text:p>
          </table:table-cell>
          <table:table-cell office:value-type="float" office:value="7.84313725490196" calcext:value-type="float">
            <text:p>7.84313725490196</text:p>
          </table:table-cell>
          <table:table-cell table:formula="of:=[.AT65]/[.AT66]/[.AT67]" office:value-type="float" office:value="7.84313725490196" calcext:value-type="float">
            <text:p>7.84313725490196</text:p>
          </table:table-cell>
          <table:table-cell table:number-columns-repeated="20" office:value-type="float" office:value="7.84313725490196" calcext:value-type="float">
            <text:p>7.84313725490196</text:p>
          </table:table-cell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Aspis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thril</text:p>
          </table:table-cell>
          <table:table-cell office:value-type="string" calcext:value-type="string">
            <text:p>Aiantos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ImpOff</text:p>
          </table:table-cell>
          <table:table-cell office:value-type="string" calcext:value-type="string">
            <text:p>ImpKnigh</text:p>
          </table:table-cell>
          <table:table-cell office:value-type="string" calcext:value-type="string">
            <text:p>Impso</text:p>
          </table:table-cell>
          <table:table-cell table:number-columns-repeated="8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formula="of:=[.AF65]*3" office:value-type="float" office:value="8704" calcext:value-type="float">
            <text:p>8704</text:p>
          </table:table-cell>
          <table:table-cell/>
          <table:table-cell table:formula="of:=3000*3+500" office:value-type="float" office:value="9500" calcext:value-type="float">
            <text:p>9500</text:p>
          </table:table-cell>
          <table:table-cell table:number-columns-repeated="3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72]*[.D74]" office:value-type="float" office:value="3232.32323232323" calcext:value-type="float">
            <text:p>3232.323232323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IronAxe</text:p>
          </table:table-cell>
          <table:table-cell table:formula="of:=[.W70]*[.X70]*[.Y70]" office:value-type="float" office:value="1009.61538461539" calcext:value-type="float">
            <text:p>1009.6153846153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ronSpear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B70]/[.AC70]/[.AD70]" office:value-type="float" office:value="5.95238095238095" calcext:value-type="float">
            <text:p>5.95238095238095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BroadAxe</text:p>
          </table:table-cell>
          <table:table-cell office:value-type="float" office:value="1500" calcext:value-type="float">
            <text:p>15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V71]/[.W71]/[.X71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teelSpear</text:p>
          </table:table-cell>
          <table:table-cell table:formula="of:=[.AC71]*[.AD71]*[.AE71]" office:value-type="float" office:value="1547.61904761905" calcext:value-type="float">
            <text:p>1547.6190476190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Log Splitter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pear</text:p>
          </table:table-cell>
          <table:table-cell table:formula="of:=[.AC72]*[.AD72]*[.AE72]"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2"/>
          <table:table-cell table:formula="of:=9000/3*2"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formula="of:=3000*2.5" office:value-type="float" office:value="7500" calcext:value-type="float">
            <text:p>7500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*</text:p>
          </table:table-cell>
          <table:table-cell table:formula="of:=[.D70]/[.D72]" office:value-type="float" office:value="266.666666666667" calcext:value-type="float">
            <text:p>266.666666666667</text:p>
          </table:table-cell>
          <table:table-cell table:number-columns-repeated="16"/>
          <table:table-cell office:value-type="string" calcext:value-type="string">
            <text:p>PickAxe</text:p>
          </table:table-cell>
          <table:table-cell table:formula="of:=[.W73]*[.X73]*[.Y73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erSpear</text:p>
          </table:table-cell>
          <table:table-cell table:formula="of:=[.AC73]*[.AD73]*[.AE73]+1000" office:value-type="float" office:value="2875" calcext:value-type="float">
            <text:p>287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B to A</text:p>
          </table:table-cell>
          <table:table-cell table:formula="of:=[.D73]*[.A53]" office:value-type="float" office:value="404.040404040404" calcext:value-type="float">
            <text:p>404.040404040404</text:p>
          </table:table-cell>
          <table:table-cell table:number-columns-repeated="16"/>
          <table:table-cell office:value-type="string" calcext:value-type="string">
            <text:p>BattleSaw</text:p>
          </table:table-cell>
          <table:table-cell table:formula="of:=[.W74]*[.X74]*[.Y74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Doru</text:p>
          </table:table-cell>
          <table:table-cell table:style-name="ce8" table:formula="of:=[.AC74]*[.AD74]*[.AE74]+1000" office:value-type="float" office:value="4333.33333333333" calcext:value-type="float">
            <text:p>4333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string" calcext:value-type="string">
            <text:p>Attack</text:p>
          </table:table-cell>
          <table:table-cell office:value-type="string" calcext:value-type="string">
            <text:p>Cr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wen</text:p>
          </table:table-cell>
          <table:table-cell office:value-type="string" calcext:value-type="string">
            <text:p>Enid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1300-866" office:value-type="float" office:value="434" calcext:value-type="float">
            <text:p>434</text:p>
          </table:table-cell>
          <table:table-cell table:formula="of:=434*2" office:value-type="float" office:value="868" calcext:value-type="float">
            <text:p>868</text:p>
          </table:table-cell>
          <table:table-cell table:number-columns-repeated="13"/>
          <table:table-cell office:value-type="string" calcext:value-type="string">
            <text:p>HandAxe</text:p>
          </table:table-cell>
          <table:table-cell table:formula="of:=[.W75]*[.X75]*[.Y75]" office:value-type="float" office:value="961.538461538462" calcext:value-type="float">
            <text:p>961.53846153846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lum</text:p>
          </table:table-cell>
          <table:table-cell table:formula="of:=[.AC75]*[.AD75]*[.AE75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rbaricAxe</text:p>
          </table:table-cell>
          <table:table-cell table:formula="of:=[.W76]*[.X76]*[.Y76]" office:value-type="float" office:value="2019.23076923077" calcext:value-type="float">
            <text:p>201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rottypeSpear</text:p>
          </table:table-cell>
          <table:table-cell table:style-name="ce8" table:formula="of:=[.AC76]*[.AD76]*[.AE76]+1000" office:value-type="float" office:value="3125" calcext:value-type="float">
            <text:p>3125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9"/>
          <table:table-cell office:value-type="string" calcext:value-type="string">
            <text:p>rank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okedAxe</text:p>
          </table:table-cell>
          <table:table-cell table:formula="of:=[.W77]*[.X77]*[.Y77]" office:value-type="float" office:value="3028.84615384616" calcext:value-type="float">
            <text:p>3028.846153846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ke</text:p>
          </table:table-cell>
          <table:table-cell table:style-name="ce8" table:formula="of:=[.AC77]*[.AD77]*[.AE77]+1000" office:value-type="float" office:value="3708.33333333333" calcext:value-type="float">
            <text:p>3708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number-columns-repeated="2" office:value-type="string" calcext:value-type="string">
            <text:p>KillingE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vel 11</text:p>
          </table:table-cell>
          <table:table-cell office:value-type="float" office:value="5" calcext:value-type="float">
            <text:p>5</text:p>
          </table:table-cell>
          <table:table-cell table:formula="of:=0.3*11" office:value-type="float" office:value="3.3" calcext:value-type="float">
            <text:p>3.3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nditAxe</text:p>
          </table:table-cell>
          <table:table-cell table:formula="of:=[.W78]*[.X78]*[.Y78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utum</text:p>
          </table:table-cell>
          <table:table-cell table:formula="of:=[.AC78]*[.AD78]*[.AE78]" office:value-type="float" office:value="1500" calcext:value-type="float">
            <text:p>15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Crit</text:p>
          </table:table-cell>
          <table:table-cell office:value-type="string" calcext:value-type="string">
            <text:p>Ignore Shield</text:p>
          </table:table-cell>
          <table:table-cell table:number-columns-repeated="3"/>
          <table:table-cell office:value-type="string" calcext:value-type="string">
            <text:p>At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tota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Francisca</text:p>
          </table:table-cell>
          <table:table-cell table:formula="of:=[.W79]*[.X79]*[.Y79]" office:value-type="float" office:value="1346.15384615385" calcext:value-type="float">
            <text:p>1346.1538461538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pear</text:p>
          </table:table-cell>
          <table:table-cell table:style-name="ce8" table:formula="of:=[.AC79]*[.AD79]*[.AE79]+1000" office:value-type="float" office:value="6160.71428571429" calcext:value-type="float">
            <text:p>6160.71428571429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Killing edge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table:formula="of:=4*6.6667" office:value-type="float" office:value="26.6668" calcext:value-type="float">
            <text:p>26.6668</text:p>
          </table:table-cell>
          <table:table-cell table:number-columns-repeated="4"/>
          <table:table-cell office:value-type="string" calcext:value-type="string">
            <text:p>Crit</text:p>
          </table:table-cell>
          <table:table-cell office:value-type="float" office:value="18" calcext:value-type="float">
            <text:p>18</text:p>
          </table:table-cell>
          <table:table-cell table:number-columns-repeated="2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ttleAxe</text:p>
          </table:table-cell>
          <table:table-cell table:formula="of:=[.W80]*[.X80]*[.Y80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Spear</text:p>
          </table:table-cell>
          <table:table-cell table:formula="of:=[.AC80]*[.AD80]*[.AE80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Rapier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olcanoAxe</text:p>
          </table:table-cell>
          <table:table-cell table:formula="of:=[.W81]*[.X81]*[.Y81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Euthyphro</text:p>
          </table:table-cell>
          <table:table-cell table:formula="of:=[.AC81]*[.AD81]*[.AE81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formula="of:=33-18" office:value-type="float" office:value="15" calcext:value-type="float">
            <text:p>15</text:p>
          </table:table-cell>
          <table:table-cell table:number-columns-repeated="2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lacierAxe</text:p>
          </table:table-cell>
          <table:table-cell table:formula="of:=[.W82]*[.X82]*[.Y82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Javelin</text:p>
          </table:table-cell>
          <table:table-cell table:formula="of:=[.AC82]*[.AD82]*[.AE82]" office:value-type="float" office:value="2125" calcext:value-type="float">
            <text:p>21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NimbusAxe</text:p>
          </table:table-cell>
          <table:table-cell table:formula="of:=[.W83]*[.X83]*[.Y83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artisan</text:p>
          </table:table-cell>
          <table:table-cell table:formula="of:=[.AC83]*[.AD83]*[.AE83]" office:value-type="float" office:value="4375" calcext:value-type="float">
            <text:p>437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AE71]" office:value-type="float" office:value="5.95238095238095" calcext:value-type="float">
            <text:p>5.95238095238095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rkAxe</text:p>
          </table:table-cell>
          <table:table-cell table:formula="of:=[.W84]*[.X84]*[.Y84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ngon</text:p>
          </table:table-cell>
          <table:table-cell table:style-name="ce8" table:formula="of:=[.AC84]*[.AD84]*[.AE84]+1000" office:value-type="float" office:value="3630.95238095238" calcext:value-type="float">
            <text:p>3630.9523809523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AE72]" office:value-type="float" office:value="5.95238095238095" calcext:value-type="float">
            <text:p>5.95238095238095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WarPick</text:p>
          </table:table-cell>
          <table:table-cell table:style-name="ce8" table:formula="of:=[.W85]*[.X85]*[.Y85]+1000" office:value-type="float" office:value="2615.38461538462" calcext:value-type="float">
            <text:p>2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ionac</text:p>
          </table:table-cell>
          <table:table-cell table:style-name="ce8" table:formula="of:=[.AC85]*[.AD85]*[.AE85]+1000" office:value-type="float" office:value="5166.66666666667" calcext:value-type="float">
            <text:p>5166.6666666666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E73]" office:value-type="float" office:value="5.95238095238095" calcext:value-type="float">
            <text:p>5.95238095238095</text:p>
          </table:table-cell>
          <table:table-cell table:number-columns-repeated="16"/>
          <table:table-cell office:value-type="string" calcext:value-type="string">
            <text:p>Saphir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Aegina</text:p>
          </table:table-cell>
          <table:table-cell office:value-type="string" calcext:value-type="string">
            <text:p>Perceval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Izerna</text:p>
          </table:table-cell>
          <table:table-cell office:value-type="string" calcext:value-type="string">
            <text:p>Paramythis</text:p>
          </table:table-cell>
          <table:table-cell table:number-columns-repeated="12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tchet</text:p>
          </table:table-cell>
          <table:table-cell table:formula="of:=[.W86]*[.X86]*[.Y86]" office:value-type="float" office:value="1826.92307692308" calcext:value-type="float">
            <text:p>1826.9230769230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wiftSpear</text:p>
          </table:table-cell>
          <table:table-cell table:style-name="ce8" table:formula="of:=[.AC86]*[.AD86]*[.AE86]+1000" office:value-type="float" office:value="6625" calcext:value-type="float">
            <text:p>6625</text:p>
          </table:table-cell>
          <table:table-cell office:value-type="float" office:value="35" calcext:value-type="float">
            <text:p>35</text:p>
          </table:table-cell>
          <table:table-cell table:formula="of:=1.5*18" office:value-type="float" office:value="27" calcext:value-type="float">
            <text:p>27</text:p>
          </table:table-cell>
          <table:table-cell table:formula="of:=[.AE74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2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eakerAxe</text:p>
          </table:table-cell>
          <table:table-cell table:formula="of:=[.W87]*[.X87]*[.Y87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Fauchard</text:p>
          </table:table-cell>
          <table:table-cell table:style-name="ce8" table:formula="of:=[.AC87]*[.AD87]*[.AE87]+1000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formula="of:=12*2" office:value-type="float" office:value="24" calcext:value-type="float">
            <text:p>24</text:p>
          </table:table-cell>
          <table:table-cell table:formula="of:=[.AE75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Rank up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leax</text:p>
          </table:table-cell>
          <table:table-cell table:style-name="ce8" table:formula="of:=[.W88]*[.X88]*[.Y88]+1000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ianSpear</text:p>
          </table:table-cell>
          <table:table-cell table:formula="of:=[.AC88]*[.AD88]*[.AE88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6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 11</text:p>
          </table:table-cell>
          <table:table-cell office:value-type="float" office:value="9" calcext:value-type="float">
            <text:p>9</text:p>
          </table:table-cell>
          <table:table-cell table:formula="of:=[.AW86]+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0.4*7" office:value-type="float" office:value="2.8" calcext:value-type="float">
            <text:p>2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omahawk</text:p>
          </table:table-cell>
          <table:table-cell table:style-name="ce8" table:formula="of:=[.W89]*[.X89]*[.Y89]+1000" office:value-type="float" office:value="2750" calcext:value-type="float">
            <text:p>2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OldImpSpear</text:p>
          </table:table-cell>
          <table:table-cell table:formula="of:=[.AC89]*[.AD89]*[.AE89]" office:value-type="float" office:value="535.714285714286" calcext:value-type="float">
            <text:p>535.71428571428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AE77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Total 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Axe</text:p>
          </table:table-cell>
          <table:table-cell table:formula="of:=[.W90]*[.X90]*[.Y90]" office:value-type="float" office:value="2120.19230769231" calcext:value-type="float">
            <text:p>2120.1923076923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mpSpear</text:p>
          </table:table-cell>
          <table:table-cell table:formula="of:=[.AC90]*[.AD90]*[.AE90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8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Zanbato</text:p>
          </table:table-cell>
          <table:table-cell office:value-type="string" calcext:value-type="string">
            <text:p>WarPick</text:p>
          </table:table-cell>
          <table:table-cell office:value-type="string" calcext:value-type="string">
            <text:p>BastardSword</text:p>
          </table:table-cell>
          <table:table-cell office:value-type="string" calcext:value-type="string">
            <text:p>Shamshir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Axe</text:p>
          </table:table-cell>
          <table:table-cell table:style-name="ce8" table:formula="of:=[.W91]*[.X91]*[.Y91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limSpear</text:p>
          </table:table-cell>
          <table:table-cell table:formula="of:=[.AC91]*[.AD91]*[.AE91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9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 office:value-type="string" calcext:value-type="string">
            <text:p>Migh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mmer</text:p>
          </table:table-cell>
          <table:table-cell table:style-name="ce8" table:formula="of:=[.W92]*[.X92]*[.Y92]+1000" office:value-type="float" office:value="3625" calcext:value-type="float">
            <text:p>36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.80769230769231" calcext:value-type="float">
            <text:p>4.80769230769231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rit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Accuracy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Axe</text:p>
          </table:table-cell>
          <table:table-cell table:formula="of:=[.W93]*[.X93]*[.Y93]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onzeSword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Weigh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abarzin</text:p>
          </table:table-cell>
          <table:table-cell table:style-name="ce8" table:formula="of:=[.W94]*[.X94]*[.Y94]+1000" office:value-type="float" office:value="4000" calcext:value-type="float">
            <text:p>4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hortSword</text:p>
          </table:table-cell>
          <table:table-cell table:formula="of:=[.AC94]*[.AD94]*[.AE94]" office:value-type="float" office:value="933.333333333334" calcext:value-type="float">
            <text:p>933.3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Leve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ithrilAxe</text:p>
          </table:table-cell>
          <table:table-cell table:style-name="ce8" table:formula="of:=[.W95]*[.X95]*[.Y95]+1000" office:value-type="float" office:value="4533.65384615385" calcext:value-type="float">
            <text:p>4533.6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tar</text:p>
          </table:table-cell>
          <table:table-cell table:formula="of:=[.AC95]*[.AD95]*[.AE95]" office:value-type="float" office:value="897.435897435898" calcext:value-type="float">
            <text:p>897.435897435898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Durability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ullveig</text:p>
          </table:table-cell>
          <table:table-cell table:style-name="ce8" table:formula="of:=[.W96]*[.X96]*[.Y96]+1000" office:value-type="float" office:value="4197.11538461539" calcext:value-type="float">
            <text:p>4197.1153846153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word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B96]/[.AC96]/[.AD96]"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lear</text:p>
          </table:table-cell>
          <table:table-cell office:value-type="string" calcext:value-type="string">
            <text:p>Clear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jollnir</text:p>
          </table:table-cell>
          <table:table-cell table:formula="of:=[.W97]*[.X97]*[.Y97]" office:value-type="float" office:value="2625" calcext:value-type="float">
            <text:p>26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Edge</text:p>
          </table:table-cell>
          <table:table-cell table:formula="of:=[.AC97]*[.AD97]*[.AE97]" office:value-type="float" office:value="2133.33333333333" calcext:value-type="float">
            <text:p>2133.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axe</text:p>
          </table:table-cell>
          <table:table-cell table:style-name="ce8" table:formula="of:=[.W98]*[.X98]*[.Y98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oadSword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99]*[.X99]*[.Y99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ar+</text:p>
          </table:table-cell>
          <table:table-cell table:formula="of:=[.AC99]*[.AD99]*[.AE99]"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formula="of:=1.5*5" office:value-type="float" office:value="7.5" calcext:value-type="float">
            <text:p>7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ulverizer</text:p>
          </table:table-cell>
          <table:table-cell table:formula="of:=[.W100]*[.X100]*[.Y100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ingEdge</text:p>
          </table:table-cell>
          <table:table-cell table:style-name="ce8" table:formula="of:=[.AC100]*[.AD100]*[.AE100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onigswolf</text:p>
          </table:table-cell>
          <table:table-cell table:formula="of:=[.W101]*[.X101]*[.Y101]" office:value-type="float" office:value="0" calcext:value-type="float">
            <text:p>0</text:p>
          </table:table-cell>
          <table:table-cell table:number-columns-repeated="2"/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aber</text:p>
          </table:table-cell>
          <table:table-cell table:style-name="ce8" table:formula="of:=[.AC101]*[.AD101]*[.AE101]+1000" office:value-type="float" office:value="2615.38461538462" calcext:value-type="float">
            <text:p>2615.3846153846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+ effect is Might * 1.5</text:p>
          </table:table-cell>
          <table:covered-table-cell/>
          <table:table-cell table:style-name="Default"/>
          <table:table-cell table:number-columns-repeated="4"/>
          <table:table-cell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6000" calcext:value-type="float">
            <text:p>6000</text:p>
          </table:table-cell>
          <table:table-cell table:number-columns-repeated="2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huj</text:p>
          </table:table-cell>
          <table:table-cell table:style-name="ce8" table:formula="of:=[.W102]*[.X102]*[.Y102]+1000" office:value-type="float" office:value="4533.65384615385" calcext:value-type="float">
            <text:p>4533.65384615385</text:p>
          </table:table-cell>
          <table:table-cell office:value-type="float" office:value="35" calcext:value-type="float">
            <text:p>35</text:p>
          </table:table-cell>
          <table:table-cell table:formula="of:=1.5*14"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tiumSword</text:p>
          </table:table-cell>
          <table:table-cell table:formula="of:=[.AC102]*[.AD102]*[.AE102]" office:value-type="float" office:value="3400" calcext:value-type="float">
            <text:p>340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6" table:number-rows-spanned="1">
            <text:p>No stat change on killerweapon, just +1000 cost &amp; decreased durability</text:p>
          </table:table-cell>
          <table:covered-table-cell table:number-columns-repeated="5"/>
          <table:table-cell table:number-columns-repeated="2"/>
          <table:table-cell office:value-type="float" office:value="15" calcext:value-type="float">
            <text:p>15</text:p>
          </table:table-cell>
          <table:table-cell table:formula="of:=[.AR102]*[.AS101]/[.AR101]" office:value-type="float" office:value="3461.53846153846" calcext:value-type="float">
            <text:p>3461.53846153846</text:p>
          </table:table-cell>
          <table:table-cell table:number-columns-repeated="2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103]*[.X103]*[.Y103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evinSword</text:p>
          </table:table-cell>
          <table:table-cell table:formula="of:=[.AC103]*[.AD103]*[.AE103]" office:value-type="float" office:value="2800" calcext:value-type="float">
            <text:p>28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01" calcext:value-type="float">
            <text:p>101</text:p>
          </table:table-cell>
          <table:table-cell/>
          <table:table-cell table:style-name="Default"/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Axe</text:p>
          </table:table-cell>
          <table:table-cell table:formula="of:=[.W104]*[.X104]*[.Y104]" office:value-type="float" office:value="817.307692307693" calcext:value-type="float">
            <text:p>817.3076923076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Rapier</text:p>
          </table:table-cell>
          <table:table-cell table:style-name="ce8" table:formula="of:=[.AC104]*[.AD104]*[.AE104]+1000" office:value-type="float" office:value="3000" calcext:value-type="float">
            <text:p>30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/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Axe</text:p>
          </table:table-cell>
          <table:table-cell table:formula="of:=[.W105]*[.X105]*[.Y105]" office:value-type="float" office:value="576.923076923077" calcext:value-type="float">
            <text:p>576.92307692307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batross</text:p>
          </table:table-cell>
          <table:table-cell table:style-name="ce8" table:formula="of:=[.AC105]*[.AD105]*[.AE105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number-columns-repeated="2"/>
          <table:table-cell table:style-name="Default"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Axe</text:p>
          </table:table-cell>
          <table:table-cell table:formula="of:=[.W106]*[.X106]*[.Y106]" office:value-type="float" office:value="817.307692307693" calcext:value-type="float">
            <text:p>817.3076923076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HolySword</text:p>
          </table:table-cell>
          <table:table-cell table:formula="of:=[.AC106]*[.AD106]*[.AE106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cost 1000</text:p>
          </table:table-cell>
          <table:covered-table-cell/>
          <table:table-cell table:style-name="Default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float" office:value="3000" calcext:value-type="float">
            <text:p>3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V107]/[.W107]/[.X107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word</text:p>
          </table:table-cell>
          <table:table-cell table:style-name="ce8" table:formula="of:=[.AC107]*[.AD107]*[.AE107]+1000" office:value-type="float" office:value="4400" calcext:value-type="float">
            <text:p>44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21" calcext:value-type="float">
            <text:p>21</text:p>
          </table:table-cell>
          <table:table-cell/>
          <table:table-cell table:style-name="Default"/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KnightSword</text:p>
          </table:table-cell>
          <table:table-cell table:formula="of:=[.AC108]*[.AD108]*[.AE108]" office:value-type="float" office:value="3923.07692307692" calcext:value-type="float">
            <text:p>3923.07692307692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10"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7" calcext:value-type="float">
            <text:p>17</text:p>
          </table:table-cell>
          <table:table-cell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formula="of:=[.AP108]*[.AQ107]/[.AP107]" office:value-type="float" office:value="3" calcext:value-type="float">
            <text:p>3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Estoc</text:p>
          </table:table-cell>
          <table:table-cell table:style-name="ce8" table:formula="of:=[.AC109]*[.AD109]*[.AE109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ongBow</text:p>
          </table:table-cell>
          <table:table-cell table:formula="of:=[.W110]*[.X110]*[.Y110]" office:value-type="float" office:value="1379.5918367347" calcext:value-type="float">
            <text:p>1379.591836734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imhild</text:p>
          </table:table-cell>
          <table:table-cell table:style-name="ce8" table:formula="of:=[.AC110]*[.AD110]*[.AE110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onzeBow</text:p>
          </table:table-cell>
          <table:table-cell table:formula="of:=[.W111]*[.X111]*[.Y111]" office:value-type="float" office:value="668.57142857143" calcext:value-type="float">
            <text:p>668.5714285714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Harperia</text:p>
          </table:table-cell>
          <table:table-cell table:style-name="ce8" table:formula="of:=[.AC111]*[.AD111]*[.AE111]+1000" office:value-type="float" office:value="4530.76923076923" calcext:value-type="float">
            <text:p>4530.76923076923</text:p>
          </table:table-cell>
          <table:table-cell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is +8 Might</text:p>
          </table:table-cell>
          <table:covered-table-cell/>
          <table:table-cell table:number-columns-repeated="4"/>
          <table:table-cell office:value-type="float" office:value="6" calcext:value-type="float">
            <text:p>6</text:p>
          </table:table-cell>
          <table:table-cell table:formula="of:=[.AP111]*[.AQ110]/[.AP110]" office:value-type="float" office:value="40" calcext:value-type="float">
            <text:p>40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ortBow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FlameSword</text:p>
          </table:table-cell>
          <table:table-cell table:formula="of:=[.AC112]*[.AD112]*[.AE112]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iftBow</text:p>
          </table:table-cell>
          <table:table-cell table:style-name="ce8" table:formula="of:=[.W113]*[.X113]*[.Y113]" office:value-type="float" office:value="1002.85714285714" calcext:value-type="float">
            <text:p>1002.85714285714</text:p>
          </table:table-cell>
          <table:table-cell office:value-type="float" office:value="21" calcext:value-type="float">
            <text:p>21</text:p>
          </table:table-cell>
          <table:table-cell table:formula="of:=1.5*3" office:value-type="float" office:value="4.5" calcext:value-type="float">
            <text:p>4.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nfernalEdge</text:p>
          </table:table-cell>
          <table:table-cell table:formula="of:=[.AC113]*[.AD113]*[.AE113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9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ripleFireBow</text:p>
          </table:table-cell>
          <table:table-cell table:style-name="ce8" table:formula="of:=[.W114]*[.X114]*[.Y114]+1000" office:value-type="float" office:value="1668.57142857143" calcext:value-type="float">
            <text:p>1668.5714285714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olichemarde</text:p>
          </table:table-cell>
          <table:table-cell table:style-name="ce8" table:formula="of:=[.AC114]*[.AD114]*[.AE114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[.AE9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ompositeBow</text:p>
          </table:table-cell>
          <table:table-cell office:value-type="float" office:value="2600" calcext:value-type="float">
            <text:p>26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[.V115]/[.W115]/[.X115]"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</text:p>
          </table:table-cell>
          <table:table-cell table:style-name="ce8" table:formula="of:=[.AC115]*[.AD115]*[.AE115]+1000" office:value-type="float" office:value="4530.76923076923" calcext:value-type="float">
            <text:p>4530.7692307692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table:formula="of:=[.AE9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5" calcext:value-type="float">
            <text:p>5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ollyon</text:p>
          </table:table-cell>
          <table:table-cell table:style-name="ce8" table:formula="of:=[.W116]*[.X116]*[.Y116]+1000" office:value-type="float" office:value="5871.02040816327" calcext:value-type="float">
            <text:p>5871.02040816327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+</text:p>
          </table:table-cell>
          <table:table-cell table:style-name="ce8" table:formula="of:=[.AC116]*[.AD116]*[.AE116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table:formula="of:=1.5*13" office:value-type="float" office:value="19.5" calcext:value-type="float">
            <text:p>19.5</text:p>
          </table:table-cell>
          <table:table-cell table:formula="of:=[.AE99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>
            <text:p>7 might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rongbow</text:p>
          </table:table-cell>
          <table:table-cell table:formula="of:=[.W117]*[.X117]*[.Y117]" office:value-type="float" office:value="3342.85714285715" calcext:value-type="float">
            <text:p>3342.8571428571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Razeetoile</text:p>
          </table:table-cell>
          <table:table-cell table:style-name="ce8" table:formula="of:=[.AC117]*[.AD117]*[.AE117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5" calcext:value-type="float">
            <text:p>15</text:p>
          </table:table-cell>
          <table:table-cell table:formula="of:=[.AE10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might</text:p>
          </table:table-cell>
          <table:table-cell table:style-name="Default" office:value-type="string" calcext:value-type="string">
            <text:p>weight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90/6.666667" office:value-type="float" office:value="13.499999325" calcext:value-type="float">
            <text:p>13.4999993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Bow</text:p>
          </table:table-cell>
          <table:table-cell table:formula="of:=[.W118]*[.X118]*[.Y118]" office:value-type="float" office:value="4085.71428571429" calcext:value-type="float">
            <text:p>4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LadySword</text:p>
          </table:table-cell>
          <table:table-cell table:style-name="ce8" table:formula="of:=[.AC118]*[.AD118]*[.AE118]+1000" office:value-type="float" office:value="2733.33333333333" calcext:value-type="float">
            <text:p>2733.3333333333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3" calcext:value-type="float">
            <text:p>13</text:p>
          </table:table-cell>
          <table:table-cell table:formula="of:=[.AE101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70/6.6667" office:value-type="float" office:value="10.4999475002625" calcext:value-type="float">
            <text:p>10.49994750026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Bow</text:p>
          </table:table-cell>
          <table:table-cell table:style-name="ce8" table:formula="of:=[.W119]*[.X119]*[.Y119]+1000" office:value-type="float" office:value="5138.77551020408" calcext:value-type="float">
            <text:p>5138.7755102040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am</text:p>
          </table:table-cell>
          <table:table-cell table:style-name="ce8" table:formula="of:=[.AC119]*[.AD119]*[.AE119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9.5" calcext:value-type="float">
            <text:p>19.5</text:p>
          </table:table-cell>
          <table:table-cell table:formula="of:=[.AE102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formula="of:=43/6.66667" office:value-type="float" office:value="6.44999677500161" calcext:value-type="float">
            <text:p>6.44999677500161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eiron</text:p>
          </table:table-cell>
          <table:table-cell table:style-name="ce8" table:formula="of:=[.W120]*[.X120]*[.Y120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Nothung</text:p>
          </table:table-cell>
          <table:table-cell table:style-name="ce8" table:formula="of:=[.AC120]*[.AD120]*[.AE120]+1000" office:value-type="float" office:value="6333.33333333334" calcext:value-type="float">
            <text:p>6333.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[.AE103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/>
          <table:table-cell table:formula="of:=33/6.6667" office:value-type="float" office:value="4.94997525012375" calcext:value-type="float">
            <text:p>4.9499752501237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ossWeisse</text:p>
          </table:table-cell>
          <table:table-cell table:style-name="ce8" table:formula="of:=[.W121]*[.X121]*[.Y121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erianSword</text:p>
          </table:table-cell>
          <table:table-cell table:formula="of:=[.AC121]*[.AD121]*[.AE121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E104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 table:number-columns-spanned="6" table:number-rows-spanned="1">
            <text:p>Crit weapon= Might/2 is converted to crit, 15 Might = 1 Might + 14/2*6.666667 Crit</text:p>
          </table:table-cell>
          <table:covered-table-cell table:number-columns-repeated="5"/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ascanion</text:p>
          </table:table-cell>
          <table:table-cell table:style-name="ce8" table:formula="of:=[.W122]*[.X122]*[.Y122]+1000+1000" office:value-type="float" office:value="6085.71428571429" calcext:value-type="float">
            <text:p>6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OldImpSword</text:p>
          </table:table-cell>
          <table:table-cell table:formula="of:=[.AC122]*[.AD122]*[.AE122]" office:value-type="float" office:value="610.256410256411" calcext:value-type="float">
            <text:p>610.2564102564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AE105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reniaBow</text:p>
          </table:table-cell>
          <table:table-cell table:style-name="ce8" table:formula="of:=[.W123]*[.X123]*[.Y123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mperial Sword</text:p>
          </table:table-cell>
          <table:table-cell table:formula="of:=[.AC123]*[.AD123]*[.AE123]" office:value-type="float" office:value="969.23076923077" calcext:value-type="float">
            <text:p>96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AE10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10*6.6667" office:value-type="float" office:value="66.667" calcext:value-type="float">
            <text:p>66.667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formula="of:=[.W124]*[.X124]*[.Y124]" office:value-type="float" office:value="1379.5918367347" calcext:value-type="float">
            <text:p>1379.591836734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ajra</text:p>
          </table:table-cell>
          <table:table-cell table:formula="of:=[.AC124]*[.AD124]*[.AE124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5" calcext:value-type="float">
            <text:p>15</text:p>
          </table:table-cell>
          <table:table-cell table:formula="of:=[.AJ124]*[.AK123]/[.AJ123]" office:value-type="float" office:value="28.6363636363636" calcext:value-type="float">
            <text:p>28.6363636363636</text:p>
          </table:table-cell>
          <table:table-cell/>
          <table:table-cell table:formula="of:=5*6.66667" office:value-type="float" office:value="33.33335" calcext:value-type="float">
            <text:p>33.33335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formula="of:=[.W125]*[.X125]*[.Y125]" office:value-type="float" office:value="541.224489795919" calcext:value-type="float">
            <text:p>541.2244897959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ritra</text:p>
          </table:table-cell>
          <table:table-cell table:formula="of:=[.AC125]*[.AD125]*[.AE125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/>
          <table:table-cell table:formula="of:=[.AK124]-13.499999325" office:value-type="float" office:value="15.1363643113636" calcext:value-type="float">
            <text:p>15.1363643113636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formula="of:=[.W126]*[.X126]*[.Y126]" office:value-type="float" office:value="1114.28571428572" calcext:value-type="float">
            <text:p>1114.2857142857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BastardSword</text:p>
          </table:table-cell>
          <table:table-cell table:style-name="ce8" table:formula="of:=[.AC126]*[.AD126]*[.AE126]+1000" office:value-type="float" office:value="4769.23076923077" calcext:value-type="float">
            <text:p>4769.2307692307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AE109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Rapier effect cost 10 might</text:p>
          </table:table-cell>
          <table:table-cell table:style-name="Default" table:number-columns-repeated="2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formula="of:=[.W127]*[.X127]*[.Y127]" office:value-type="float" office:value="827.755102040818" calcext:value-type="float">
            <text:p>827.7551020408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ShamShir</text:p>
          </table:table-cell>
          <table:table-cell table:formula="of:=[.AC127]*[.AD127]*[.AE127]" office:value-type="float" office:value="3589.74358974359" calcext:value-type="float">
            <text:p>3589.7435897435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E11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Zanbato effect cost 20 might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Zanbato</text:p>
          </table:table-cell>
          <table:table-cell table:style-name="ce8" table:formula="of:=[.AC128]*[.AD128]*[.AE128]+1000" office:value-type="float" office:value="4333.33333333334" calcext:value-type="float">
            <text:p>4333.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E111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formula="of:=[.AJ128]*[.AK127]/[.AJ127]" office:value-type="float" office:value="2.25" calcext:value-type="float">
            <text:p>2.2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1"/>
          <table:table-cell table:style-name="Default" table:number-columns-repeated="4"/>
          <table:table-cell/>
          <table:table-cell office:value-type="string" calcext:value-type="string">
            <text:p>Adrastia</text:p>
          </table:table-cell>
          <table:table-cell table:style-name="ce8" table:formula="of:=[.AC129]*[.AD129]*[.AE129]+1000" office:value-type="float" office:value="5487.17948717949" calcext:value-type="float">
            <text:p>5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2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Balmung</text:p>
          </table:table-cell>
          <table:table-cell table:style-name="ce8" table:formula="of:=[.AC130]*[.AD130]*[.AE130]+1000" office:value-type="float" office:value="6384.61538461538" calcext:value-type="float">
            <text:p>6384.615384615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[.AE113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Crossbow</text:p>
          </table:table-cell>
          <table:table-cell table:style-name="ce20" table:formula="of:=[.W131]*[.X131]*[.Y131]" office:value-type="float" office:value="1428.57142857143" calcext:value-type="float">
            <text:p>1428.5714285714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BrymRanger</text:p>
          </table:table-cell>
          <table:table-cell table:formula="of:=[.AC131]*[.AD131]*[.AE131]" office:value-type="float" office:value="10003.8461538462" calcext:value-type="float">
            <text:p>10003.8461538462</text:p>
          </table:table-cell>
          <table:table-cell office:value-type="float" office:value="51" calcext:value-type="float">
            <text:p>51</text:p>
          </table:table-cell>
          <table:table-cell table:formula="of:=2.25*17" office:value-type="float" office:value="38.25" calcext:value-type="float">
            <text:p>38.25</text:p>
          </table:table-cell>
          <table:table-cell table:formula="of:=[.AE114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6" calcext:value-type="float">
            <text:p>36</text:p>
          </table:table-cell>
          <table:table-cell table:formula="of:=[.AJ131]*[.AK130]/[.AJ130]" office:value-type="float" office:value="18.8571428571429" calcext:value-type="float">
            <text:p>18.8571428571429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wGun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ZweiHander</text:p>
          </table:table-cell>
          <table:table-cell table:style-name="ce8" table:formula="of:=[.AC132]*[.AD132]*[.AE132]+1000" office:value-type="float" office:value="7730.76923076923" calcext:value-type="float">
            <text:p>7730.76923076923</text:p>
          </table:table-cell>
          <table:table-cell office:value-type="float" office:value="35" calcext:value-type="float">
            <text:p>35</text:p>
          </table:table-cell>
          <table:table-cell table:formula="of:=25*1.5" office:value-type="float" office:value="37.5" calcext:value-type="float">
            <text:p>37.5</text:p>
          </table:table-cell>
          <table:table-cell table:formula="of:=[.AE115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astraphetes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1" calcext:value-type="float">
            <text:p>21</text:p>
          </table:table-cell>
          <table:table-cell table:formula="of:=[.V133]/[.W133]/[.X133]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GreatSw</text:p>
          </table:table-cell>
          <table:table-cell table:style-name="ce8" table:formula="of:=[.AC133]*[.AD133]*[.AE133]" office:value-type="float" office:value="4487.17948717949" calcext:value-type="float">
            <text:p>4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eavyCrossbow</text:p>
          </table:table-cell>
          <table:table-cell table:style-name="ce20" table:formula="of:=[.W134]*[.X134]*[.Y134]" office:value-type="float" office:value="2571.42857142857" calcext:value-type="float">
            <text:p>2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5"/>
          <table:table-cell table:formula="of:=90/6.666667" office:value-type="float" office:value="13.499999325" calcext:value-type="float">
            <text:p>13.499999325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aveCrossbow</text:p>
          </table:table-cell>
          <table:table-cell table:style-name="ce20" table:formula="of:=[.W135]*[.X135]*[.Y135]" office:value-type="float" office:value="4615.38461538462" calcext:value-type="float">
            <text:p>4615.38461538462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8*2" office:value-type="float" office:value="36" calcext:value-type="float">
            <text:p>36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huKoNu</text:p>
          </table:table-cell>
          <table:table-cell table:style-name="ce20" table:formula="of:=[.W136]*[.X136]*[.Y136]" office:value-type="float" office:value="6153.84615384615" calcext:value-type="float">
            <text:p>6153.84615384615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2*4" office:value-type="float" office:value="48" calcext:value-type="float">
            <text:p>48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rbalest</text:p>
          </table:table-cell>
          <table:table-cell table:style-name="ce20" table:formula="of:=[.W137]*[.X137]*[.Y137]" office:value-type="float" office:value="3142.85714285714" calcext:value-type="float">
            <text:p>3142.8571428571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table:formula="of:=27/2" office:value-type="float" office:value="13.5" calcext:value-type="float">
            <text:p>13.5</text:p>
          </table:table-cell>
          <table:table-cell table:formula="of:=[.AA137]*[.AB136]/[.AA136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AC137]*[.AD136]/[.AC136]" office:value-type="float" office:value="20" calcext:value-type="float">
            <text:p>2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Crossbow</text:p>
          </table:table-cell>
          <table:table-cell table:style-name="ce20" table:formula="of:=[.W138]*[.X138]*[.Y138]+1000" office:value-type="float" office:value="3571.42857142857" calcext:value-type="float">
            <text:p>3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2"/>
          <table:table-cell table:formula="of:=+[.AB137]+[.AD137]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lerus</text:p>
          </table:table-cell>
          <table:table-cell table:style-name="ce8" table:formula="of:=[.W139]*[.X139]*[.Y139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AC139]*[.AD138]/[.AC138]" office:value-type="float" office:value="13.3333333333333" calcext:value-type="float">
            <text:p>13.3333333333333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apidCrossbow</text:p>
          </table:table-cell>
          <table:table-cell table:style-name="ce8" table:formula="of:=[.W140]*[.X140]*[.Y140]+1000" office:value-type="float" office:value="14450.5494505495" calcext:value-type="float">
            <text:p>14450.5494505495</text:p>
          </table:table-cell>
          <table:table-cell table:style-name="ce20" office:value-type="float" office:value="51" calcext:value-type="float">
            <text:p>51</text:p>
          </table:table-cell>
          <table:table-cell table:style-name="ce20" table:formula="of:=18*4" office:value-type="float" office:value="72" calcext:value-type="float">
            <text:p>72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wkeye</text:p>
          </table:table-cell>
          <table:table-cell table:style-name="ce8" table:formula="of:=[.W141]*[.X141]*[.Y141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Crossbow</text:p>
          </table:table-cell>
          <table:table-cell table:style-name="ce20" table:formula="of:=[.W142]*[.X142]*[.Y142]" office:value-type="float" office:value="1428.57142857143" calcext:value-type="float">
            <text:p>1428.57142857143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Crossbow</text:p>
          </table:table-cell>
          <table:table-cell table:style-name="ce20" table:formula="of:=[.W143]*[.X143]*[.Y143]" office:value-type="float" office:value="684.981684981685" calcext:value-type="float">
            <text:p>684.98168498168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Crossbow</text:p>
          </table:table-cell>
          <table:table-cell table:style-name="ce20" table:formula="of:=[.W144]*[.X144]*[.Y144]" office:value-type="float" office:value="846.153846153846" calcext:value-type="float">
            <text:p>846.15384615384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style-name="ce20" table:formula="of:=[.W145]*[.X145]*[.Y145]" office:value-type="float" office:value="476.190476190476" calcext:value-type="float">
            <text:p>476.19047619047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style-name="ce20" table:formula="of:=[.W146]*[.X146]*[.Y146]" office:value-type="float" office:value="186.813186813187" calcext:value-type="float">
            <text:p>186.81318681318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style-name="ce20" table:formula="of:=[.W147]*[.X147]*[.Y147]" office:value-type="float" office:value="384.615384615385" calcext:value-type="float">
            <text:p>384.61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style-name="ce20" table:formula="of:=[.W148]*[.X148]*[.Y148]" office:value-type="float" office:value="95.2380952380952" calcext:value-type="float">
            <text:p>95.238095238095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gger</text:p>
          </table:table-cell>
          <table:table-cell table:style-name="ce20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V152]/[.W152]/[.X152]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etter Oponer</text:p>
          </table:table-cell>
          <table:table-cell table:style-name="ce20" table:formula="of:=[.W153]*[.X153]*[.Y153]" office:value-type="float" office:value="196.153846153846" calcext:value-type="float">
            <text:p>196.15384615384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 Knife</text:p>
          </table:table-cell>
          <table:table-cell table:style-name="ce8" table:formula="of:=[.W154]*[.X154]*[.Y154]+1000" office:value-type="float" office:value="1196.15384615385" calcext:value-type="float">
            <text:p>1196.153846153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rt</text:p>
          </table:table-cell>
          <table:table-cell table:style-name="ce20" table:formula="of:=[.W155]*[.X155]*[.Y155]" office:value-type="float" office:value="923.076923076923" calcext:value-type="float">
            <text:p>923.0769230769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ir Knife</text:p>
          </table:table-cell>
          <table:table-cell table:style-name="ce20" table:formula="of:=[.W156]*[.X156]*[.Y156]" office:value-type="float" office:value="2942.30769230768" calcext:value-type="float">
            <text:p>2942.3076923076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iefsKnife</text:p>
          </table:table-cell>
          <table:table-cell table:style-name="ce8" table:formula="of:=[.W157]*[.X157]*[.Y157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ax</text:p>
          </table:table-cell>
          <table:table-cell table:style-name="ce20" table:formula="of:=[.W158]*[.X158]*[.Y158]" office:value-type="float" office:value="1800" calcext:value-type="float">
            <text:p>1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armwenhau</text:p>
          </table:table-cell>
          <table:table-cell table:style-name="ce8" table:formula="of:=[.W159]*[.X159]*[.Y159]+1000" office:value-type="float" office:value="4634.61538461539" calcext:value-type="float">
            <text:p>4634.61538461539</text:p>
          </table:table-cell>
          <table:table-cell office:value-type="float" office:value="35" calcext:value-type="float">
            <text:p>35</text:p>
          </table:table-cell>
          <table:table-cell table:formula="of:=6*1.5" office:value-type="float" office:value="9" calcext:value-type="float">
            <text:p>9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unKnife</text:p>
          </table:table-cell>
          <table:table-cell table:style-name="ce8" table:formula="of:=[.W160]*[.X160]*[.Y160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Knife</text:p>
          </table:table-cell>
          <table:table-cell table:style-name="ce8" table:formula="of:=[.W161]*[.X161]*[.Y161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loodKnife</text:p>
          </table:table-cell>
          <table:table-cell table:style-name="ce8" table:formula="of:=[.W162]*[.X162]*[.Y162]+1000" office:value-type="float" office:value="3999.99999999999" calcext:value-type="float">
            <text:p>3999.9999999999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spa</text:p>
          </table:table-cell>
          <table:table-cell table:style-name="ce20" table:formula="of:=[.W163]*[.X163]*[.Y163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empestKnife</text:p>
          </table:table-cell>
          <table:table-cell table:style-name="ce8" table:formula="of:=[.W164]*[.X164]*[.Y164]" office:value-type="float" office:value="8076.92307692305" calcext:value-type="float">
            <text:p>8076.9230769230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knife</text:p>
          </table:table-cell>
          <table:table-cell table:style-name="ce8" table:formula="of:=[.W165]*[.X165]*[.Y165]+1000" office:value-type="float" office:value="4600" calcext:value-type="float">
            <text:p>46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talus</text:p>
          </table:table-cell>
          <table:table-cell table:style-name="ce8" table:formula="of:=[.W166]*[.X166]*[.Y166]+1000" office:value-type="float" office:value="5846.15384615385" calcext:value-type="float">
            <text:p>5846.1538461538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ris</text:p>
          </table:table-cell>
          <table:table-cell table:style-name="ce8" table:formula="of:=[.W167]*[.X167]*[.Y167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ainGauche</text:p>
          </table:table-cell>
          <table:table-cell table:style-name="ce8" table:formula="of:=[.W168]*[.X168]*[.Y168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rowningKnife</text:p>
          </table:table-cell>
          <table:table-cell table:style-name="ce8" table:formula="of:=[.W169]*[.X169]*[.Y169]+1000" office:value-type="float" office:value="3423.07692307692" calcext:value-type="float">
            <text:p>3423.0769230769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ordbreaker</text:p>
          </table:table-cell>
          <table:table-cell table:style-name="ce8" table:formula="of:=[.W170]*[.X170]*[.Y170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isonKnife</text:p>
          </table:table-cell>
          <table:table-cell table:style-name="ce20" table:formula="of:=[.W171]*[.X171]*[.Y171]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leepKnife</text:p>
          </table:table-cell>
          <table:table-cell table:style-name="ce20" table:formula="of:=[.W172]*[.X172]*[.Y172]" office:value-type="float" office:value="392.307692307692" calcext:value-type="float">
            <text:p>392.30769230769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ssassinKnife</text:p>
          </table:table-cell>
          <table:table-cell table:style-name="ce8" table:formula="of:=[.W173]*[.X173]*[.Y173]+2000" office:value-type="float" office:value="4076.92307692308" calcext:value-type="float">
            <text:p>4076.9230769230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4"/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104840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</table:table>
      <table:table table:name="Sheet2" table:style-name="ta1" table:print-ranges="Sheet2.G158:Sheet2.K179">
        <office:forms form:automatic-focus="false" form:apply-design-mode="false"/>
        <table:table-column table:style-name="co2" table:default-cell-style-name="ce31"/>
        <table:table-column table:style-name="co3" table:default-cell-style-name="ce31"/>
        <table:table-column table:style-name="co1" table:number-columns-repeated="8" table:default-cell-style-name="ce31"/>
        <table:table-column table:style-name="co1" table:default-cell-style-name="ce39"/>
        <table:table-column table:style-name="co4" table:default-cell-style-name="Default"/>
        <table:table-column table:style-name="co1" table:number-columns-repeated="2" table:default-cell-style-name="ce31"/>
        <table:table-column table:style-name="co1" table:number-columns-repeated="18" table:default-cell-style-name="Default"/>
        <table:table-row table:style-name="ro1" table:number-rows-repeated="6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Elber</text:p>
          </table:table-cell>
          <table:table-cell table:style-name="Default" table:number-columns-repeated="2"/>
          <table:table-cell table:style-name="Default" office:value-type="string" calcext:value-type="string">
            <text:p>Marcel</text:p>
          </table:table-cell>
          <table:table-cell table:style-name="Default"/>
          <table:table-cell table:style-name="Default" office:value-type="string" calcext:value-type="string">
            <text:p>Derr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H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formula="of:=[.C8]+[.D8]" office:value-type="float" office:value="35" calcext:value-type="float">
            <text:p>3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trengh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[.C9]+[.D9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Def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C10]+[.D10]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pe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formula="of:=[.C11]+[.D11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Mag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C12]+[.D12]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office:value-type="string" calcext:value-type="string">
            <text:p>Ruby</text:p>
          </table:table-cell>
          <table:table-cell table:style-name="Default" table:number-columns-repeated="5"/>
          <table:table-cell table:style-name="Default" office:value-type="string" calcext:value-type="string">
            <text:p>Alvina</text:p>
          </table:table-cell>
          <table:table-cell table:style-name="Default"/>
          <table:table-cell table:style-name="Default" office:value-type="string" calcext:value-type="string">
            <text:p>Daoud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formula="of:=[.E15]+[.C15]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3" office:value-type="float" office:value="3.3" calcext:value-type="float">
            <text:p>3.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6]+[.C16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7]+[.C17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11*0.4" office:value-type="float" office:value="4.4" calcext:value-type="float">
            <text:p>4.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E18]+[.C18]"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E19]+[.C19]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1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herlock</text:p>
          </table:table-cell>
          <table:table-cell office:value-type="float" office:value="3" calcext:value-type="float">
            <text:p>3</text:p>
          </table:table-cell>
          <table:table-cell table:style-name="ce33" table:formula="of:=SUM([.H32:.H36])*100" office:value-type="float" office:value="100" calcext:value-type="float">
            <text:p>100</text:p>
          </table:table-cell>
          <table:table-cell table:style-name="ce34" office:value-type="float" office:value="15" calcext:value-type="float">
            <text:p>1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formula="of:=[.C32]+[.F32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31]-[.G31])*[.H32]+[.G32]+[.F32]" office:value-type="float" office:value="30.8" calcext:value-type="float">
            <text:p>30.8</text:p>
          </table:table-cell>
          <table:table-cell table:style-name="Default" table:number-columns-repeated="2"/>
          <table:table-cell/>
          <table:table-cell table:formula="of:=[.I32]+[.C32]" office:value-type="float" office:value="30.8" calcext:value-type="float">
            <text:p>3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3]+[.F3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31]-[.G31])*[.H33]+[.G33]+[.F33]" office:value-type="float" office:value="10.8" calcext:value-type="float">
            <text:p>10.8</text:p>
          </table:table-cell>
          <table:table-cell table:style-name="Default" table:number-columns-repeated="2"/>
          <table:table-cell/>
          <table:table-cell table:formula="of:=[.I33]+[.C33]" office:value-type="float" office:value="10.8" calcext:value-type="float">
            <text:p>1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4]+[.F34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31]-[.G31])*[.H34]+[.G34]+[.F34]" office:value-type="float" office:value="3.6" calcext:value-type="float">
            <text:p>3.6</text:p>
          </table:table-cell>
          <table:table-cell table:style-name="Default" table:number-columns-repeated="2"/>
          <table:table-cell/>
          <table:table-cell table:formula="of:=[.I34]+[.C34]" office:value-type="float" office:value="3.6" calcext:value-type="float">
            <text:p>3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5]+[.F35]" office:value-type="float" office:value="10" calcext:value-type="float">
            <text:p>10</text:p>
          </table:table-cell>
          <table:table-cell office:value-type="string" calcext:value-type="string">
            <text:p>Spee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31]-[.G31])*[.H35]+[.G35]+[.F35]" office:value-type="float" office:value="17.8" calcext:value-type="float">
            <text:p>17.8</text:p>
          </table:table-cell>
          <table:table-cell table:style-name="Default" table:number-columns-repeated="2"/>
          <table:table-cell/>
          <table:table-cell table:formula="of:=[.I35]+[.C35]" office:value-type="float" office:value="17.8" calcext:value-type="float">
            <text:p>17.8</text:p>
          </table:table-cell>
          <table:table-cell table:style-name="Default"/>
          <table:table-cell table:number-columns-repeated="12"/>
          <table:table-cell office:value-type="string" calcext:value-type="string">
            <text:p>Cri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Reference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formula="of:=SUM([.C32:.C35])" office:value-type="float" office:value="0" calcext:value-type="float">
            <text:p>0</text:p>
          </table:table-cell>
          <table:table-cell table:formula="of:=SUM([.D32:.D35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31]-[.G31])*[.H36]+[.G36]+[.F36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formula="of:=SUM([.M32:.M35])" office:value-type="float" office:value="63" calcext:value-type="float">
            <text:p>63</text:p>
          </table:table-cell>
          <table:table-cell table:style-name="Default"/>
          <table:table-cell table:number-columns-repeated="11"/>
          <table:table-cell office:value-type="string" calcext:value-type="string">
            <text:p>KillerArrow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thrilArrow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string" calcext:value-type="string">
            <text:p>Christine</text:p>
          </table:table-cell>
          <table:table-cell office:value-type="float" office:value="1" calcext:value-type="float">
            <text:p>1</text:p>
          </table:table-cell>
          <table:table-cell table:style-name="ce33" table:formula="of:=SUM([.H38:.H4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/>
          <table:table-cell table:style-name="ce31"/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our 100 damage</text:p>
          </table:table-cell>
          <table:table-cell table:number-columns-repeated="5"/>
          <table:table-cell office:value-type="string" calcext:value-type="string">
            <text:p>KillingEdge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</text:p>
          </table:table-cell>
          <table:table-cell office:value-type="string" calcext:value-type="string">
            <text:p>MithrilSword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38]+[.F38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37]-[.G37])*[.H38]+[.G38]+[.F38]" office:value-type="float" office:value="29.5" calcext:value-type="float">
            <text:p>29.5</text:p>
          </table:table-cell>
          <table:table-cell table:style-name="ce34"/>
          <table:table-cell table:style-name="ce36"/>
          <table:table-cell table:style-name="ce31"/>
          <table:table-cell table:formula="of:=[.I38]+[.C38]" office:value-type="float" office:value="31.5" calcext:value-type="float">
            <text:p>31.5</text:p>
          </table:table-cell>
          <table:table-cell table:number-columns-repeated="2"/>
          <table:table-cell office:value-type="string" calcext:value-type="string">
            <text:p>Rapi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100*[.R38]/[.S38]" office:value-type="float" office:value="7.69230769230769" calcext:value-type="float">
            <text:p>7.69230769230769</text:p>
          </table:table-cell>
          <table:table-cell table:number-columns-repeated="5"/>
          <table:table-cell office:value-type="string" calcext:value-type="string">
            <text:p>KillerKnife</text:p>
          </table:table-cell>
          <table:table-cell table:formula="of:=6*[.S4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ax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9]+[.F39]" office:value-type="float" office:value="3" calcext:value-type="float">
            <text:p>3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([.I37]-[.G37])*[.H39]+[.G39]+[.F39]" office:value-type="float" office:value="6.1" calcext:value-type="float">
            <text:p>6.1</text:p>
          </table:table-cell>
          <table:table-cell table:style-name="ce34"/>
          <table:table-cell table:style-name="ce36"/>
          <table:table-cell table:style-name="ce31"/>
          <table:table-cell table:formula="of:=[.I39]+[.C39]" office:value-type="float" office:value="6.1" calcext:value-type="float">
            <text:p>6.1</text:p>
          </table:table-cell>
          <table:table-cell table:number-columns-repeated="2"/>
          <table:table-cell office:value-type="string" calcext:value-type="string">
            <text:p>Killing Edge</text:p>
          </table:table-cell>
          <table:table-cell office:value-type="float" office:value="90" calcext:value-type="float">
            <text:p>90</text:p>
          </table:table-cell>
          <table:table-cell table:formula="of:=100/[.Q39]" office:value-type="float" office:value="1.11111111111111" calcext:value-type="float">
            <text:p>1.11111111111111</text:p>
          </table:table-cell>
          <table:table-cell office:value-type="float" office:value="15" calcext:value-type="float">
            <text:p>15</text:p>
          </table:table-cell>
          <table:table-cell table:formula="of:=100*[.R39]/[.S39]" office:value-type="float" office:value="7.40740740740741" calcext:value-type="float">
            <text:p>7.40740740740741</text:p>
          </table:table-cell>
          <table:table-cell table:number-columns-repeated="5"/>
          <table:table-cell office:value-type="string" calcext:value-type="string">
            <text:p>AssassinKnife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crit = 2 att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40]+[.F40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37]-[.G37])*[.H40]+[.G40]+[.F40]" office:value-type="float" office:value="7.8" calcext:value-type="float">
            <text:p>7.8</text:p>
          </table:table-cell>
          <table:table-cell table:style-name="ce34"/>
          <table:table-cell table:style-name="ce36"/>
          <table:table-cell table:style-name="ce31"/>
          <table:table-cell table:formula="of:=[.I40]+[.C40]" office:value-type="float" office:value="8.8" calcext:value-type="float">
            <text:p>8.8</text:p>
          </table:table-cell>
          <table:table-cell table:number-columns-repeated="8"/>
          <table:table-cell office:value-type="string" calcext:value-type="string">
            <text:p>Killerarrow</text:p>
          </table:table-cell>
          <table:table-cell table:number-columns-repeated="3"/>
          <table:table-cell office:value-type="string" calcext:value-type="string">
            <text:p>KillerCrossbow</text:p>
          </table:table-cell>
          <table:table-cell office:value-type="float" office:value="90" calcext:value-type="float">
            <text:p>90</text:p>
          </table:table-cell>
          <table:table-cell table:formula="of:=33-13.5" office:value-type="float" office:value="19.5" calcext:value-type="float">
            <text:p>19.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formula="of:=[.C41]+[.F41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37]-[.G37])*[.H41]+[.G41]+[.F41]" office:value-type="float" office:value="14.6" calcext:value-type="float">
            <text:p>14.6</text:p>
          </table:table-cell>
          <table:table-cell table:style-name="ce34"/>
          <table:table-cell table:style-name="ce36"/>
          <table:table-cell table:style-name="ce31"/>
          <table:table-cell table:formula="of:=[.I41]+[.C41]" office:value-type="float" office:value="21.6" calcext:value-type="float">
            <text:p>21.6</text:p>
          </table:table-cell>
          <table:table-cell table:number-columns-repeated="8"/>
          <table:table-cell office:value-type="string" calcext:value-type="string">
            <text:p>at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KillerBow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formula="of:=SUM([.C38:.C41])" office:value-type="float" office:value="10" calcext:value-type="float">
            <text:p>10</text:p>
          </table:table-cell>
          <table:table-cell table:formula="of:=SUM([.D38:.D4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I37]-[.G37])*[.H42]+[.G42]+[.F42]" office:value-type="float" office:value="1" calcext:value-type="float">
            <text:p>1</text:p>
          </table:table-cell>
          <table:table-cell table:style-name="ce34"/>
          <table:table-cell table:style-name="ce31" table:number-columns-repeated="2"/>
          <table:table-cell table:formula="of:=SUM([.M38:.M41])" office:value-type="float" office:value="68" calcext:value-type="float">
            <text:p>68</text:p>
          </table:table-cell>
          <table:table-cell table:number-columns-repeated="8"/>
          <table:table-cell office:value-type="string" calcext:value-type="string">
            <text:p>crit</text:p>
          </table:table-cell>
          <table:table-cell table:formula="of:=67" office:value-type="float" office:value="67" calcext:value-type="float">
            <text:p>67</text:p>
          </table:table-cell>
          <table:table-cell table:formula="of:=13*[.S47]" office:value-type="float" office:value="86.6666666666667" calcext:value-type="float">
            <text:p>86.6666666666667</text:p>
          </table:table-cell>
          <table:table-cell table:formula="of:=14*[.S47]" office:value-type="float" office:value="93.3333333333333" calcext:value-type="float">
            <text:p>93.333333333333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office:value-type="string" calcext:value-type="string">
            <text:p>Sylvis</text:p>
          </table:table-cell>
          <table:table-cell office:value-type="float" office:value="3" calcext:value-type="float">
            <text:p>3</text:p>
          </table:table-cell>
          <table:table-cell table:style-name="ce33" table:formula="of:=SUM([.H44:.H4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31" table:number-columns-repeated="2"/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7.2" office:value-type="float" office:value="7.2" calcext:value-type="float">
            <text:p>7.2</text:p>
          </table:table-cell>
          <table:table-cell table:number-columns-repeated="2"/>
          <table:table-cell office:value-type="string" calcext:value-type="string">
            <text:p>att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C44]+[.F4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43]-[.G43])*[.H44]+[.G44]+[.F44]" office:value-type="float" office:value="27.8" calcext:value-type="float">
            <text:p>27.8</text:p>
          </table:table-cell>
          <table:table-cell office:value-type="float" office:value="28" calcext:value-type="float">
            <text:p>28</text:p>
          </table:table-cell>
          <table:table-cell table:style-name="ce36" table:formula="of:=[.J44]-[.E38]" office:value-type="string" office:string-value="" calcext:value-type="error">
            <text:p>#VALUE!</text:p>
          </table:table-cell>
          <table:table-cell table:style-name="ce31" table:formula="of:=[.J44]-[.J38]" office:value-type="float" office:value="28" calcext:value-type="float">
            <text:p>28</text:p>
          </table:table-cell>
          <table:table-cell table:formula="of:=[.I44]+[.C44]" office:value-type="float" office:value="27.8" calcext:value-type="float">
            <text:p>27.8</text:p>
          </table:table-cell>
          <table:table-cell table:number-columns-repeated="2"/>
          <table:table-cell table:formula="of:=14*[.S47]" office:value-type="float" office:value="93.3333333333333" calcext:value-type="float">
            <text:p>93.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killerbow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AE44]*6.66666666666667" office:value-type="float" office:value="6.66666666666667" calcext:value-type="float">
            <text:p>6.6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5]+[.F45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5]+[.G45]+[.F45]"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style-name="ce36" table:formula="of:=[.J45]-[.E39]" office:value-type="string" office:string-value="" calcext:value-type="error">
            <text:p>#VALUE!</text:p>
          </table:table-cell>
          <table:table-cell table:style-name="ce31" table:formula="of:=[.J45]-[.J39]" office:value-type="float" office:value="11" calcext:value-type="float">
            <text:p>11</text:p>
          </table:table-cell>
          <table:table-cell table:formula="of:=[.I45]+[.C45]" office:value-type="float" office:value="12.8" calcext:value-type="float">
            <text:p>12.8</text:p>
          </table:table-cell>
          <table:table-cell table:number-columns-repeated="9"/>
          <table:table-cell table:formula="of:=10*[.S47]" office:value-type="float" office:value="66.6666666666667" calcext:value-type="float">
            <text:p>66.666666666666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[.AE45]*6.66666666666667" office:value-type="float" office:value="13.3333333333333" calcext:value-type="float">
            <text:p>13.333333333333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6]+[.F46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43]-[.G43])*[.H46]+[.G46]+[.F46]"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style-name="ce36" table:formula="of:=[.J46]-[.E40]" office:value-type="string" office:string-value="" calcext:value-type="error">
            <text:p>#VALUE!</text:p>
          </table:table-cell>
          <table:table-cell table:style-name="ce31" table:formula="of:=[.J46]-[.J40]" office:value-type="float" office:value="2" calcext:value-type="float">
            <text:p>2</text:p>
          </table:table-cell>
          <table:table-cell table:formula="of:=[.I46]+[.C46]" office:value-type="float" office:value="3.6" calcext:value-type="float">
            <text:p>3.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11*[.S47]" office:value-type="float" office:value="73.3333333333333" calcext:value-type="float">
            <text:p>73.333333333333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[.AE46]*6.66666666666667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47]+[.F4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7]+[.G47]+[.F47]"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table:style-name="ce36" table:formula="of:=[.J47]-[.E41]" office:value-type="string" office:string-value="" calcext:value-type="error">
            <text:p>#VALUE!</text:p>
          </table:table-cell>
          <table:table-cell table:style-name="ce31" table:formula="of:=[.J47]-[.J41]" office:value-type="float" office:value="17" calcext:value-type="float">
            <text:p>17</text:p>
          </table:table-cell>
          <table:table-cell table:formula="of:=[.I47]+[.C47]" office:value-type="float" office:value="18.8" calcext:value-type="float">
            <text:p>18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100/[.R46]" office:value-type="float" office:value="6.66666666666667" calcext:value-type="float">
            <text:p>6.66666666666667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AE47]*6.66666666666667" office:value-type="float" office:value="26.6666666666667" calcext:value-type="float">
            <text:p>2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44:.C47])" office:value-type="float" office:value="4" calcext:value-type="float">
            <text:p>4</text:p>
          </table:table-cell>
          <table:table-cell table:formula="of:=SUM([.D44:.D47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I43]-[.G43])*[.H48]+[.G48]+[.F48]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formula="of:=SUM([.M44:.M47])" office:value-type="float" office:value="63" calcext:value-type="float">
            <text:p>63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formula="of:=[.AE48]*6.66666666666667" office:value-type="float" office:value="33.3333333333334" calcext:value-type="float">
            <text:p>33.3333333333334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Esteban</text:p>
          </table:table-cell>
          <table:table-cell office:value-type="float" office:value="2" calcext:value-type="float">
            <text:p>2</text:p>
          </table:table-cell>
          <table:table-cell table:style-name="ce33" table:formula="of:=SUM([.H50:.H5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35" office:value-type="string" calcext:value-type="string">
            <text:p>To sylvis</text:p>
          </table:table-cell>
          <table:table-cell table:style-name="ce31" office:value-type="string" calcext:value-type="string">
            <text:p>To Sherlock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formula="of:=[.AE49]*6.66666666666667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table:formula="of:=[.C50]+[.F50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49]-[.G49])*[.H50]+[.G50]+[.F50]" office:value-type="float" office:value="27.95" calcext:value-type="float">
            <text:p>27.95</text:p>
          </table:table-cell>
          <table:table-cell office:value-type="float" office:value="29" calcext:value-type="float">
            <text:p>29</text:p>
          </table:table-cell>
          <table:table-cell table:style-name="ce37" table:formula="of:=[.J50]-[.J44]" office:value-type="float" office:value="1" calcext:value-type="float">
            <text:p>1</text:p>
          </table:table-cell>
          <table:table-cell table:style-name="ce39" table:formula="of:=[.J50]-[.E38]" office:value-type="string" office:string-value="" calcext:value-type="error">
            <text:p>#VALUE!</text:p>
          </table:table-cell>
          <table:table-cell table:formula="of:=[.I50]+[.C50]" office:value-type="float" office:value="27.95" calcext:value-type="float">
            <text:p>27.9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formula="of:=[.AE50]*6.66666666666667" office:value-type="float" office:value="46.6666666666667" calcext:value-type="float">
            <text:p>46.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51]+[.F51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49]-[.G49])*[.H51]+[.G51]+[.F51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style-name="ce37" table:formula="of:=[.J51]-[.J45]" office:value-type="float" office:value="-1" calcext:value-type="float">
            <text:p>-1</text:p>
          </table:table-cell>
          <table:table-cell table:style-name="ce39" table:formula="of:=[.J51]-[.E39]" office:value-type="string" office:string-value="" calcext:value-type="error">
            <text:p>#VALUE!</text:p>
          </table:table-cell>
          <table:table-cell table:formula="of:=[.I51]+[.C51]" office:value-type="float" office:value="12.2" calcext:value-type="float">
            <text:p>12.2</text:p>
          </table:table-cell>
          <table:table-cell table:number-columns-repeated="9"/>
          <table:table-cell table:formula="of:=5*[.S47]" office:value-type="float" office:value="33.3333333333333" calcext:value-type="float">
            <text:p>33.3333333333333</text:p>
          </table:table-cell>
          <table:table-cell table:number-columns-repeated="4"/>
          <table:table-cell table:formula="of:=7*[.S47]" office:value-type="float" office:value="46.6666666666667" calcext:value-type="float">
            <text:p>46.66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E51]*6.66666666666667" office:value-type="float" office:value="53.3333333333334" calcext:value-type="float">
            <text:p>5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2]+[.F52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49]-[.G49])*[.H52]+[.G52]+[.F52]" office:value-type="float" office:value="3.65" calcext:value-type="float">
            <text:p>3.65</text:p>
          </table:table-cell>
          <table:table-cell office:value-type="float" office:value="3" calcext:value-type="float">
            <text:p>3</text:p>
          </table:table-cell>
          <table:table-cell table:style-name="ce37" table:formula="of:=[.J52]-[.J46]" office:value-type="float" office:value="1" calcext:value-type="float">
            <text:p>1</text:p>
          </table:table-cell>
          <table:table-cell table:style-name="ce39" table:formula="of:=[.J52]-[.E40]" office:value-type="string" office:string-value="" calcext:value-type="error">
            <text:p>#VALUE!</text:p>
          </table:table-cell>
          <table:table-cell table:formula="of:=[.I52]+[.C52]" office:value-type="float" office:value="3.65" calcext:value-type="float">
            <text:p>3.65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formula="of:=[.AE52]*6.66666666666667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table:formula="of:=[.C53]+[.F53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49]-[.G49])*[.H53]+[.G53]+[.F53]"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table:style-name="ce37" table:formula="of:=[.J53]-[.J47]" office:value-type="float" office:value="1" calcext:value-type="float">
            <text:p>1</text:p>
          </table:table-cell>
          <table:table-cell table:style-name="ce39" table:formula="of:=[.J53]-[.E41]" office:value-type="string" office:string-value="" calcext:value-type="error">
            <text:p>#VALUE!</text:p>
          </table:table-cell>
          <table:table-cell table:formula="of:=[.I53]+[.C53]" office:value-type="float" office:value="19.2" calcext:value-type="float">
            <text:p>19.2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formula="of:=[.AE53]*6.66666666666667" office:value-type="float" office:value="66.6666666666667" calcext:value-type="float">
            <text:p>6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50:.C53])" office:value-type="float" office:value="1" calcext:value-type="float">
            <text:p>1</text:p>
          </table:table-cell>
          <table:table-cell table:formula="of:=SUM([.D50:.D53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49]-[.G49])*[.H54]+[.G54]+[.F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" table:formula="of:=[.J54]-[.J48]" office:value-type="float" office:value="0" calcext:value-type="float">
            <text:p>0</text:p>
          </table:table-cell>
          <table:table-cell table:style-name="ce39" table:formula="of:=SUM([.L50:.L53])" office:value-type="string" office:string-value="" calcext:value-type="error">
            <text:p>#VALUE!</text:p>
          </table:table-cell>
          <table:table-cell table:formula="of:=SUM([.M50:.M53])" office:value-type="float" office:value="63" calcext:value-type="float">
            <text:p>6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AE54]*6.66666666666667" office:value-type="float" office:value="73.3333333333334" calcext:value-type="float">
            <text:p>73.33333333333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xel</text:p>
          </table:table-cell>
          <table:table-cell office:value-type="float" office:value="5" calcext:value-type="float">
            <text:p>5</text:p>
          </table:table-cell>
          <table:table-cell table:style-name="ce33" table:formula="of:=SUM([.H56:.H6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Dean</text:p>
          </table:table-cell>
          <table:table-cell table:style-name="ce31"/>
          <table:table-cell table:number-columns-repeated="9"/>
          <table:table-cell office:value-type="float" office:value="5" calcext:value-type="float">
            <text:p>5</text:p>
          </table:table-cell>
          <table:table-cell table:formula="of:=[.V55]*[.W54]/[.V54]" office:value-type="float" office:value="33.3333333333333" calcext:value-type="float">
            <text:p>33.333333333333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Y55]*[.Z54]/[.Y54]" office:value-type="float" office:value="13.5" calcext:value-type="float">
            <text:p>13.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AE55]*6.66666666666667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6]+[.F56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55]-[.G55])*[.H56]+[.G56]+[.F56]" office:value-type="float" office:value="38" calcext:value-type="float">
            <text:p>38</text:p>
          </table:table-cell>
          <table:table-cell/>
          <table:table-cell table:style-name="ce38" table:formula="of:=[.I56]-[.I62]" office:value-type="float" office:value="-2.4" calcext:value-type="float">
            <text:p>-2.4</text:p>
          </table:table-cell>
          <table:table-cell table:style-name="ce31"/>
          <table:table-cell table:formula="of:=[.I56]+[.C56]" office:value-type="float" office:value="40" calcext:value-type="float">
            <text:p>40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formula="of:=[.AE56]*6.66666666666667" office:value-type="float" office:value="86.6666666666667" calcext:value-type="float">
            <text:p>86.666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7]+[.F57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55]-[.G55])*[.H57]+[.G57]+[.F57]" office:value-type="float" office:value="14" calcext:value-type="float">
            <text:p>14</text:p>
          </table:table-cell>
          <table:table-cell/>
          <table:table-cell table:style-name="ce38" table:formula="of:=[.I57]-[.I63]" office:value-type="float" office:value="-1.3" calcext:value-type="float">
            <text:p>-1.3</text:p>
          </table:table-cell>
          <table:table-cell table:style-name="ce31"/>
          <table:table-cell table:formula="of:=[.I57]+[.C57]" office:value-type="float" office:value="16" calcext:value-type="float">
            <text:p>16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AE57]*6.66666666666667" office:value-type="float" office:value="93.3333333333334" calcext:value-type="float">
            <text:p>9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8]+[.F58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55]-[.G55])*[.H58]+[.G58]+[.F58]" office:value-type="float" office:value="4.5" calcext:value-type="float">
            <text:p>4.5</text:p>
          </table:table-cell>
          <table:table-cell/>
          <table:table-cell table:style-name="ce38" table:formula="of:=[.I58]-[.I64]" office:value-type="float" office:value="-0.0499999999999998" calcext:value-type="float">
            <text:p>-0.0499999999999998</text:p>
          </table:table-cell>
          <table:table-cell table:style-name="ce31"/>
          <table:table-cell table:formula="of:=[.I58]+[.C58]" office:value-type="float" office:value="4.5" calcext:value-type="float">
            <text:p>4.5</text:p>
          </table:table-cell>
          <table:table-cell table:number-columns-repeated="11"/>
          <table:table-cell office:value-type="float" office:value="70" calcext:value-type="float">
            <text:p>70</text:p>
          </table:table-cell>
          <table:table-cell table:formula="of:=[.Y58]*[.Z57]/[.Y57]" office:value-type="float" office:value="10.5" calcext:value-type="float">
            <text:p>10.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AE58]*6.66666666666667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59]+[.F59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55]-[.G55])*[.H59]+[.G59]+[.F59]" office:value-type="float" office:value="9.5" calcext:value-type="float">
            <text:p>9.5</text:p>
          </table:table-cell>
          <table:table-cell/>
          <table:table-cell table:style-name="ce38" table:formula="of:=[.I59]-[.I65]" office:value-type="float" office:value="-5.25" calcext:value-type="float">
            <text:p>-5.25</text:p>
          </table:table-cell>
          <table:table-cell table:style-name="ce31"/>
          <table:table-cell table:formula="of:=[.I59]+[.C59]" office:value-type="float" office:value="14.5" calcext:value-type="float">
            <text:p>14.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56:.C59])" office:value-type="float" office:value="9" calcext:value-type="float">
            <text:p>9</text:p>
          </table:table-cell>
          <table:table-cell table:formula="of:=SUM([.D56:.D59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55]-[.G55])*[.H60]+[.G60]+[.F60]" office:value-type="float" office:value="0" calcext:value-type="float">
            <text:p>0</text:p>
          </table:table-cell>
          <table:table-cell/>
          <table:table-cell table:style-name="ce38" table:formula="of:=[.I60]-[.I66]" office:value-type="float" office:value="0" calcext:value-type="float">
            <text:p>0</text:p>
          </table:table-cell>
          <table:table-cell table:style-name="ce31"/>
          <table:table-cell table:formula="of:=SUM([.M56:.M59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Dean</text:p>
          </table:table-cell>
          <table:table-cell office:value-type="float" office:value="4" calcext:value-type="float">
            <text:p>4</text:p>
          </table:table-cell>
          <table:table-cell table:style-name="ce33" table:formula="of:=SUM([.H62:.H66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2]+[.F62]" office:value-type="float" office:value="35" calcext:value-type="float">
            <text:p>35</text:p>
          </table:table-cell>
          <table:table-cell office:value-type="string" calcext:value-type="string">
            <text:p>Hp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61]-[.G61])*[.H62]+[.G62]+[.F62]" office:value-type="float" office:value="40.4" calcext:value-type="float">
            <text:p>40.4</text:p>
          </table:table-cell>
          <table:table-cell office:value-type="float" office:value="40" calcext:value-type="float">
            <text:p>40</text:p>
          </table:table-cell>
          <table:table-cell table:style-name="ce31" table:number-columns-repeated="2"/>
          <table:table-cell table:formula="of:=[.I62]+[.C62]" office:value-type="float" office:value="40.4" calcext:value-type="float">
            <text:p>40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3]+[.F63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1]-[.G61])*[.H63]+[.G63]+[.F63]" office:value-type="float" office:value="15.3" calcext:value-type="float">
            <text:p>15.3</text:p>
          </table:table-cell>
          <table:table-cell office:value-type="float" office:value="17" calcext:value-type="float">
            <text:p>17</text:p>
          </table:table-cell>
          <table:table-cell table:style-name="ce31" table:number-columns-repeated="2"/>
          <table:table-cell table:formula="of:=[.I63]+[.C63]" office:value-type="float" office:value="15.3" calcext:value-type="float">
            <text:p>15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4]+[.F6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61]-[.G61])*[.H64]+[.G64]+[.F64]" office:value-type="float" office:value="4.55" calcext:value-type="float">
            <text:p>4.55</text:p>
          </table:table-cell>
          <table:table-cell office:value-type="float" office:value="4" calcext:value-type="float">
            <text:p>4</text:p>
          </table:table-cell>
          <table:table-cell table:style-name="ce31" table:number-columns-repeated="2"/>
          <table:table-cell table:formula="of:=[.I64]+[.C64]" office:value-type="float" office:value="4.55" calcext:value-type="float">
            <text:p>4.5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5]+[.F65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61]-[.G61])*[.H65]+[.G65]+[.F65]" office:value-type="float" office:value="14.75" calcext:value-type="float">
            <text:p>14.75</text:p>
          </table:table-cell>
          <table:table-cell office:value-type="float" office:value="16" calcext:value-type="float">
            <text:p>16</text:p>
          </table:table-cell>
          <table:table-cell table:style-name="ce31" table:number-columns-repeated="2"/>
          <table:table-cell table:formula="of:=[.I65]+[.C65]" office:value-type="float" office:value="14.75" calcext:value-type="float">
            <text:p>14.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2:.C65])" office:value-type="float" office:value="0" calcext:value-type="float">
            <text:p>0</text:p>
          </table:table-cell>
          <table:table-cell table:formula="of:=SUM([.D62:.D65])" office:value-type="float" office:value="59" calcext:value-type="float">
            <text:p>59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I61]-[.G61])*[.H66]+[.G66]+[.F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 table:number-columns-repeated="2"/>
          <table:table-cell table:formula="of:=SUM([.M62:.M65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Kramer</text:p>
          </table:table-cell>
          <table:table-cell office:value-type="float" office:value="2" calcext:value-type="float">
            <text:p>2</text:p>
          </table:table-cell>
          <table:table-cell table:style-name="ce33" table:formula="of:=SUM([.H68:.H7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Faye</text:p>
          </table:table-cell>
          <table:table-cell table:style-name="ce35" office:value-type="string" calcext:value-type="string">
            <text:p>To Dea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8]+[.F68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8]+[.G68]+[.F68]" office:value-type="float" office:value="35.9" calcext:value-type="float">
            <text:p>35.9</text:p>
          </table:table-cell>
          <table:table-cell table:formula="of:=[.I68]" office:value-type="float" office:value="35.9" calcext:value-type="float">
            <text:p>35.9</text:p>
          </table:table-cell>
          <table:table-cell table:style-name="ce31" table:formula="of:=[.I68]-[.I98]" office:value-type="float" office:value="8.4" calcext:value-type="float">
            <text:p>8.4</text:p>
          </table:table-cell>
          <table:table-cell table:style-name="ce38" table:formula="of:=[.J68]-[.J62]" office:value-type="float" office:value="-4.1" calcext:value-type="float">
            <text:p>-4.1</text:p>
          </table:table-cell>
          <table:table-cell table:formula="of:=[.I68]+[.C68]" office:value-type="float" office:value="35.9" calcext:value-type="float">
            <text:p>35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9]+[.F6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9]+[.G69]+[.F69]" office:value-type="float" office:value="13.9" calcext:value-type="float">
            <text:p>13.9</text:p>
          </table:table-cell>
          <table:table-cell table:formula="of:=[.I69]" office:value-type="float" office:value="13.9" calcext:value-type="float">
            <text:p>13.9</text:p>
          </table:table-cell>
          <table:table-cell table:style-name="ce31" table:formula="of:=[.I69]-[.I99]-1" office:value-type="float" office:value="2.3" calcext:value-type="float">
            <text:p>2.3</text:p>
          </table:table-cell>
          <table:table-cell table:style-name="ce38" table:formula="of:=[.J69]-[.J63]" office:value-type="float" office:value="-3.1" calcext:value-type="float">
            <text:p>-3.1</text:p>
          </table:table-cell>
          <table:table-cell table:formula="of:=[.I69]+[.C69]" office:value-type="float" office:value="13.9" calcext:value-type="float">
            <text:p>13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0]+[.F70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0]+[.G70]+[.F70]" office:value-type="float" office:value="5.6" calcext:value-type="float">
            <text:p>5.6</text:p>
          </table:table-cell>
          <table:table-cell table:formula="of:=[.I70]" office:value-type="float" office:value="5.6" calcext:value-type="float">
            <text:p>5.6</text:p>
          </table:table-cell>
          <table:table-cell table:style-name="ce31" table:formula="of:=[.I70]-[.I100]" office:value-type="float" office:value="2.9" calcext:value-type="float">
            <text:p>2.9</text:p>
          </table:table-cell>
          <table:table-cell table:style-name="ce38" table:formula="of:=[.J70]-[.J64]" office:value-type="float" office:value="1.6" calcext:value-type="float">
            <text:p>1.6</text:p>
          </table:table-cell>
          <table:table-cell table:formula="of:=[.I70]+[.C70]" office:value-type="float" office:value="5.6" calcext:value-type="float">
            <text:p>5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1]+[.F71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1]+[.G71]+[.F71]" office:value-type="float" office:value="14.6" calcext:value-type="float">
            <text:p>14.6</text:p>
          </table:table-cell>
          <table:table-cell table:formula="of:=[.I71]" office:value-type="float" office:value="14.6" calcext:value-type="float">
            <text:p>14.6</text:p>
          </table:table-cell>
          <table:table-cell table:style-name="ce31" table:formula="of:=[.I71]-[.I101]" office:value-type="float" office:value="-6.6" calcext:value-type="float">
            <text:p>-6.6</text:p>
          </table:table-cell>
          <table:table-cell table:style-name="ce38" table:formula="of:=[.J71]-[.J65]" office:value-type="float" office:value="-1.4" calcext:value-type="float">
            <text:p>-1.4</text:p>
          </table:table-cell>
          <table:table-cell table:formula="of:=[.I71]+[.C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8:.C71])" office:value-type="float" office:value="0" calcext:value-type="float">
            <text:p>0</text:p>
          </table:table-cell>
          <table:table-cell table:formula="of:=SUM([.D68:.D71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([.I67]-[.G67])*[.H72]+[.G72]+[.F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style-name="ce31" table:formula="of:=SUM([.K68:.K71])" office:value-type="float" office:value="7" calcext:value-type="float">
            <text:p>7</text:p>
          </table:table-cell>
          <table:table-cell table:style-name="ce38" table:formula="of:=[.J72]-[.J66]" office:value-type="float" office:value="0" calcext:value-type="float">
            <text:p>0</text:p>
          </table:table-cell>
          <table:table-cell table:formula="of:=SUM([.M68:.M71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herpa</text:p>
          </table:table-cell>
          <table:table-cell office:value-type="float" office:value="14" calcext:value-type="float">
            <text:p>14</text:p>
          </table:table-cell>
          <table:table-cell table:style-name="ce33" table:formula="of:=SUM([.H74:.H7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/>
          <table:table-cell table:style-name="ce35" office:value-type="string" calcext:value-type="string">
            <text:p>To Kram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4]+[.F7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73]-[.G73])*[.H74]+[.G74]+[.F74]"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table:style-name="ce31"/>
          <table:table-cell table:style-name="ce38" table:formula="of:=[.I74]-[.I68]" office:value-type="float" office:value="0.399999999999999" calcext:value-type="float">
            <text:p>0.399999999999999</text:p>
          </table:table-cell>
          <table:table-cell table:formula="of:=[.I74]+[.C74]" office:value-type="float" office:value="36.3" calcext:value-type="float">
            <text:p>36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5]+[.F75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3]-[.G73])*[.H75]+[.G75]+[.F75]" office:value-type="float" office:value="13.4" calcext:value-type="float">
            <text:p>13.4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 table:style-name="ce38" table:formula="of:=[.I75]-[.I69]" office:value-type="float" office:value="-0.5" calcext:value-type="float">
            <text:p>-0.5</text:p>
          </table:table-cell>
          <table:table-cell table:formula="of:=[.I75]+[.C75]" office:value-type="float" office:value="13.4" calcext:value-type="float">
            <text:p>13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6]+[.F76]" office:value-type="float" office:value="6" calcext:value-type="float">
            <text:p>6</text:p>
          </table:table-cell>
          <table:table-cell office:value-type="string" calcext:value-type="string">
            <text:p>Def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73]-[.G73])*[.H76]+[.G76]+[.F76]" office:value-type="float" office:value="6.05" calcext:value-type="float">
            <text:p>6.05</text:p>
          </table:table-cell>
          <table:table-cell office:value-type="float" office:value="6" calcext:value-type="float">
            <text:p>6</text:p>
          </table:table-cell>
          <table:table-cell table:style-name="ce31"/>
          <table:table-cell table:style-name="ce38" table:formula="of:=[.I76]-[.I70]" office:value-type="float" office:value="0.45" calcext:value-type="float">
            <text:p>0.45</text:p>
          </table:table-cell>
          <table:table-cell table:formula="of:=[.I76]+[.C76]" office:value-type="float" office:value="6.05" calcext:value-type="float">
            <text:p>6.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77]+[.F7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73]-[.G73])*[.H77]+[.G77]+[.F77]" office:value-type="float" office:value="13.25" calcext:value-type="float">
            <text:p>13.25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 table:style-name="ce38" table:formula="of:=[.I77]-[.I71]" office:value-type="float" office:value="-1.35" calcext:value-type="float">
            <text:p>-1.35</text:p>
          </table:table-cell>
          <table:table-cell table:formula="of:=[.I77]+[.C77]" office:value-type="float" office:value="14.25" calcext:value-type="float">
            <text:p>14.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SUM([.C74:.C77])" office:value-type="float" office:value="1" calcext:value-type="float">
            <text:p>1</text:p>
          </table:table-cell>
          <table:table-cell table:formula="of:=SUM([.D74:.D77])" office:value-type="float" office:value="69" calcext:value-type="float">
            <text:p>69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73]-[.G73])*[.H78]+[.G78]+[.F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8" table:formula="of:=[.I78]-[.I72]" office:value-type="float" office:value="0" calcext:value-type="float">
            <text:p>0</text:p>
          </table:table-cell>
          <table:table-cell table:formula="of:=SUM([.M74:.M77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4"/>
          <table:table-cell office:value-type="string" calcext:value-type="string">
            <text:p>Larentia</text:p>
          </table:table-cell>
          <table:table-cell office:value-type="float" office:value="5" calcext:value-type="float">
            <text:p>5</text:p>
          </table:table-cell>
          <table:table-cell table:style-name="ce33" table:formula="of:=SUM([.H80:.H84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Alvina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]+[.F80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79]-[.G79])*[.H80]+[.G80]+[.F80]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38" table:formula="of:=[.J80]-[.J92]" office:value-type="float" office:value="-3" calcext:value-type="float">
            <text:p>-3</text:p>
          </table:table-cell>
          <table:table-cell table:style-name="ce38" office:value-type="float" office:value="1" calcext:value-type="float">
            <text:p>1</text:p>
          </table:table-cell>
          <table:table-cell table:formula="of:=[.I80]+[.C80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1]+[.F81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1]+[.G81]+[.F81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8" table:formula="of:=[.J81]-[.J93]" office:value-type="float" office:value="-1" calcext:value-type="float">
            <text:p>-1</text:p>
          </table:table-cell>
          <table:table-cell table:style-name="ce38" office:value-type="float" office:value="4" calcext:value-type="float">
            <text:p>4</text:p>
          </table:table-cell>
          <table:table-cell table:formula="of:=[.I81]+[.C81]" office:value-type="float" office:value="12" calcext:value-type="float">
            <text:p>12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82]+[.F82]" office:value-type="float" office:value="8" calcext:value-type="float">
            <text:p>8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79]-[.G79])*[.H82]+[.G82]+[.F82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8" table:formula="of:=[.J82]-[.J94]" office:value-type="float" office:value="-4" calcext:value-type="float">
            <text:p>-4</text:p>
          </table:table-cell>
          <table:table-cell table:style-name="ce38" office:value-type="float" office:value="2" calcext:value-type="float">
            <text:p>2</text:p>
          </table:table-cell>
          <table:table-cell table:formula="of:=[.I82]+[.C82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83]+[.F83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3]+[.G83]+[.F83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38" table:formula="of:=[.J83]-[.J95]" office:value-type="float" office:value="-1" calcext:value-type="float">
            <text:p>-1</text:p>
          </table:table-cell>
          <table:table-cell table:style-name="ce38" office:value-type="float" office:value="2" calcext:value-type="float">
            <text:p>2</text:p>
          </table:table-cell>
          <table:table-cell table:formula="of:=[.I83]+[.C8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formula="of:=SUM([.C80:.C83])" office:value-type="float" office:value="11" calcext:value-type="float">
            <text:p>11</text:p>
          </table:table-cell>
          <table:table-cell table:formula="of:=SUM([.D80:.D83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79]-[.G79])*[.H84]+[.G84]+[.F84]" office:value-type="float" office:value="1" calcext:value-type="float">
            <text:p>1</text:p>
          </table:table-cell>
          <table:table-cell table:formula="of:=SUM([.I80:.I83])" office:value-type="float" office:value="57" calcext:value-type="float">
            <text:p>57</text:p>
          </table:table-cell>
          <table:table-cell table:style-name="ce38" table:formula="of:=[.J84]-[.J96]" office:value-type="float" office:value="-8.3" calcext:value-type="float">
            <text:p>-8.3</text:p>
          </table:table-cell>
          <table:table-cell table:style-name="ce38" office:value-type="float" office:value="2" calcext:value-type="float">
            <text:p>2</text:p>
          </table:table-cell>
          <table:table-cell table:formula="of:=SUM([.M80:.M83])" office:value-type="float" office:value="68" calcext:value-type="float">
            <text:p>6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Ruby</text:p>
          </table:table-cell>
          <table:table-cell office:value-type="float" office:value="1" calcext:value-type="float">
            <text:p>1</text:p>
          </table:table-cell>
          <table:table-cell table:style-name="ce33" table:formula="of:=SUM([.H86:.H8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Larentia</text:p>
          </table:table-cell>
          <table:table-cell table:style-name="ce31" office:value-type="string" calcext:value-type="string">
            <text:p>To Elbert</text:p>
          </table:table-cell>
          <table:table-cell table:style-name="ce35"/>
          <table:table-cell table:number-columns-repeated="2"/>
          <table:table-cell table:formula="of:=57+11"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86]+[.F86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([.I85]-[.G85])*[.H86]+[.G86]+[.F86]" office:value-type="float" office:value="31.5" calcext:value-type="float">
            <text:p>31.5</text:p>
          </table:table-cell>
          <table:table-cell office:value-type="float" office:value="31" calcext:value-type="float">
            <text:p>31</text:p>
          </table:table-cell>
          <table:table-cell table:style-name="ce38" table:formula="of:=[.J86]-[.I80]" office:value-type="float" office:value="3" calcext:value-type="float">
            <text:p>3</text:p>
          </table:table-cell>
          <table:table-cell table:style-name="ce31" table:formula="of:=[.I86]-[.I146]" office:value-type="float" office:value="-6.8" calcext:value-type="float">
            <text:p>-6.8</text:p>
          </table:table-cell>
          <table:table-cell table:formula="of:=[.I86]+[.C86]"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8">
            <text:p>Alvina, Ruby must have huge speed vs Elbert, so +3 on alvin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87]+[.F87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85]-[.G85])*[.H87]+[.G87]+[.F87]"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table:style-name="ce38" table:formula="of:=[.J87]-[.I81]" office:value-type="float" office:value="-3" calcext:value-type="float">
            <text:p>-3</text:p>
          </table:table-cell>
          <table:table-cell table:style-name="ce31" table:formula="of:=[.I87]-[.I147]" office:value-type="float" office:value="-3.9" calcext:value-type="float">
            <text:p>-3.9</text:p>
          </table:table-cell>
          <table:table-cell table:formula="of:=[.I87]+[.C87]"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88]+[.F88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85]-[.G85])*[.H88]+[.G88]+[.F88]"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table:style-name="ce38" table:formula="of:=[.J88]-[.I82]" office:value-type="float" office:value="1" calcext:value-type="float">
            <text:p>1</text:p>
          </table:table-cell>
          <table:table-cell table:style-name="ce31" table:formula="of:=[.I88]-[.I148]" office:value-type="float" office:value="-1.5" calcext:value-type="float">
            <text:p>-1.5</text:p>
          </table:table-cell>
          <table:table-cell table:formula="of:=[.I88]+[.C88]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table:formula="of:=[.C89]+[.F89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85]-[.G85])*[.H89]+[.G89]+[.F89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style-name="ce38" table:formula="of:=[.J89]-[.I83]" office:value-type="float" office:value="-1" calcext:value-type="float">
            <text:p>-1</text:p>
          </table:table-cell>
          <table:table-cell table:style-name="ce31" table:formula="of:=[.I89]-[.I149]" office:value-type="float" office:value="1.5" calcext:value-type="float">
            <text:p>1.5</text:p>
          </table:table-cell>
          <table:table-cell table:formula="of:=[.I89]+[.C89]"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covered-table-cell/>
          <table:table-cell office:value-type="float" office:value="68" calcext:value-type="float">
            <text:p>68</text:p>
          </table:table-cell>
          <table:table-cell table:formula="of:=SUM([.C86:.C89])" office:value-type="float" office:value="4" calcext:value-type="float">
            <text:p>4</text:p>
          </table:table-cell>
          <table:table-cell table:formula="of:=SUM([.D86:.D89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85]-[.G85])*[.H90]+[.G90]+[.F90]" office:value-type="float" office:value="1" calcext:value-type="float">
            <text:p>1</text:p>
          </table:table-cell>
          <table:table-cell table:formula="of:=SUM([.I86:.I89])" office:value-type="float" office:value="64.4" calcext:value-type="float">
            <text:p>64.4</text:p>
          </table:table-cell>
          <table:table-cell table:style-name="ce38" table:formula="of:=[.J90]-[.I84]" office:value-type="float" office:value="63.4" calcext:value-type="float">
            <text:p>63.4</text:p>
          </table:table-cell>
          <table:table-cell table:style-name="ce31" table:formula="of:=SUM([.L86:.L89])" office:value-type="float" office:value="-10.7" calcext:value-type="float">
            <text:p>-10.7</text:p>
          </table:table-cell>
          <table:table-cell table:formula="of:=SUM([.M86:.M89])" office:value-type="float" office:value="68.4" calcext:value-type="float">
            <text:p>68.4</text:p>
          </table:table-cell>
          <table:table-cell table:number-columns-repeated="19"/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Alvina</text:p>
          </table:table-cell>
          <table:table-cell office:value-type="float" office:value="12" calcext:value-type="float">
            <text:p>12</text:p>
          </table:table-cell>
          <table:table-cell table:style-name="ce33" table:formula="of:=SUM([.H92:.H96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ruby</text:p>
          </table:table-cell>
          <table:table-cell table:style-name="ce31"/>
          <table:table-cell table:number-columns-repeated="20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2]+[.F92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2]+[.G92]+[.F92]" office:value-type="float" office:value="31.75" calcext:value-type="float">
            <text:p>31.75</text:p>
          </table:table-cell>
          <table:table-cell office:value-type="float" office:value="31" calcext:value-type="float">
            <text:p>31</text:p>
          </table:table-cell>
          <table:table-cell table:style-name="ce38" table:formula="of:=[.J92]-[.J86]" office:value-type="float" office:value="0" calcext:value-type="float">
            <text:p>0</text:p>
          </table:table-cell>
          <table:table-cell table:style-name="ce31"/>
          <table:table-cell table:formula="of:=[.I92]+[.C92]" office:value-type="float" office:value="31.75" calcext:value-type="float">
            <text:p>31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3]+[.F93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3]+[.G93]+[.F93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38" table:formula="of:=[.J93]-[.J87]" office:value-type="float" office:value="3" calcext:value-type="float">
            <text:p>3</text:p>
          </table:table-cell>
          <table:table-cell table:style-name="ce31"/>
          <table:table-cell table:formula="of:=[.I93]+[.C93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4]+[.F94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4]+[.G94]+[.F94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38" table:formula="of:=[.J94]-[.J88]" office:value-type="float" office:value="3" calcext:value-type="float">
            <text:p>3</text:p>
          </table:table-cell>
          <table:table-cell table:style-name="ce31"/>
          <table:table-cell table:formula="of:=[.I94]+[.C94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95]+[.F95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91]-[.G91])*[.H95]+[.G95]+[.F95]" office:value-type="float" office:value="14.05" calcext:value-type="float">
            <text:p>14.05</text:p>
          </table:table-cell>
          <table:table-cell office:value-type="float" office:value="14" calcext:value-type="float">
            <text:p>14</text:p>
          </table:table-cell>
          <table:table-cell table:style-name="ce38" table:formula="of:=[.J95]-[.J89]" office:value-type="float" office:value="2" calcext:value-type="float">
            <text:p>2</text:p>
          </table:table-cell>
          <table:table-cell table:style-name="ce31"/>
          <table:table-cell table:formula="of:=[.I95]+[.C95]" office:value-type="float" office:value="17.05" calcext:value-type="float">
            <text:p>17.05</text:p>
          </table:table-cell>
          <table:table-cell table:number-columns-repeated="19"/>
        </table:table-row>
        <table:table-row table:style-name="ro1">
          <table:table-cell table:style-name="Default"/>
          <table:table-cell office:value-type="float" office:value="68" calcext:value-type="float">
            <text:p>68</text:p>
          </table:table-cell>
          <table:table-cell table:formula="of:=SUM([.C92:.C95])" office:value-type="float" office:value="3" calcext:value-type="float">
            <text:p>3</text:p>
          </table:table-cell>
          <table:table-cell table:formula="of:=SUM([.D92:.D95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1]-[.G91])*[.H96]+[.G96]+[.F96]" office:value-type="float" office:value="3" calcext:value-type="float">
            <text:p>3</text:p>
          </table:table-cell>
          <table:table-cell table:formula="of:=SUM([.I92:.I95])" office:value-type="float" office:value="65.3" calcext:value-type="float">
            <text:p>65.3</text:p>
          </table:table-cell>
          <table:table-cell table:style-name="ce38" table:formula="of:=[.J96]-[.J90]" office:value-type="float" office:value="0.899999999999992" calcext:value-type="float">
            <text:p>0.899999999999992</text:p>
          </table:table-cell>
          <table:table-cell table:style-name="ce31"/>
          <table:table-cell table:formula="of:=SUM([.M92:.M95])" office:value-type="float" office:value="68.3" calcext:value-type="float">
            <text:p>68.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aye</text:p>
          </table:table-cell>
          <table:table-cell office:value-type="float" office:value="1" calcext:value-type="float">
            <text:p>1</text:p>
          </table:table-cell>
          <table:table-cell table:style-name="ce33" table:formula="of:=SUM([.H98:.H10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98]+[.F9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97]-[.G97])*[.H98]+[.G98]+[.F98]"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table:style-name="ce31" table:number-columns-repeated="2"/>
          <table:table-cell table:formula="of:=[.I98]+[.C98]" office:value-type="float" office:value="28.5" calcext:value-type="float">
            <text:p>28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99]+[.F99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97]-[.G97])*[.H99]+[.G99]+[.F99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31" table:number-columns-repeated="2"/>
          <table:table-cell table:formula="of:=[.I99]+[.C99]" office:value-type="float" office:value="10.6" calcext:value-type="float">
            <text:p>10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0]+[.F100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97]-[.G97])*[.H100]+[.G100]+[.F100]"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table:style-name="ce31" table:number-columns-repeated="2"/>
          <table:table-cell table:formula="of:=[.I100]+[.C100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1]+[.F101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97]-[.G97])*[.H101]+[.G101]+[.F101]"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table:style-name="ce31" table:number-columns-repeated="2"/>
          <table:table-cell table:formula="of:=[.I101]+[.C101]" office:value-type="float" office:value="21.2" calcext:value-type="float">
            <text:p>21.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98:.C101])" office:value-type="float" office:value="1" calcext:value-type="float">
            <text:p>1</text:p>
          </table:table-cell>
          <table:table-cell table:formula="of:=SUM([.D98:.D101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7]-[.G97])*[.H102]+[.G102]+[.F1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" table:formula="of:=SUM([.I98:.I101])" office:value-type="float" office:value="62" calcext:value-type="float">
            <text:p>62</text:p>
          </table:table-cell>
          <table:table-cell table:style-name="ce31"/>
          <table:table-cell table:formula="of:=SUM([.M98:.M101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Faramir</text:p>
          </table:table-cell>
          <table:table-cell office:value-type="float" office:value="10" calcext:value-type="float">
            <text:p>10</text:p>
          </table:table-cell>
          <table:table-cell table:style-name="ce33" table:formula="of:=SUM([.H104:.H10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ye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3"/>
          <table:table-cell table:formula="of:=[.C104]+[.F104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3]-[.G103])*[.H104]+[.G104]+[.F104]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J104]-[.J98]" office:value-type="float" office:value="5" calcext:value-type="float">
            <text:p>5</text:p>
          </table:table-cell>
          <table:table-cell table:style-name="ce31"/>
          <table:table-cell table:formula="of:=[.I104]+[.C104]" office:value-type="float" office:value="31" calcext:value-type="float">
            <text:p>3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05]+[.F105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5]+[.G105]+[.F105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[.J105]-[.J99]" office:value-type="float" office:value="2" calcext:value-type="float">
            <text:p>2</text:p>
          </table:table-cell>
          <table:table-cell table:style-name="ce31"/>
          <table:table-cell table:formula="of:=[.I105]+[.C105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6]+[.F106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03]-[.G103])*[.H106]+[.G106]+[.F10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06]-[.J100]" office:value-type="float" office:value="0" calcext:value-type="float">
            <text:p>0</text:p>
          </table:table-cell>
          <table:table-cell table:style-name="ce31"/>
          <table:table-cell table:formula="of:=[.I106]+[.C106]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7]+[.F107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7]+[.G107]+[.F107]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J107]-[.J101]" office:value-type="float" office:value="-6" calcext:value-type="float">
            <text:p>-6</text:p>
          </table:table-cell>
          <table:table-cell table:style-name="ce31"/>
          <table:table-cell table:formula="of:=[.I107]+[.C107]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04:.C107])" office:value-type="float" office:value="1" calcext:value-type="float">
            <text:p>1</text:p>
          </table:table-cell>
          <table:table-cell table:formula="of:=SUM([.D104:.D107])" office:value-type="float" office:value="58" calcext:value-type="float">
            <text:p>58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3]-[.G103])*[.H108]+[.G108]+[.F1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04:.I108])" office:value-type="float" office:value="62" calcext:value-type="float">
            <text:p>62</text:p>
          </table:table-cell>
          <table:table-cell table:style-name="ce31"/>
          <table:table-cell table:formula="of:=SUM([.M104:.M107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Volo</text:p>
          </table:table-cell>
          <table:table-cell office:value-type="float" office:value="13" calcext:value-type="float">
            <text:p>13</text:p>
          </table:table-cell>
          <table:table-cell table:style-name="ce33" table:formula="of:=SUM([.H110:.H11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ramir</text:p>
          </table:table-cell>
          <table:table-cell table:style-name="ce31" office:value-type="string" calcext:value-type="string">
            <text:p>To Fay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10]+[.F110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09]-[.G109])*[.H110]+[.G110]+[.F110]" office:value-type="float" office:value="29.5" calcext:value-type="float">
            <text:p>29.5</text:p>
          </table:table-cell>
          <table:table-cell office:value-type="float" office:value="29" calcext:value-type="float">
            <text:p>29</text:p>
          </table:table-cell>
          <table:table-cell table:formula="of:=[.J110]-[.J104]" office:value-type="float" office:value="-3" calcext:value-type="float">
            <text:p>-3</text:p>
          </table:table-cell>
          <table:table-cell table:style-name="ce39" table:formula="of:=[.J110]-[.J98]" office:value-type="float" office:value="2" calcext:value-type="float">
            <text:p>2</text:p>
          </table:table-cell>
          <table:table-cell table:formula="of:=[.I110]+[.C110]" office:value-type="float" office:value="30.5" calcext:value-type="float">
            <text:p>30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11]+[.F11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9]-[.G109])*[.H111]+[.G111]+[.F111]"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table:formula="of:=[.J111]-[.J105]" office:value-type="float" office:value="-1" calcext:value-type="float">
            <text:p>-1</text:p>
          </table:table-cell>
          <table:table-cell table:style-name="ce39" table:formula="of:=[.J111]-[.J99]" office:value-type="float" office:value="1" calcext:value-type="float">
            <text:p>1</text:p>
          </table:table-cell>
          <table:table-cell table:formula="of:=[.I111]+[.C111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2]+[.F112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9]-[.G109])*[.H112]+[.G112]+[.F11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J112]-[.J106]" office:value-type="float" office:value="2" calcext:value-type="float">
            <text:p>2</text:p>
          </table:table-cell>
          <table:table-cell table:style-name="ce39" table:formula="of:=[.J112]-[.J100]" office:value-type="float" office:value="2" calcext:value-type="float">
            <text:p>2</text:p>
          </table:table-cell>
          <table:table-cell table:formula="of:=[.I112]+[.C112]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3]+[.F11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109]-[.G109])*[.H113]+[.G113]+[.F113]"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table:formula="of:=[.J113]-[.J107]" office:value-type="float" office:value="0" calcext:value-type="float">
            <text:p>0</text:p>
          </table:table-cell>
          <table:table-cell table:style-name="ce39" table:formula="of:=[.J113]-[.J101]" office:value-type="float" office:value="-6" calcext:value-type="float">
            <text:p>-6</text:p>
          </table:table-cell>
          <table:table-cell table:formula="of:=[.I113]+[.C113]" office:value-type="float" office:value="16.7" calcext:value-type="float">
            <text:p>16.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10:.C113])" office:value-type="float" office:value="3" calcext:value-type="float">
            <text:p>3</text:p>
          </table:table-cell>
          <table:table-cell table:formula="of:=SUM([.D110:.D113])" office:value-type="float" office:value="61" calcext:value-type="float">
            <text:p>61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9]-[.G109])*[.H114]+[.G114]+[.F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10:.I114])" office:value-type="float" office:value="60" calcext:value-type="float">
            <text:p>60</text:p>
          </table:table-cell>
          <table:table-cell table:style-name="ce39" table:formula="of:=[.J114]-[.J102]" office:value-type="float" office:value="-1" calcext:value-type="float">
            <text:p>-1</text:p>
          </table:table-cell>
          <table:table-cell table:formula="of:=SUM([.M110:.M113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aramythis</text:p>
          </table:table-cell>
          <table:table-cell office:value-type="float" office:value="16" calcext:value-type="float">
            <text:p>16</text:p>
          </table:table-cell>
          <table:table-cell table:style-name="ce33" table:formula="of:=SUM([.H116:.H120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ye</text:p>
          </table:table-cell>
          <table:table-cell table:style-name="ce35" office:value-type="string" calcext:value-type="string">
            <text:p>To Alvin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C116]+[.F116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6]+[.G116]+[.F116]" office:value-type="float" office:value="31.9" calcext:value-type="float">
            <text:p>31.9</text:p>
          </table:table-cell>
          <table:table-cell office:value-type="float" office:value="32" calcext:value-type="float">
            <text:p>32</text:p>
          </table:table-cell>
          <table:table-cell table:formula="of:=[.J116]-[.J98]" office:value-type="float" office:value="5" calcext:value-type="float">
            <text:p>5</text:p>
          </table:table-cell>
          <table:table-cell table:style-name="ce39" table:formula="of:=[.J116]-[.J92]" office:value-type="float" office:value="1" calcext:value-type="float">
            <text:p>1</text:p>
          </table:table-cell>
          <table:table-cell table:formula="of:=[.I116]+[.C116]" office:value-type="float" office:value="31.9" calcext:value-type="float">
            <text:p>31.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7]+[.F117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15]-[.G115])*[.H117]+[.G117]+[.F117]"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table:formula="of:=[.J117]-[.J99]" office:value-type="float" office:value="-1" calcext:value-type="float">
            <text:p>-1</text:p>
          </table:table-cell>
          <table:table-cell table:style-name="ce39" table:formula="of:=[.J117]-[.J93]" office:value-type="float" office:value="-2" calcext:value-type="float">
            <text:p>-2</text:p>
          </table:table-cell>
          <table:table-cell table:formula="of:=[.I117]+[.C117]" office:value-type="float" office:value="7.6" calcext:value-type="float">
            <text:p>7.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8]+[.F118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18]+[.G118]+[.F118]"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table:formula="of:=[.J118]-[.J100]" office:value-type="float" office:value="7" calcext:value-type="float">
            <text:p>7</text:p>
          </table:table-cell>
          <table:table-cell table:style-name="ce39" table:formula="of:=[.J118]-[.J94]" office:value-type="float" office:value="-1" calcext:value-type="float">
            <text:p>-1</text:p>
          </table:table-cell>
          <table:table-cell table:formula="of:=[.I118]+[.C118]" office:value-type="float" office:value="8.7" calcext:value-type="float">
            <text:p>8.7</text:p>
          </table:table-cell>
          <table:table-cell table:formula="of:=[.M118]-8" office:value-type="float" office:value="0.699999999999999" calcext:value-type="float">
            <text:p>0.69999999999999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9]+[.F119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9]+[.G119]+[.F119]" office:value-type="float" office:value="16.9" calcext:value-type="float">
            <text:p>16.9</text:p>
          </table:table-cell>
          <table:table-cell office:value-type="float" office:value="16" calcext:value-type="float">
            <text:p>16</text:p>
          </table:table-cell>
          <table:table-cell table:formula="of:=[.J119]-[.J101]" office:value-type="float" office:value="-6" calcext:value-type="float">
            <text:p>-6</text:p>
          </table:table-cell>
          <table:table-cell table:style-name="ce39" table:formula="of:=[.J119]-[.J95]" office:value-type="float" office:value="2" calcext:value-type="float">
            <text:p>2</text:p>
          </table:table-cell>
          <table:table-cell table:formula="of:=[.I119]+[.C119]" office:value-type="float" office:value="16.9" calcext:value-type="float">
            <text:p>16.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ERFECT</text:p>
          </table:table-cell>
          <table:table-cell table:formula="of:=SUM([.C116:.C119])" office:value-type="float" office:value="0" calcext:value-type="float">
            <text:p>0</text:p>
          </table:table-cell>
          <table:table-cell table:formula="of:=SUM([.D116:.D119])" office:value-type="float" office:value="66" calcext:value-type="float">
            <text:p>66</text:p>
          </table:table-cell>
          <table:table-cell office:value-type="string" calcext:value-type="string">
            <text:p>Mag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20]+[.G120]+[.F120]" office:value-type="float" office:value="7.7" calcext:value-type="float">
            <text:p>7.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9" table:formula="of:=[.J120]-[.J96]" office:value-type="float" office:value="-57.3" calcext:value-type="float">
            <text:p>-57.3</text:p>
          </table:table-cell>
          <table:table-cell table:formula="of:=SUM([.M116:.M119])" office:value-type="float" office:value="65.1" calcext:value-type="float">
            <text:p>65.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zene</text:p>
          </table:table-cell>
          <table:table-cell office:value-type="float" office:value="1" calcext:value-type="float">
            <text:p>1</text:p>
          </table:table-cell>
          <table:table-cell table:style-name="ce33" table:formula="of:=SUM([.H122:.H125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ico Stat</text:p>
          </table:table-cell>
          <table:table-cell table:style-name="ce31" office:value-type="string" calcext:value-type="string">
            <text:p>Total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2]+[.F12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([.I121]-[.G121])*[.H122]+[.G122]+[.F122]"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9" table:formula="of:=[.K122]+[.J122]" office:value-type="float" office:value="24" calcext:value-type="float">
            <text:p>24</text:p>
          </table:table-cell>
          <table:table-cell table:formula="of:=[.I122]+[.C122]" office:value-type="float" office:value="25.5" calcext:value-type="float">
            <text:p>25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23]+[.F123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21]-[.G121])*[.H123]+[.G123]+[.F123]"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9" table:formula="of:=[.K123]+[.J123]" office:value-type="float" office:value="6" calcext:value-type="float">
            <text:p>6</text:p>
          </table:table-cell>
          <table:table-cell table:formula="of:=[.I123]+[.C123]" office:value-type="float" office:value="10.2" calcext:value-type="float">
            <text:p>10.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24]+[.F124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121]-[.G121])*[.H124]+[.G124]+[.F124]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formula="of:=[.K124]+[.J124]" office:value-type="float" office:value="1" calcext:value-type="float">
            <text:p>1</text:p>
          </table:table-cell>
          <table:table-cell table:formula="of:=[.I124]+[.C124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5]+[.F125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21]-[.G121])*[.H125]+[.G125]+[.F125]"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39" table:formula="of:=[.K125]+[.J125]" office:value-type="float" office:value="24" calcext:value-type="float">
            <text:p>24</text:p>
          </table:table-cell>
          <table:table-cell table:formula="of:=[.I125]+[.C125]" office:value-type="float" office:value="20.6" calcext:value-type="float">
            <text:p>20.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SUM([.C122:.C125])" office:value-type="float" office:value="9" calcext:value-type="float">
            <text:p>9</text:p>
          </table:table-cell>
          <table:table-cell table:formula="of:=SUM([.D122:.D125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1]-[.G121])*[.H126]+[.G126]+[.F1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1" table:formula="of:=[.K126]+[.J126]" office:value-type="float" office:value="0" calcext:value-type="float">
            <text:p>0</text:p>
          </table:table-cell>
          <table:table-cell table:formula="of:=SUM([.M122:.M125])" office:value-type="float" office:value="59" calcext:value-type="float">
            <text:p>59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haddy</text:p>
          </table:table-cell>
          <table:table-cell office:value-type="float" office:value="2" calcext:value-type="float">
            <text:p>2</text:p>
          </table:table-cell>
          <table:table-cell table:style-name="ce33" table:formula="of:=SUM([.H128:.H13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Czene</text:p>
          </table:table-cell>
          <table:table-cell table:style-name="ce35" office:value-type="string" calcext:value-type="string">
            <text:p>To Tico Czen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28]+[.F12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27]-[.G127])*[.H128]+[.G128]+[.F128]" office:value-type="float" office:value="23.25" calcext:value-type="float">
            <text:p>23.25</text:p>
          </table:table-cell>
          <table:table-cell office:value-type="float" office:value="24" calcext:value-type="float">
            <text:p>24</text:p>
          </table:table-cell>
          <table:table-cell table:formula="of:=[.J128]-[.J122]" office:value-type="float" office:value="0" calcext:value-type="float">
            <text:p>0</text:p>
          </table:table-cell>
          <table:table-cell table:style-name="ce39" table:formula="of:=[.J128]-[.L122]" office:value-type="float" office:value="0" calcext:value-type="float">
            <text:p>0</text:p>
          </table:table-cell>
          <table:table-cell table:formula="of:=[.I128]+[.C128]" office:value-type="float" office:value="26.25" calcext:value-type="float">
            <text:p>26.25</text:p>
          </table:table-cell>
          <table:table-cell office:value-type="string" calcext:value-type="string">
            <text:p>Hp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29]+[.F12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27]-[.G127])*[.H129]+[.G129]+[.F129]"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table:formula="of:=[.J129]-[.J123]" office:value-type="float" office:value="2" calcext:value-type="float">
            <text:p>2</text:p>
          </table:table-cell>
          <table:table-cell table:style-name="ce39" table:formula="of:=[.J129]-[.L123]" office:value-type="float" office:value="1" calcext:value-type="float">
            <text:p>1</text:p>
          </table:table-cell>
          <table:table-cell table:formula="of:=[.I129]+[.C129]" office:value-type="float" office:value="12.2" calcext:value-type="float">
            <text:p>12.2</text:p>
          </table:table-cell>
          <table:table-cell office:value-type="string" calcext:value-type="string">
            <text:p>Strenght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30]+[.F130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27]-[.G127])*[.H130]+[.G130]+[.F130]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[.J130]-[.J124]" office:value-type="float" office:value="-1" calcext:value-type="float">
            <text:p>-1</text:p>
          </table:table-cell>
          <table:table-cell table:style-name="ce39" table:formula="of:=[.J130]-[.L124]" office:value-type="float" office:value="-1" calcext:value-type="float">
            <text:p>-1</text:p>
          </table:table-cell>
          <table:table-cell table:formula="of:=[.I130]+[.C130]" office:value-type="float" office:value="3.65" calcext:value-type="float">
            <text:p>3.65</text:p>
          </table:table-cell>
          <table:table-cell office:value-type="string" calcext:value-type="string">
            <text:p>Defen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1]+[.F131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27]-[.G127])*[.H131]+[.G131]+[.F131]"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  <table:table-cell table:formula="of:=[.J131]-[.J125]" office:value-type="float" office:value="0" calcext:value-type="float">
            <text:p>0</text:p>
          </table:table-cell>
          <table:table-cell table:style-name="ce39" table:formula="of:=[.J131]-[.L125]" office:value-type="float" office:value="-5" calcext:value-type="float">
            <text:p>-5</text:p>
          </table:table-cell>
          <table:table-cell table:formula="of:=[.I131]+[.C131]" office:value-type="float" office:value="20.9" calcext:value-type="float">
            <text:p>20.9</text:p>
          </table:table-cell>
          <table:table-cell office:value-type="string" calcext:value-type="string">
            <text:p>Speed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Strengh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agic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SUM([.C128:.C131])" office:value-type="float" office:value="13" calcext:value-type="float">
            <text:p>13</text:p>
          </table:table-cell>
          <table:table-cell table:formula="of:=SUM([.D128:.D13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7]-[.G127])*[.H132]+[.G132]+[.F132]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formula="of:=SUM([.M128:.M131])" office:value-type="float" office:value="63" calcext:value-type="float">
            <text:p>63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Reese</text:p>
          </table:table-cell>
          <table:table-cell table:number-columns-repeated="6"/>
          <table:table-cell table:formula="of:=SUM([.R132:.W132])" office:value-type="float" office:value="0" calcext:value-type="float">
            <text:p>0</text:p>
          </table:table-cell>
          <table:table-cell/>
          <table:table-cell table:formula="of:=[.X13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eese</text:p>
          </table:table-cell>
          <table:table-cell office:value-type="float" office:value="1" calcext:value-type="float">
            <text:p>1</text:p>
          </table:table-cell>
          <table:table-cell table:style-name="ce33" table:formula="of:=SUM([.H134:.H137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Alvina</text:p>
          </table:table-cell>
          <table:table-cell table:style-name="ce31"/>
          <table:table-cell table:number-columns-repeated="4"/>
          <table:table-cell office:value-type="string" calcext:value-type="string">
            <text:p>Wa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3:.W133])" office:value-type="float" office:value="6" calcext:value-type="float">
            <text:p>6</text:p>
          </table:table-cell>
          <table:table-cell/>
          <table:table-cell table:formula="of:=[.X133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4]+[.F13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133]-[.G133])*[.H134]+[.G134]+[.F134]" office:value-type="float" office:value="33.2" calcext:value-type="float">
            <text:p>33.2</text:p>
          </table:table-cell>
          <table:table-cell office:value-type="float" office:value="35" calcext:value-type="float">
            <text:p>35</text:p>
          </table:table-cell>
          <table:table-cell table:formula="of:=[.J134]-[.J92]" office:value-type="float" office:value="4" calcext:value-type="float">
            <text:p>4</text:p>
          </table:table-cell>
          <table:table-cell table:style-name="ce31"/>
          <table:table-cell table:formula="of:=[.I134]+[.C134]" office:value-type="float" office:value="33.2" calcext:value-type="float">
            <text:p>33.2</text:p>
          </table:table-cell>
          <table:table-cell table:number-columns-repeated="3"/>
          <table:table-cell office:value-type="string" calcext:value-type="string">
            <text:p>Elbert</text:p>
          </table:table-cell>
          <table:table-cell table:number-columns-repeated="6"/>
          <table:table-cell table:formula="of:=SUM([.R134:.W134])" office:value-type="float" office:value="0" calcext:value-type="float">
            <text:p>0</text:p>
          </table:table-cell>
          <table:table-cell/>
          <table:table-cell table:formula="of:=[.X13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5]+[.F135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5]+[.G135]+[.F135]"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table:formula="of:=[.J135]-[.J93]" office:value-type="float" office:value="1" calcext:value-type="float">
            <text:p>1</text:p>
          </table:table-cell>
          <table:table-cell table:style-name="ce31"/>
          <table:table-cell table:formula="of:=[.I135]+[.C135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Christin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5:.W135])" office:value-type="float" office:value="6" calcext:value-type="float">
            <text:p>6</text:p>
          </table:table-cell>
          <table:table-cell/>
          <table:table-cell table:formula="of:=[.X135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6]+[.F136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6]+[.G136]+[.F136]"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table:formula="of:=[.J136]-[.J94]" office:value-type="float" office:value="-2" calcext:value-type="float">
            <text:p>-2</text:p>
          </table:table-cell>
          <table:table-cell table:style-name="ce31"/>
          <table:table-cell table:formula="of:=[.I136]+[.C136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Ad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136:.W136])" office:value-type="float" office:value="10" calcext:value-type="float">
            <text:p>10</text:p>
          </table:table-cell>
          <table:table-cell/>
          <table:table-cell table:formula="of:=[.X13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7]+[.F13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3]-[.G133])*[.H137]+[.G137]+[.F137]"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formula="of:=[.J137]-[.J95]" office:value-type="float" office:value="-2" calcext:value-type="float">
            <text:p>-2</text:p>
          </table:table-cell>
          <table:table-cell table:style-name="ce31"/>
          <table:table-cell table:formula="of:=[.I137]+[.C137]" office:value-type="float" office:value="12.8" calcext:value-type="float">
            <text:p>12.8</text:p>
          </table:table-cell>
          <table:table-cell table:number-columns-repeated="3"/>
          <table:table-cell office:value-type="string" calcext:value-type="string">
            <text:p>Le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37:.W137])" office:value-type="float" office:value="9" calcext:value-type="float">
            <text:p>9</text:p>
          </table:table-cell>
          <table:table-cell/>
          <table:table-cell table:formula="of:=[.X137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office:value-type="float" office:value="3" calcext:value-type="float">
            <text:p>3</text:p>
          </table:table-cell>
          <table:table-cell table:formula="of:=SUM([.D134:.D137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3]-[.G133])*[.H138]+[.G138]+[.F1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 table:formula="of:=[.J138]-[.J96]" office:value-type="float" office:value="-65.3" calcext:value-type="float">
            <text:p>-65.3</text:p>
          </table:table-cell>
          <table:table-cell table:style-name="ce31"/>
          <table:table-cell table:formula="of:=SUM([.M134:.M137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Sherlock</text:p>
          </table:table-cell>
          <table:table-cell table:number-columns-repeated="6"/>
          <table:table-cell table:formula="of:=SUM([.R138:.W138])" office:value-type="float" office:value="0" calcext:value-type="float">
            <text:p>0</text:p>
          </table:table-cell>
          <table:table-cell/>
          <table:table-cell table:formula="of:=[.X13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134:.C138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style-name="ce33" table:formula="of:=SUM([.H140:.H143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lvina</text:p>
          </table:table-cell>
          <table:table-cell table:style-name="ce31"/>
          <table:table-cell table:number-columns-repeated="4"/>
          <table:table-cell office:value-type="string" calcext:value-type="string">
            <text:p>Izerna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39:.W139])" office:value-type="float" office:value="9" calcext:value-type="float">
            <text:p>9</text:p>
          </table:table-cell>
          <table:table-cell/>
          <table:table-cell table:formula="of:=[.X13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40]+[.F140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9]-[.G139])*[.H140]+[.G140]+[.F140]" office:value-type="float" office:value="35.9" calcext:value-type="float">
            <text:p>35.9</text:p>
          </table:table-cell>
          <table:table-cell office:value-type="float" office:value="36" calcext:value-type="float">
            <text:p>36</text:p>
          </table:table-cell>
          <table:table-cell table:formula="of:=[.J140]-[.J92]" office:value-type="float" office:value="5" calcext:value-type="float">
            <text:p>5</text:p>
          </table:table-cell>
          <table:table-cell table:style-name="ce31"/>
          <table:table-cell table:formula="of:=[.I140]+[.C140]" office:value-type="float" office:value="37.9" calcext:value-type="float">
            <text:p>37.9</text:p>
          </table:table-cell>
          <table:table-cell table:number-columns-repeated="3"/>
          <table:table-cell office:value-type="string" calcext:value-type="string">
            <text:p>Czene</text:p>
          </table:table-cell>
          <table:table-cell table:number-columns-repeated="6"/>
          <table:table-cell table:formula="of:=SUM([.R140:.W140])" office:value-type="float" office:value="0" calcext:value-type="float">
            <text:p>0</text:p>
          </table:table-cell>
          <table:table-cell/>
          <table:table-cell table:formula="of:=[.X140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41]+[.F141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139]-[.G139])*[.H141]+[.G141]+[.F141]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formula="of:=[.J141]-[.J93]" office:value-type="float" office:value="3" calcext:value-type="float">
            <text:p>3</text:p>
          </table:table-cell>
          <table:table-cell table:style-name="ce31"/>
          <table:table-cell table:formula="of:=[.I141]+[.C141]" office:value-type="float" office:value="13.2" calcext:value-type="float">
            <text:p>13.2</text:p>
          </table:table-cell>
          <table:table-cell table:number-columns-repeated="3"/>
          <table:table-cell office:value-type="string" calcext:value-type="string">
            <text:p>Aegin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41:.W141])" office:value-type="float" office:value="9" calcext:value-type="float">
            <text:p>9</text:p>
          </table:table-cell>
          <table:table-cell/>
          <table:table-cell table:formula="of:=[.X141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2]+[.F142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9]-[.G139])*[.H142]+[.G142]+[.F142]"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table:formula="of:=[.J142]-[.J94]" office:value-type="float" office:value="2" calcext:value-type="float">
            <text:p>2</text:p>
          </table:table-cell>
          <table:table-cell table:style-name="ce31"/>
          <table:table-cell table:formula="of:=[.I142]+[.C142]" office:value-type="float" office:value="11.6" calcext:value-type="float">
            <text:p>11.6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table:number-columns-repeated="6"/>
          <table:table-cell table:formula="of:=SUM([.R142:.W142])" office:value-type="float" office:value="0" calcext:value-type="float">
            <text:p>0</text:p>
          </table:table-cell>
          <table:table-cell/>
          <table:table-cell table:formula="of:=[.X14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3]+[.F143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39]-[.G139])*[.H143]+[.G143]+[.F143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43]-[.J95]" office:value-type="float" office:value="-2" calcext:value-type="float">
            <text:p>-2</text:p>
          </table:table-cell>
          <table:table-cell table:style-name="ce31"/>
          <table:table-cell table:formula="of:=[.I143]+[.C143]" office:value-type="float" office:value="12.6" calcext:value-type="float">
            <text:p>12.6</text:p>
          </table:table-cell>
          <table:table-cell table:number-columns-repeated="3"/>
          <table:table-cell office:value-type="string" calcext:value-type="string">
            <text:p>Eni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43:.W143])" office:value-type="float" office:value="5" calcext:value-type="float">
            <text:p>5</text:p>
          </table:table-cell>
          <table:table-cell/>
          <table:table-cell table:formula="of:=[.X143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140:.C143])" office:value-type="float" office:value="2" calcext:value-type="float">
            <text:p>2</text:p>
          </table:table-cell>
          <table:table-cell table:formula="of:=SUM([.D140:.D143])" office:value-type="float" office:value="53" calcext:value-type="float">
            <text:p>5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9]-[.G139])*[.H144]+[.G144]+[.F1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44]-[.J96]" office:value-type="float" office:value="-65.3" calcext:value-type="float">
            <text:p>-65.3</text:p>
          </table:table-cell>
          <table:table-cell table:style-name="ce31"/>
          <table:table-cell table:formula="of:=SUM([.M140:.M143])" office:value-type="float" office:value="75.3" calcext:value-type="float">
            <text:p>75.3</text:p>
          </table:table-cell>
          <table:table-cell table:number-columns-repeated="3"/>
          <table:table-cell office:value-type="string" calcext:value-type="string">
            <text:p>Marc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44:.W144])" office:value-type="float" office:value="17" calcext:value-type="float">
            <text:p>17</text:p>
          </table:table-cell>
          <table:table-cell/>
          <table:table-cell table:formula="of:=[.X144]-9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33" table:formula="of:=SUM([.H146:.H14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rthur</text:p>
          </table:table-cell>
          <table:table-cell table:style-name="ce31"/>
          <table:table-cell table:number-columns-repeated="4"/>
          <table:table-cell office:value-type="string" calcext:value-type="string">
            <text:p>Alvina</text:p>
          </table:table-cell>
          <table:table-cell table:number-columns-repeated="6"/>
          <table:table-cell table:formula="of:=SUM([.R145:.W145])" office:value-type="float" office:value="0" calcext:value-type="float">
            <text:p>0</text:p>
          </table:table-cell>
          <table:table-cell/>
          <table:table-cell table:formula="of:=[.X14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45]-[.G145])*[.H146]+[.G146]+[.F146]" office:value-type="float" office:value="38.3" calcext:value-type="float">
            <text:p>38.3</text:p>
          </table:table-cell>
          <table:table-cell office:value-type="float" office:value="38" calcext:value-type="float">
            <text:p>38</text:p>
          </table:table-cell>
          <table:table-cell table:formula="of:=[.J146]-[.J140]" office:value-type="float" office:value="2" calcext:value-type="float">
            <text:p>2</text:p>
          </table:table-cell>
          <table:table-cell table:style-name="ce31"/>
          <table:table-cell table:formula="of:=[.I146]+[.C146]" office:value-type="float" office:value="38.3" calcext:value-type="float">
            <text:p>38.3</text:p>
          </table:table-cell>
          <table:table-cell table:number-columns-repeated="3"/>
          <table:table-cell office:value-type="string" calcext:value-type="string">
            <text:p>Ruby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R146:.W146])" office:value-type="float" office:value="10" calcext:value-type="float">
            <text:p>10</text:p>
          </table:table-cell>
          <table:table-cell/>
          <table:table-cell table:formula="of:=[.X14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45]-[.G145])*[.H147]+[.G147]+[.F147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47]-[.J141]" office:value-type="float" office:value="1" calcext:value-type="float">
            <text:p>1</text:p>
          </table:table-cell>
          <table:table-cell table:style-name="ce31"/>
          <table:table-cell table:formula="of:=[.I147]+[.C147]" office:value-type="float" office:value="13.4" calcext:value-type="float">
            <text:p>13.4</text:p>
          </table:table-cell>
          <table:table-cell table:number-columns-repeated="3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R147:.W147])" office:value-type="float" office:value="2" calcext:value-type="float">
            <text:p>2</text:p>
          </table:table-cell>
          <table:table-cell/>
          <table:table-cell table:formula="of:=[.X147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45]-[.G145])*[.H148]+[.G148]+[.F148]"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table:formula="of:=[.J148]-[.J142]" office:value-type="float" office:value="-2" calcext:value-type="float">
            <text:p>-2</text:p>
          </table:table-cell>
          <table:table-cell table:style-name="ce31"/>
          <table:table-cell table:formula="of:=[.I148]+[.C148]" office:value-type="float" office:value="11.3" calcext:value-type="float">
            <text:p>11.3</text:p>
          </table:table-cell>
          <table:table-cell table:number-columns-repeated="3"/>
          <table:table-cell office:value-type="string" calcext:value-type="string">
            <text:p>Kramer</text:p>
          </table:table-cell>
          <table:table-cell table:number-columns-repeated="6"/>
          <table:table-cell table:formula="of:=SUM([.R148:.W148])" office:value-type="float" office:value="0" calcext:value-type="float">
            <text:p>0</text:p>
          </table:table-cell>
          <table:table-cell/>
          <table:table-cell table:formula="of:=[.X14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45]-[.G145])*[.H149]+[.G149]+[.F149]" office:value-type="float" office:value="12.1" calcext:value-type="float">
            <text:p>12.1</text:p>
          </table:table-cell>
          <table:table-cell office:value-type="float" office:value="13" calcext:value-type="float">
            <text:p>13</text:p>
          </table:table-cell>
          <table:table-cell table:formula="of:=[.J149]-[.J143]" office:value-type="float" office:value="1" calcext:value-type="float">
            <text:p>1</text:p>
          </table:table-cell>
          <table:table-cell table:style-name="ce31"/>
          <table:table-cell table:formula="of:=[.I149]+[.C149]" office:value-type="float" office:value="12.1" calcext:value-type="float">
            <text:p>12.1</text:p>
          </table:table-cell>
          <table:table-cell table:number-columns-repeated="3"/>
          <table:table-cell office:value-type="string" calcext:value-type="string">
            <text:p>Dean</text:p>
          </table:table-cell>
          <table:table-cell table:number-columns-repeated="6"/>
          <table:table-cell table:formula="of:=SUM([.R149:.W149])" office:value-type="float" office:value="0" calcext:value-type="float">
            <text:p>0</text:p>
          </table:table-cell>
          <table:table-cell/>
          <table:table-cell table:formula="of:=[.X149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ERFECT</text:p>
          </table:table-cell>
          <table:table-cell/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0]+[.G150]" office:value-type="float" office:value="0" calcext:value-type="float">
            <text:p>0</text:p>
          </table:table-cell>
          <table:table-cell table:formula="of:=([.I145]-[.G145])*[.H150]+[.G150]+[.F150]" office:value-type="float" office:value="0" calcext:value-type="float">
            <text:p>0</text:p>
          </table:table-cell>
          <table:table-cell/>
          <table:table-cell table:style-name="ce31" table:formula="of:=SUM([.K146:.K149])" office:value-type="float" office:value="2" calcext:value-type="float">
            <text:p>2</text:p>
          </table:table-cell>
          <table:table-cell table:style-name="ce31"/>
          <table:table-cell table:formula="of:=SUM([.M146:.M149])" office:value-type="float" office:value="75.1" calcext:value-type="float">
            <text:p>75.1</text:p>
          </table:table-cell>
          <table:table-cell table:number-columns-repeated="3"/>
          <table:table-cell office:value-type="string" calcext:value-type="string">
            <text:p>Fay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R150:.W150])" office:value-type="float" office:value="1" calcext:value-type="float">
            <text:p>1</text:p>
          </table:table-cell>
          <table:table-cell/>
          <table:table-cell table:formula="of:=[.X150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del</text:p>
          </table:table-cell>
          <table:table-cell office:value-type="float" office:value="1" calcext:value-type="float">
            <text:p>1</text:p>
          </table:table-cell>
          <table:table-cell table:style-name="ce33" table:formula="of:=SUM([.H152:.H155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rthur</text:p>
          </table:table-cell>
          <table:table-cell table:style-name="ce31"/>
          <table:table-cell table:style-name="ce35" office:value-type="string" calcext:value-type="string">
            <text:p>To Elbert</text:p>
          </table:table-cell>
          <table:table-cell table:number-columns-repeated="3"/>
          <table:table-cell office:value-type="string" calcext:value-type="string">
            <text:p>Sylvi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51:.W151])" office:value-type="float" office:value="2" calcext:value-type="float">
            <text:p>2</text:p>
          </table:table-cell>
          <table:table-cell/>
          <table:table-cell table:formula="of:=[.X151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2]+[.F152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1]-[.G151])*[.H152]+[.G152]+[.F152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style-name="ce31" table:formula="of:=[.J152]-[.J140]" office:value-type="float" office:value="-2" calcext:value-type="float">
            <text:p>-2</text:p>
          </table:table-cell>
          <table:table-cell table:style-name="ce31"/>
          <table:table-cell table:formula="of:=[.I152]+[.C152]" office:value-type="float" office:value="32.4" calcext:value-type="float">
            <text:p>32.4</text:p>
          </table:table-cell>
          <table:table-cell table:number-columns-repeated="3"/>
          <table:table-cell office:value-type="string" calcext:value-type="string">
            <text:p>Percev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52:.W152])" office:value-type="float" office:value="7" calcext:value-type="float">
            <text:p>7</text:p>
          </table:table-cell>
          <table:table-cell/>
          <table:table-cell table:formula="of:=[.X152]-9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[.C153]+[.F153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1]-[.G151])*[.H153]+[.G153]+[.F153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31" table:formula="of:=[.J153]-[.J141]" office:value-type="float" office:value="-4" calcext:value-type="float">
            <text:p>-4</text:p>
          </table:table-cell>
          <table:table-cell table:style-name="ce31"/>
          <table:table-cell table:formula="of:=[.I153]+[.C153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Thadd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R153:.W153])" office:value-type="float" office:value="3" calcext:value-type="float">
            <text:p>3</text:p>
          </table:table-cell>
          <table:table-cell/>
          <table:table-cell table:formula="of:=[.X153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4]+[.F15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151]-[.G151])*[.H154]+[.G154]+[.F154]"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table:style-name="ce31" table:formula="of:=[.J154]-[.J142]" office:value-type="float" office:value="-4" calcext:value-type="float">
            <text:p>-4</text:p>
          </table:table-cell>
          <table:table-cell table:style-name="ce31"/>
          <table:table-cell table:formula="of:=[.I154]+[.C154]" office:value-type="float" office:value="10.6" calcext:value-type="float">
            <text:p>10.6</text:p>
          </table:table-cell>
          <table:table-cell table:number-columns-repeated="3"/>
          <table:table-cell office:value-type="string" calcext:value-type="string">
            <text:p>Esteban</text:p>
          </table:table-cell>
          <table:table-cell table:number-columns-repeated="6"/>
          <table:table-cell table:formula="of:=SUM([.R154:.W154])" office:value-type="float" office:value="0" calcext:value-type="float">
            <text:p>0</text:p>
          </table:table-cell>
          <table:table-cell/>
          <table:table-cell table:formula="of:=[.X15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5]+[.F155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51]-[.G151])*[.H155]+[.G155]+[.F155]"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31" table:formula="of:=[.J155]-[.J143]" office:value-type="float" office:value="2" calcext:value-type="float">
            <text:p>2</text:p>
          </table:table-cell>
          <table:table-cell table:style-name="ce31"/>
          <table:table-cell table:formula="of:=[.I155]+[.C155]" office:value-type="float" office:value="11.8" calcext:value-type="float">
            <text:p>11.8</text:p>
          </table:table-cell>
          <table:table-cell table:number-columns-repeated="3"/>
          <table:table-cell office:value-type="string" calcext:value-type="string">
            <text:p>Faramir</text:p>
          </table:table-cell>
          <table:table-cell table:number-columns-repeated="6"/>
          <table:table-cell table:formula="of:=SUM([.R155:.W155])" office:value-type="float" office:value="0" calcext:value-type="float">
            <text:p>0</text:p>
          </table:table-cell>
          <table:table-cell/>
          <table:table-cell table:formula="of:=[.X15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2:.C155])" office:value-type="float" office:value="3" calcext:value-type="float">
            <text:p>3</text:p>
          </table:table-cell>
          <table:table-cell table:formula="of:=SUM([.D152:.D155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1]-[.G151])*[.H156]+[.G156]+[.F156]" office:value-type="float" office:value="0" calcext:value-type="float">
            <text:p>0</text:p>
          </table:table-cell>
          <table:table-cell table:formula="of:=SUM([.I152:.I155])" office:value-type="float" office:value="65.4" calcext:value-type="float">
            <text:p>65.4</text:p>
          </table:table-cell>
          <table:table-cell table:style-name="ce31" office:value-type="float" office:value="-8" calcext:value-type="float">
            <text:p>-8</text:p>
          </table:table-cell>
          <table:table-cell table:style-name="ce31"/>
          <table:table-cell table:formula="of:=SUM([.M152:.M155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Vol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R156:.W156])" office:value-type="float" office:value="1" calcext:value-type="float">
            <text:p>1</text:p>
          </table:table-cell>
          <table:table-cell/>
          <table:table-cell table:formula="of:=[.X156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Leon</text:p>
          </table:table-cell>
          <table:table-cell office:value-type="float" office:value="1" calcext:value-type="float">
            <text:p>1</text:p>
          </table:table-cell>
          <table:table-cell table:style-name="ce33" table:formula="of:=SUM([.H158:.H161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del</text:p>
          </table:table-cell>
          <table:table-cell table:style-name="ce31" office:value-type="string" calcext:value-type="string">
            <text:p>To Arthur</text:p>
          </table:table-cell>
          <table:table-cell table:style-name="ce35" office:value-type="string" calcext:value-type="string">
            <text:p>To Alvina</text:p>
          </table:table-cell>
          <table:table-cell table:number-columns-repeated="3"/>
          <table:table-cell office:value-type="string" calcext:value-type="string">
            <text:p>Sherp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57:.W157])" office:value-type="float" office:value="3" calcext:value-type="float">
            <text:p>3</text:p>
          </table:table-cell>
          <table:table-cell/>
          <table:table-cell table:formula="of:=[.X157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8]+[.F158]" office:value-type="float" office:value="28" calcext:value-type="float">
            <text:p>28</text:p>
          </table:table-cell>
          <table:table-cell office:value-type="string" calcext:value-type="string">
            <text:p>Hp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57]-[.G157])*[.H158]+[.G158]+[.F158]" office:value-type="float" office:value="32.8" calcext:value-type="float">
            <text:p>32.8</text:p>
          </table:table-cell>
          <table:table-cell office:value-type="float" office:value="33" calcext:value-type="float">
            <text:p>33</text:p>
          </table:table-cell>
          <table:table-cell table:formula="of:=[.J158]-[.J152]" office:value-type="float" office:value="-1" calcext:value-type="float">
            <text:p>-1</text:p>
          </table:table-cell>
          <table:table-cell table:style-name="ce39" table:formula="of:=[.J158]-[.J146]" office:value-type="float" office:value="-5" calcext:value-type="float">
            <text:p>-5</text:p>
          </table:table-cell>
          <table:table-cell table:formula="of:=[.I158]+[.C158]" office:value-type="float" office:value="32.8" calcext:value-type="float">
            <text:p>32.8</text:p>
          </table:table-cell>
          <table:table-cell table:number-columns-repeated="3"/>
          <table:table-cell office:value-type="string" calcext:value-type="string">
            <text:p>Clifford</text:p>
          </table:table-cell>
          <table:table-cell table:number-columns-repeated="6"/>
          <table:table-cell table:formula="of:=SUM([.R158:.W158])" office:value-type="float" office:value="0" calcext:value-type="float">
            <text:p>0</text:p>
          </table:table-cell>
          <table:table-cell/>
          <table:table-cell table:formula="of:=[.X15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59]+[.F15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59]+[.G159]+[.F159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59]-[.J153]" office:value-type="float" office:value="3" calcext:value-type="float">
            <text:p>3</text:p>
          </table:table-cell>
          <table:table-cell table:style-name="ce39" table:formula="of:=[.J159]-[.J147]" office:value-type="float" office:value="-2" calcext:value-type="float">
            <text:p>-2</text:p>
          </table:table-cell>
          <table:table-cell table:formula="of:=[.I159]+[.C159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Axe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59:.W159])" office:value-type="float" office:value="9" calcext:value-type="float">
            <text:p>9</text:p>
          </table:table-cell>
          <table:table-cell/>
          <table:table-cell table:formula="of:=[.X15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60]+[.F160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7]-[.G157])*[.H160]+[.G160]+[.F160]"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table:formula="of:=[.J160]-[.J154]" office:value-type="float" office:value="1" calcext:value-type="float">
            <text:p>1</text:p>
          </table:table-cell>
          <table:table-cell table:style-name="ce39" table:formula="of:=[.J160]-[.J148]" office:value-type="float" office:value="-1" calcext:value-type="float">
            <text:p>-1</text:p>
          </table:table-cell>
          <table:table-cell table:formula="of:=[.I160]+[.C160]" office:value-type="float" office:value="7.4" calcext:value-type="float">
            <text:p>7.4</text:p>
          </table:table-cell>
          <table:table-cell table:number-columns-repeated="3"/>
          <table:table-cell office:value-type="string" calcext:value-type="string">
            <text:p>Larent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R160:.W160])" office:value-type="float" office:value="15" calcext:value-type="float">
            <text:p>15</text:p>
          </table:table-cell>
          <table:table-cell/>
          <table:table-cell table:formula="of:=[.X160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61]+[.F161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61]+[.G161]+[.F161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formula="of:=[.J161]-[.J155]" office:value-type="float" office:value="-2" calcext:value-type="float">
            <text:p>-2</text:p>
          </table:table-cell>
          <table:table-cell table:style-name="ce39" table:formula="of:=[.J161]-[.J149]" office:value-type="float" office:value="-1" calcext:value-type="float">
            <text:p>-1</text:p>
          </table:table-cell>
          <table:table-cell table:formula="of:=[.I161]+[.C161]" office:value-type="float" office:value="14.6" calcext:value-type="float">
            <text:p>14.6</text:p>
          </table:table-cell>
          <table:table-cell table:number-columns-repeated="3"/>
          <table:table-cell office:value-type="string" calcext:value-type="string">
            <text:p>Ow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61:.W161])" office:value-type="float" office:value="12" calcext:value-type="float">
            <text:p>12</text:p>
          </table:table-cell>
          <table:table-cell/>
          <table:table-cell table:formula="of:=[.X161]-9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8:.C161])" office:value-type="float" office:value="2" calcext:value-type="float">
            <text:p>2</text:p>
          </table:table-cell>
          <table:table-cell table:formula="of:=SUM([.D158:.D161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7]-[.G157])*[.H162]+[.G162]+[.F162]" office:value-type="float" office:value="0" calcext:value-type="float">
            <text:p>0</text:p>
          </table:table-cell>
          <table:table-cell table:formula="of:=SUM([.I158:.I161])" office:value-type="float" office:value="66.4" calcext:value-type="float">
            <text:p>66.4</text:p>
          </table:table-cell>
          <table:table-cell table:style-name="ce31" office:value-type="float" office:value="-8" calcext:value-type="float">
            <text:p>-8</text:p>
          </table:table-cell>
          <table:table-cell table:style-name="ce31" table:formula="of:=[.J162]-[.J150]" office:value-type="float" office:value="66.4" calcext:value-type="float">
            <text:p>66.4</text:p>
          </table:table-cell>
          <table:table-cell table:formula="of:=SUM([.M158:.M161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Burrough</text:p>
          </table:table-cell>
          <table:table-cell table:number-columns-repeated="6"/>
          <table:table-cell table:formula="of:=SUM([.R162:.W162])" office:value-type="float" office:value="0" calcext:value-type="float">
            <text:p>0</text:p>
          </table:table-cell>
          <table:table-cell/>
          <table:table-cell table:formula="of:=[.X16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Marcel</text:p>
          </table:table-cell>
          <table:table-cell office:value-type="float" office:value="5" calcext:value-type="float">
            <text:p>5</text:p>
          </table:table-cell>
          <table:table-cell table:style-name="ce33" table:formula="of:=SUM([.H164:.H167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lbert</text:p>
          </table:table-cell>
          <table:table-cell table:style-name="ce35" office:value-type="string" calcext:value-type="string">
            <text:p>To Daoud</text:p>
          </table:table-cell>
          <table:table-cell table:number-columns-repeated="4"/>
          <table:table-cell office:value-type="string" calcext:value-type="string">
            <text:p>Derric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R163:.W163])" office:value-type="float" office:value="15" calcext:value-type="float">
            <text:p>15</text:p>
          </table:table-cell>
          <table:table-cell/>
          <table:table-cell table:formula="of:=[.X163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64]+[.F16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4]+[.G164]+[.F164]" office:value-type="float" office:value="33" calcext:value-type="float">
            <text:p>33</text:p>
          </table:table-cell>
          <table:table-cell table:formula="of:=[.I164]" office:value-type="float" office:value="33" calcext:value-type="float">
            <text:p>33</text:p>
          </table:table-cell>
          <table:table-cell table:style-name="ce31" table:formula="of:=[.J164]-[.J146]" office:value-type="float" office:value="-5" calcext:value-type="float">
            <text:p>-5</text:p>
          </table:table-cell>
          <table:table-cell table:style-name="ce39" table:formula="of:=[.I164]-[.I176]" office:value-type="float" office:value="-6.9" calcext:value-type="float">
            <text:p>-6.9</text:p>
          </table:table-cell>
          <table:table-cell table:formula="of:=[.I164]+[.C164]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Saphir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64:.W164])" office:value-type="float" office:value="5" calcext:value-type="float">
            <text:p>5</text:p>
          </table:table-cell>
          <table:table-cell/>
          <table:table-cell table:formula="of:=[.X164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5]+[.F165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3]-[.G163])*[.H165]+[.G165]+[.F165]" office:value-type="float" office:value="10" calcext:value-type="float">
            <text:p>10</text:p>
          </table:table-cell>
          <table:table-cell table:formula="of:=[.I165]" office:value-type="float" office:value="10" calcext:value-type="float">
            <text:p>10</text:p>
          </table:table-cell>
          <table:table-cell table:style-name="ce31" table:formula="of:=[.J165]-[.J147]" office:value-type="float" office:value="-4" calcext:value-type="float">
            <text:p>-4</text:p>
          </table:table-cell>
          <table:table-cell table:style-name="ce39" table:formula="of:=[.I165]-[.I177]" office:value-type="float" office:value="-5.8" calcext:value-type="float">
            <text:p>-5.8</text:p>
          </table:table-cell>
          <table:table-cell table:formula="of:=[.I165]+[.C165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ynet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R165:.W165])" office:value-type="float" office:value="11" calcext:value-type="float">
            <text:p>11</text:p>
          </table:table-cell>
          <table:table-cell/>
          <table:table-cell table:formula="of:=[.X165]-9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6]+[.F166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6]+[.G166]+[.F166]" office:value-type="float" office:value="11" calcext:value-type="float">
            <text:p>11</text:p>
          </table:table-cell>
          <table:table-cell table:formula="of:=[.I166]" office:value-type="float" office:value="11" calcext:value-type="float">
            <text:p>11</text:p>
          </table:table-cell>
          <table:table-cell table:style-name="ce31" table:formula="of:=[.J166]-[.J148]" office:value-type="float" office:value="1" calcext:value-type="float">
            <text:p>1</text:p>
          </table:table-cell>
          <table:table-cell table:style-name="ce39" table:formula="of:=[.I166]-[.I178]" office:value-type="float" office:value="-0.800000000000001" calcext:value-type="float">
            <text:p>-0.800000000000001</text:p>
          </table:table-cell>
          <table:table-cell table:formula="of:=[.I166]+[.C166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Paramythis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66:.W166])" office:value-type="float" office:value="5" calcext:value-type="float">
            <text:p>5</text:p>
          </table:table-cell>
          <table:table-cell/>
          <table:table-cell table:formula="of:=[.X166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67]+[.F167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3]-[.G163])*[.H167]+[.G167]+[.F167]" office:value-type="float" office:value="8" calcext:value-type="float">
            <text:p>8</text:p>
          </table:table-cell>
          <table:table-cell table:formula="of:=[.I167]" office:value-type="float" office:value="8" calcext:value-type="float">
            <text:p>8</text:p>
          </table:table-cell>
          <table:table-cell table:style-name="ce31" table:formula="of:=[.J167]-[.J149]" office:value-type="float" office:value="-5" calcext:value-type="float">
            <text:p>-5</text:p>
          </table:table-cell>
          <table:table-cell table:style-name="ce39" table:formula="of:=[.I167]-[.I179]" office:value-type="float" office:value="-4.7" calcext:value-type="float">
            <text:p>-4.7</text:p>
          </table:table-cell>
          <table:table-cell table:formula="of:=[.I167]+[.C167]" office:value-type="float" office:value="12" calcext:value-type="float">
            <text:p>12</text:p>
          </table:table-cell>
          <table:table-cell table:number-columns-repeated="10"/>
          <table:table-cell table:formula="of:=SUM([.R167:.W167])" office:value-type="float" office:value="0" calcext:value-type="float">
            <text:p>0</text:p>
          </table:table-cell>
          <table:table-cell/>
          <table:table-cell table:formula="of:=[.X167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5 To reach</text:p>
          </table:table-cell>
          <table:table-cell table:formula="of:=SUM([.C164:.C167])" office:value-type="float" office:value="13" calcext:value-type="float">
            <text:p>13</text:p>
          </table:table-cell>
          <table:table-cell table:formula="of:=SUM([.D164:.D167])" office:value-type="float" office:value="67" calcext:value-type="float">
            <text:p>6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3]-[.G163])*[.H168]+[.G168]+[.F168]" office:value-type="float" office:value="0" calcext:value-type="float">
            <text:p>0</text:p>
          </table:table-cell>
          <table:table-cell table:formula="of:=SUM([.J164:.J167])" office:value-type="float" office:value="62" calcext:value-type="float">
            <text:p>62</text:p>
          </table:table-cell>
          <table:table-cell table:style-name="ce31" table:formula="of:=[.J168]-[.J150]" office:value-type="float" office:value="62" calcext:value-type="float">
            <text:p>62</text:p>
          </table:table-cell>
          <table:table-cell table:style-name="ce31" table:formula="of:=SUM([.L164:.L167])" office:value-type="float" office:value="-18.2" calcext:value-type="float">
            <text:p>-18.2</text:p>
          </table:table-cell>
          <table:table-cell table:formula="of:=SUM([.M164:.M167])"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R132:.R167])" office:value-type="float" office:value="36" calcext:value-type="float">
            <text:p>36</text:p>
          </table:table-cell>
          <table:table-cell table:formula="of:=SUM([.S132:.S167])" office:value-type="float" office:value="30" calcext:value-type="float">
            <text:p>30</text:p>
          </table:table-cell>
          <table:table-cell table:formula="of:=SUM([.T132:.T167])" office:value-type="float" office:value="13" calcext:value-type="float">
            <text:p>13</text:p>
          </table:table-cell>
          <table:table-cell table:formula="of:=SUM([.U132:.U167])" office:value-type="float" office:value="60" calcext:value-type="float">
            <text:p>60</text:p>
          </table:table-cell>
          <table:table-cell table:formula="of:=SUM([.V132:.V167])" office:value-type="float" office:value="33" calcext:value-type="float">
            <text:p>33</text:p>
          </table:table-cell>
          <table:table-cell/>
          <table:table-cell table:formula="of:=SUM([.R168:.W168])" office:value-type="float" office:value="172" calcext:value-type="float">
            <text:p>172</text:p>
          </table:table-cell>
          <table:table-cell/>
          <table:table-cell table:formula="of:=SUM([.Z132:.Z167])" office:value-type="float" office:value="-152" calcext:value-type="float">
            <text:p>-15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errick</text:p>
          </table:table-cell>
          <table:table-cell office:value-type="float" office:value="3" calcext:value-type="float">
            <text:p>3</text:p>
          </table:table-cell>
          <table:table-cell table:style-name="ce33" table:formula="of:=SUM([.H170:.H173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Daoud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170]+[.F170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0]+[.G170]+[.F170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formula="of:=[.I170]-[.I176]" office:value-type="float" office:value="-7.5" calcext:value-type="float">
            <text:p>-7.5</text:p>
          </table:table-cell>
          <table:table-cell table:style-name="ce31"/>
          <table:table-cell table:formula="of:=[.I170]+[.C170]" office:value-type="float" office:value="42.4" calcext:value-type="float">
            <text:p>42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71]+[.F17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9]-[.G169])*[.H171]+[.G171]+[.F171]"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table:formula="of:=[.I171]-[.I177]" office:value-type="float" office:value="-6.2" calcext:value-type="float">
            <text:p>-6.2</text:p>
          </table:table-cell>
          <table:table-cell table:style-name="ce31"/>
          <table:table-cell table:formula="of:=[.I171]+[.C1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72]+[.F172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2]+[.G172]+[.F172]"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table:formula="of:=[.I172]-[.I178]" office:value-type="float" office:value="2.6" calcext:value-type="float">
            <text:p>2.6</text:p>
          </table:table-cell>
          <table:table-cell table:style-name="ce31"/>
          <table:table-cell table:formula="of:=[.I172]+[.C172]" office:value-type="float" office:value="14.4" calcext:value-type="float">
            <text:p>14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73]+[.F173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9]-[.G169])*[.H173]+[.G173]+[.F173]"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table:formula="of:=[.I173]-[.I179]" office:value-type="float" office:value="-7.5" calcext:value-type="float">
            <text:p>-7.5</text:p>
          </table:table-cell>
          <table:table-cell table:style-name="ce31"/>
          <table:table-cell table:formula="of:=[.I173]+[.C173]" office:value-type="float" office:value="8.2" calcext:value-type="float">
            <text:p>8.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80 To reach</text:p>
          </table:table-cell>
          <table:table-cell table:formula="of:=SUM([.C170:.C173])" office:value-type="float" office:value="18" calcext:value-type="float">
            <text:p>18</text:p>
          </table:table-cell>
          <table:table-cell table:formula="of:=SUM([.D170:.D173])" office:value-type="float" office:value="70" calcext:value-type="float">
            <text:p>7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9]-[.G169])*[.H174]+[.G174]+[.F1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74]-[.I180]" office:value-type="float" office:value="0" calcext:value-type="float">
            <text:p>0</text:p>
          </table:table-cell>
          <table:table-cell table:style-name="ce31"/>
          <table:table-cell table:formula="of:=SUM([.M170:.M173])" office:value-type="float" office:value="79.6" calcext:value-type="float">
            <text:p>79.6</text:p>
          </table:table-cell>
          <table:table-cell table:number-columns-repeated="19"/>
        </table:table-row>
        <table:table-row table:style-name="ro1">
          <table:table-cell/>
          <table:table-cell table:formula="of:=SUM([.C170:.C172]=)" office:value-type="string" office:string-value="" calcext:value-type="error">
            <text:p>Err:511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office:value-type="float" office:value="6" calcext:value-type="float">
            <text:p>6</text:p>
          </table:table-cell>
          <table:table-cell table:style-name="ce33" table:formula="of:=SUM([.H176:.H179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lbert</text:p>
          </table:table-cell>
          <table:table-cell table:style-name="ce31" office:value-type="string" calcext:value-type="string">
            <text:p>Level 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([.I175]-[.G175])*[.H176]+[.G176]+[.F176]" office:value-type="float" office:value="39.9" calcext:value-type="float">
            <text:p>39.9</text:p>
          </table:table-cell>
          <table:table-cell table:formula="of:=[.I176]" office:value-type="float" office:value="39.9" calcext:value-type="float">
            <text:p>39.9</text:p>
          </table:table-cell>
          <table:table-cell table:formula="of:=[.J176]-[.J146]" office:value-type="float" office:value="1.9" calcext:value-type="float">
            <text:p>1.9</text:p>
          </table:table-cell>
          <table:table-cell table:style-name="ce31" table:formula="of:=14*[.H176]+[.G176]+[.F176]" office:value-type="float" office:value="40.4" calcext:value-type="float">
            <text:p>40.4</text:p>
          </table:table-cell>
          <table:table-cell table:formula="of:=[.I176]+[.C176]" office:value-type="float" office:value="39.9" calcext:value-type="float">
            <text:p>39.9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([.I175]-[.G175])*[.H177]+[.G177]+[.F177]" office:value-type="float" office:value="15.8" calcext:value-type="float">
            <text:p>15.8</text:p>
          </table:table-cell>
          <table:table-cell table:formula="of:=[.I177]" office:value-type="float" office:value="15.8" calcext:value-type="float">
            <text:p>15.8</text:p>
          </table:table-cell>
          <table:table-cell table:formula="of:=[.J177]-[.J147]" office:value-type="float" office:value="1.8" calcext:value-type="float">
            <text:p>1.8</text:p>
          </table:table-cell>
          <table:table-cell table:style-name="ce31" table:formula="of:=14*[.H177]+[.G177]+[.F177]" office:value-type="float" office:value="16.8" calcext:value-type="float">
            <text:p>16.8</text:p>
          </table:table-cell>
          <table:table-cell table:formula="of:=[.I177]+[.C177]" office:value-type="float" office:value="15.8" calcext:value-type="float">
            <text:p>15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75]-[.G175])*[.H178]+[.G178]+[.F178]" office:value-type="float" office:value="11.8" calcext:value-type="float">
            <text:p>11.8</text:p>
          </table:table-cell>
          <table:table-cell table:formula="of:=[.I178]" office:value-type="float" office:value="11.8" calcext:value-type="float">
            <text:p>11.8</text:p>
          </table:table-cell>
          <table:table-cell table:formula="of:=[.J178]-[.J148]" office:value-type="float" office:value="1.8" calcext:value-type="float">
            <text:p>1.8</text:p>
          </table:table-cell>
          <table:table-cell table:style-name="ce31" table:formula="of:=14*[.H178]+[.G178]+[.F178]" office:value-type="float" office:value="12.8" calcext:value-type="float">
            <text:p>12.8</text:p>
          </table:table-cell>
          <table:table-cell table:formula="of:=[.I178]+[.C178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75]-[.G175])*[.H179]+[.G179]+[.F179]" office:value-type="float" office:value="12.7" calcext:value-type="float">
            <text:p>12.7</text:p>
          </table:table-cell>
          <table:table-cell table:formula="of:=[.I179]" office:value-type="float" office:value="12.7" calcext:value-type="float">
            <text:p>12.7</text:p>
          </table:table-cell>
          <table:table-cell table:formula="of:=[.J179]-[.J149]" office:value-type="float" office:value="-0.300000000000001" calcext:value-type="float">
            <text:p>-0.300000000000001</text:p>
          </table:table-cell>
          <table:table-cell table:style-name="ce31" table:formula="of:=14*[.H179]+[.G179]+[.F179]" office:value-type="float" office:value="14.2" calcext:value-type="float">
            <text:p>14.2</text:p>
          </table:table-cell>
          <table:table-cell table:formula="of:=[.I179]+[.C179]" office:value-type="float" office:value="12.7" calcext:value-type="float">
            <text:p>12.7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75]-[.G175])*[.H180]+[.G180]+[.F180]" office:value-type="float" office:value="0" calcext:value-type="float">
            <text:p>0</text:p>
          </table:table-cell>
          <table:table-cell table:formula="of:=SUM([.J176:.J179])" office:value-type="float" office:value="80.2" calcext:value-type="float">
            <text:p>80.2</text:p>
          </table:table-cell>
          <table:table-cell table:style-name="ce31" table:formula="of:=SUM([.K176:.K179])" office:value-type="float" office:value="5.2" calcext:value-type="float">
            <text:p>5.2</text:p>
          </table:table-cell>
          <table:table-cell table:style-name="ce31" table:formula="of:=SUM([.L176:.L179])" office:value-type="float" office:value="84.2" calcext:value-type="float">
            <text:p>84.2</text:p>
          </table:table-cell>
          <table:table-cell table:formula="of:=SUM([.M176:.M179])" office:value-type="float" office:value="80.2" calcext:value-type="float">
            <text:p>80.2</text:p>
          </table:table-cell>
          <table:table-cell table:number-columns-repeated="19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nid</text:p>
          </table:table-cell>
          <table:table-cell office:value-type="float" office:value="1" calcext:value-type="float">
            <text:p>1</text:p>
          </table:table-cell>
          <table:table-cell table:style-name="ce33" table:formula="of:=SUM([.H182:.H186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2]+[.F18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81]-[.G181])*[.H182]+[.G182]+[.F182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I182]+[.C182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3]+[.F18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181]-[.G181])*[.H183]+[.G183]+[.F183]"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I183]+[.C183]" office:value-type="float" office:value="6.1" calcext:value-type="float">
            <text:p>6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4]+[.F18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81]-[.G181])*[.H184]+[.G184]+[.F184]"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I184]+[.C184]" office:value-type="float" office:value="3.7" calcext:value-type="float">
            <text:p>3.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5]+[.F185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81]-[.G181])*[.H185]+[.G185]+[.F185]"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I185]+[.C185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182:.C185])" office:value-type="float" office:value="0" calcext:value-type="float">
            <text:p>0</text:p>
          </table:table-cell>
          <table:table-cell table:formula="of:=SUM([.D182:.D185])" office:value-type="float" office:value="38" calcext:value-type="float">
            <text:p>3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1]-[.G181])*[.H186]+[.G186]+[.F186]"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/>
          <table:table-cell table:formula="of:=[.I186]+[.C18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2:.C186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[.I186]+[.I185]+[.I182]" office:value-type="float" office:value="50" calcext:value-type="float">
            <text:p>50</text:p>
          </table:table-cell>
          <table:table-cell table:style-name="Default" table:formula="of:=[.J186]+[.J185]+[.J182]" office:value-type="float" office:value="50" calcext:value-type="float">
            <text:p>50</text:p>
          </table:table-cell>
          <table:table-cell table:style-name="Default"/>
          <table:table-cell/>
          <table:table-cell table:style-name="Default" table:formula="of:=SUM([.M182:.M186])" office:value-type="float" office:value="59.8" calcext:value-type="float">
            <text:p>59.8</text:p>
          </table:table-cell>
          <table:table-cell table:style-name="Default" table:formula="of:=[.M186]+[.M185]+[.M182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Aegina</text:p>
          </table:table-cell>
          <table:table-cell office:value-type="float" office:value="1" calcext:value-type="float">
            <text:p>1</text:p>
          </table:table-cell>
          <table:table-cell table:style-name="ce33" table:formula="of:=SUM([.H189:.H19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9]+[.F189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188]-[.G188])*[.H189]+[.G189]+[.F189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formula="of:=[.J189]-[.J182]" office:value-type="float" office:value="0" calcext:value-type="float">
            <text:p>0</text:p>
          </table:table-cell>
          <table:table-cell/>
          <table:table-cell table:formula="of:=[.I189]+[.C189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0]+[.F190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0]+[.G190]+[.F19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0]+[.C190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1]+[.F191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1]+[.G191]+[.F19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1]+[.C19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192]+[.F192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88]-[.G188])*[.H192]+[.G192]+[.F192]"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table:formula="of:=[.J192]-[.J18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I192]+[.C192]" office:value-type="float" office:value="13.2" calcext:value-type="float">
            <text:p>13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89:.D192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8]-[.G188])*[.H193]+[.G193]+[.F193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93]-[.J186]" office:value-type="float" office:value="1" calcext:value-type="float">
            <text:p>1</text:p>
          </table:table-cell>
          <table:table-cell/>
          <table:table-cell table:formula="of:=[.I193]+[.C193]" office:value-type="float" office:value="13.4" calcext:value-type="float">
            <text:p>1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9:.C193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SUM([.I189:.I193])" office:value-type="float" office:value="47" calcext:value-type="float">
            <text:p>47</text:p>
          </table:table-cell>
          <table:table-cell table:style-name="Default" table:formula="of:=SUM([.J189:.J193])" office:value-type="float" office:value="47" calcext:value-type="float">
            <text:p>47</text:p>
          </table:table-cell>
          <table:table-cell table:style-name="Default" table:formula="of:=SUM([.K189:.K193])" office:value-type="float" office:value="-3" calcext:value-type="float">
            <text:p>-3</text:p>
          </table:table-cell>
          <table:table-cell/>
          <table:table-cell table:style-name="Default" table:formula="of:=SUM([.M189:.M193])" office:value-type="float" office:value="50" calcext:value-type="float">
            <text:p>50</text:p>
          </table:table-cell>
          <table:table-cell table:style-name="Default" table:formula="of:=[.M193]+[.M192]+[.M189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Perceval</text:p>
          </table:table-cell>
          <table:table-cell office:value-type="float" office:value="4" calcext:value-type="float">
            <text:p>4</text:p>
          </table:table-cell>
          <table:table-cell table:style-name="ce33" table:formula="of:=SUM([.H196:.H20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6]+[.F196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95]-[.G195])*[.H196]+[.G196]+[.F196]" office:value-type="float" office:value="25.1" calcext:value-type="float">
            <text:p>25.1</text:p>
          </table:table-cell>
          <table:table-cell office:value-type="float" office:value="25" calcext:value-type="float">
            <text:p>25</text:p>
          </table:table-cell>
          <table:table-cell table:formula="of:=[.J196]-[.J182]" office:value-type="float" office:value="2" calcext:value-type="float">
            <text:p>2</text:p>
          </table:table-cell>
          <table:table-cell/>
          <table:table-cell table:formula="of:=[.I196]+[.C196]" office:value-type="float" office:value="25.1" calcext:value-type="float">
            <text:p>25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7]+[.F197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7]+[.G197]+[.F1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7]+[.C197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8]+[.F198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8]+[.G198]+[.F19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8]+[.C19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199]+[.F199]" office:value-type="float" office:value="6" calcext:value-type="float">
            <text:p>6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95]-[.G195])*[.H199]+[.G199]+[.F199]"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table:formula="of:=[.J199]-[.J185]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I199]+[.C199]" office:value-type="float" office:value="10.3" calcext:value-type="float">
            <text:p>10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96:.D199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95]-[.G195])*[.H200]+[.G200]+[.F200]"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table:formula="of:=[.J200]-[.J186]" office:value-type="float" office:value="1" calcext:value-type="float">
            <text:p>1</text:p>
          </table:table-cell>
          <table:table-cell/>
          <table:table-cell table:formula="of:=[.I200]+[.C200]" office:value-type="float" office:value="14.6" calcext:value-type="float">
            <text:p>14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96:.C200])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table:formula="of:=SUM([.I196:.I200])" office:value-type="float" office:value="48" calcext:value-type="float">
            <text:p>48</text:p>
          </table:table-cell>
          <table:table-cell table:style-name="Default" table:formula="of:=SUM([.J196:.J200])" office:value-type="float" office:value="48" calcext:value-type="float">
            <text:p>48</text:p>
          </table:table-cell>
          <table:table-cell table:style-name="Default" table:formula="of:=SUM([.K196:.K200])" office:value-type="float" office:value="-2" calcext:value-type="float">
            <text:p>-2</text:p>
          </table:table-cell>
          <table:table-cell/>
          <table:table-cell table:style-name="Default" table:formula="of:=SUM([.M196:.M200])" office:value-type="float" office:value="50" calcext:value-type="float">
            <text:p>50</text:p>
          </table:table-cell>
          <table:table-cell table:style-name="Default" table:formula="of:=[.M200]+[.M199]+[.M196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Lynette</text:p>
          </table:table-cell>
          <table:table-cell office:value-type="float" office:value="17" calcext:value-type="float">
            <text:p>17</text:p>
          </table:table-cell>
          <table:table-cell table:style-name="ce33" table:formula="of:=SUM([.H203:.H207])*100" office:value-type="float" office:value="106.5" calcext:value-type="float">
            <text:p>106.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3]+[.F203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02]-[.G202])*[.H203]+[.G203]+[.F203]" office:value-type="float" office:value="25.8" calcext:value-type="float">
            <text:p>25.8</text:p>
          </table:table-cell>
          <table:table-cell office:value-type="float" office:value="25" calcext:value-type="float">
            <text:p>25</text:p>
          </table:table-cell>
          <table:table-cell table:formula="of:=[.I203]-[.I182]" office:value-type="float" office:value="2.4" calcext:value-type="float">
            <text:p>2.4</text:p>
          </table:table-cell>
          <table:table-cell/>
          <table:table-cell table:formula="of:=[.I203]+[.C203]" office:value-type="float" office:value="25.8" calcext:value-type="float">
            <text:p>25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04]+[.F204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formula="of:=([.I202]-[.G202])*[.H204]+[.G204]+[.F204]" office:value-type="float" office:value="4.97" calcext:value-type="float">
            <text:p>4.97</text:p>
          </table:table-cell>
          <table:table-cell office:value-type="float" office:value="0" calcext:value-type="float">
            <text:p>0</text:p>
          </table:table-cell>
          <table:table-cell table:formula="of:=[.I204]-[.I183]" office:value-type="float" office:value="-1.13" calcext:value-type="float">
            <text:p>-1.13</text:p>
          </table:table-cell>
          <table:table-cell office:value-type="float" office:value="1" calcext:value-type="float">
            <text:p>1</text:p>
          </table:table-cell>
          <table:table-cell table:formula="of:=[.I204]+[.C204]" office:value-type="float" office:value="5.97" calcext:value-type="float">
            <text:p>5.9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5]+[.F205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202]-[.G202])*[.H205]+[.G205]+[.F205]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formula="of:=[.I205]-[.I184]" office:value-type="float" office:value="0.2" calcext:value-type="float">
            <text:p>0.2</text:p>
          </table:table-cell>
          <table:table-cell/>
          <table:table-cell table:formula="of:=[.I205]+[.C205]" office:value-type="float" office:value="3.9" calcext:value-type="float">
            <text:p>3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06]+[.F206]" office:value-type="float" office:value="13" calcext:value-type="float">
            <text:p>13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02]-[.G202])*[.H206]+[.G206]+[.F206]"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table:formula="of:=[.I206]-[.I185]" office:value-type="float" office:value="-5.8" calcext:value-type="float">
            <text:p>-5.8</text:p>
          </table:table-cell>
          <table:table-cell office:value-type="float" office:value="4" calcext:value-type="float">
            <text:p>4</text:p>
          </table:table-cell>
          <table:table-cell table:formula="of:=[.I206]+[.C20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SUM([.D203:.D206])" office:value-type="float" office:value="49" calcext:value-type="float">
            <text:p>49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02]-[.G202])*[.H207]+[.G207]+[.F207]"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table:formula="of:=[.I207]-[.I186]" office:value-type="float" office:value="-4.6" calcext:value-type="float">
            <text:p>-4.6</text:p>
          </table:table-cell>
          <table:table-cell office:value-type="float" office:value="6" calcext:value-type="float">
            <text:p>6</text:p>
          </table:table-cell>
          <table:table-cell table:formula="of:=[.I207]+[.C207]" office:value-type="float" office:value="13.8" calcext:value-type="float">
            <text:p>13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03:.C207])" office:value-type="float" office:value="11" calcext:value-type="float">
            <text:p>11</text:p>
          </table:table-cell>
          <table:table-cell table:style-name="Default" table:number-columns-repeated="5"/>
          <table:table-cell table:style-name="Default" table:formula="of:=[.I207]+[.I206]+[.I203]" office:value-type="float" office:value="42" calcext:value-type="float">
            <text:p>42</text:p>
          </table:table-cell>
          <table:table-cell table:style-name="Default" table:formula="of:=SUM([.J203:.J207])" office:value-type="float" office:value="41" calcext:value-type="float">
            <text:p>41</text:p>
          </table:table-cell>
          <table:table-cell table:style-name="Default" table:formula="of:=SUM([.K203:.K207])" office:value-type="float" office:value="-8.93" calcext:value-type="float">
            <text:p>-8.93</text:p>
          </table:table-cell>
          <table:table-cell/>
          <table:table-cell table:style-name="Default" table:formula="of:=SUM([.M203:.M207])" office:value-type="float" office:value="61.87" calcext:value-type="float">
            <text:p>61.87</text:p>
          </table:table-cell>
          <table:table-cell table:style-name="Default" table:formula="of:=[.M207]+[.M206]+[.M203]" office:value-type="float" office:value="52" calcext:value-type="float">
            <text:p>52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aphira</text:p>
          </table:table-cell>
          <table:table-cell office:value-type="float" office:value="1" calcext:value-type="float">
            <text:p>1</text:p>
          </table:table-cell>
          <table:table-cell table:style-name="ce33" table:formula="of:=SUM([.H210:.H21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10]+[.F210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09]-[.G209])*[.H210]+[.G210]+[.F210]" office:value-type="float" office:value="22.4" calcext:value-type="float">
            <text:p>22.4</text:p>
          </table:table-cell>
          <table:table-cell office:value-type="float" office:value="22" calcext:value-type="float">
            <text:p>22</text:p>
          </table:table-cell>
          <table:table-cell table:formula="of:=[.J210]-[.J196]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I210]+[.C210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1]+[.F211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1]+[.G211]+[.F2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1]+[.C21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2]+[.F212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2]+[.G212]+[.F2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2]+[.C21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13]+[.F213]"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209]-[.G209])*[.H213]+[.G213]+[.F213]"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table:formula="of:=[.J213]-[.J19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213]+[.C213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SUM([.D210:.D213])" office:value-type="float" office:value="26" calcext:value-type="float">
            <text:p>26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([.I209]-[.G209])*[.H214]+[.G214]+[.F214]"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table:formula="of:=[.J214]-[.J200]" office:value-type="float" office:value="2" calcext:value-type="float">
            <text:p>2</text:p>
          </table:table-cell>
          <table:table-cell/>
          <table:table-cell table:formula="of:=[.I214]+[.C214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0:.C214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[.I214]+[.I213]+[.I210]" office:value-type="float" office:value="48" calcext:value-type="float">
            <text:p>48</text:p>
          </table:table-cell>
          <table:table-cell table:style-name="Default" table:formula="of:=SUM([.J210:.J214])" office:value-type="float" office:value="48" calcext:value-type="float">
            <text:p>48</text:p>
          </table:table-cell>
          <table:table-cell table:style-name="Default" table:formula="of:=SUM([.K210:.K214])" office:value-type="float" office:value="0" calcext:value-type="float">
            <text:p>0</text:p>
          </table:table-cell>
          <table:table-cell/>
          <table:table-cell table:style-name="Default" table:formula="of:=SUM([.M210:.M214])" office:value-type="float" office:value="51" calcext:value-type="float">
            <text:p>51</text:p>
          </table:table-cell>
          <table:table-cell table:style-name="Default" table:formula="of:=[.M214]+[.M213]+[.M210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Izerna</text:p>
          </table:table-cell>
          <table:table-cell office:value-type="float" office:value="1" calcext:value-type="float">
            <text:p>1</text:p>
          </table:table-cell>
          <table:table-cell table:style-name="ce33" table:formula="of:=SUM([.H217:.H22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7]+[.F217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16]-[.G216])*[.H217]+[.G217]+[.F217]" office:value-type="float" office:value="23.4" calcext:value-type="float">
            <text:p>23.4</text:p>
          </table:table-cell>
          <table:table-cell office:value-type="float" office:value="22" calcext:value-type="float">
            <text:p>22</text:p>
          </table:table-cell>
          <table:table-cell table:formula="of:=[.J217]-[.J202]" office:value-type="float" office:value="22" calcext:value-type="float">
            <text:p>22</text:p>
          </table:table-cell>
          <table:table-cell/>
          <table:table-cell table:formula="of:=[.I217]+[.C217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8]+[.F218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8]+[.G218]+[.F2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8]+[.C21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9]+[.F219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9]+[.G219]+[.F2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9]+[.C21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0]+[.F220]"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16]-[.G216])*[.H220]+[.G220]+[.F220]"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table:formula="of:=[.J220]-[.J205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I220]+[.C220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D217:.D220])" office:value-type="float" office:value="25" calcext:value-type="float">
            <text:p>25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216]-[.G216])*[.H221]+[.G221]+[.F221]"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table:formula="of:=[.J221]-[.J20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I221]+[.C221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7:.C221])" office:value-type="float" office:value="5" calcext:value-type="float">
            <text:p>5</text:p>
          </table:table-cell>
          <table:table-cell table:style-name="Default" table:number-columns-repeated="5"/>
          <table:table-cell table:style-name="Default" table:formula="of:=[.I221]+[.I220]+[.I217]" office:value-type="float" office:value="46" calcext:value-type="float">
            <text:p>46</text:p>
          </table:table-cell>
          <table:table-cell table:style-name="Default" table:formula="of:=SUM([.J217:.J221])" office:value-type="float" office:value="48" calcext:value-type="float">
            <text:p>48</text:p>
          </table:table-cell>
          <table:table-cell table:style-name="Default" table:formula="of:=SUM([.K217:.K221])" office:value-type="float" office:value="40" calcext:value-type="float">
            <text:p>40</text:p>
          </table:table-cell>
          <table:table-cell/>
          <table:table-cell table:style-name="Default" table:formula="of:=SUM([.M217:.M221])" office:value-type="float" office:value="51" calcext:value-type="float">
            <text:p>51</text:p>
          </table:table-cell>
          <table:table-cell table:style-name="Default" table:formula="of:=[.M221]+[.M220]+[.M217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Owen</text:p>
          </table:table-cell>
          <table:table-cell office:value-type="float" office:value="12" calcext:value-type="float">
            <text:p>12</text:p>
          </table:table-cell>
          <table:table-cell table:style-name="ce33" table:formula="of:=SUM([.H224:.H22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 office:value-type="string" calcext:value-type="string">
            <text:p>Hp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23]-[.G223])*[.H224]+[.G224]+[.F224]" office:value-type="float" office:value="23.3" calcext:value-type="float">
            <text:p>23.3</text:p>
          </table:table-cell>
          <table:table-cell office:value-type="float" office:value="23" calcext:value-type="float">
            <text:p>23</text:p>
          </table:table-cell>
          <table:table-cell table:formula="of:=[.J224]-[.J182]" office:value-type="float" office:value="0" calcext:value-type="float">
            <text:p>0</text:p>
          </table:table-cell>
          <table:table-cell/>
          <table:table-cell table:formula="of:=[.I224]+[.C224]" office:value-type="float" office:value="23.3" calcext:value-type="float">
            <text:p>23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5]+[.F225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5]+[.G225]+[.F22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5]+[.C22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6]+[.F226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6]+[.G226]+[.F2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6]+[.C226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7]+[.F22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23]-[.G223])*[.H227]+[.G227]+[.F227]"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table:formula="of:=[.J227]-[.J185]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formula="of:=[.I227]+[.C227]" office:value-type="float" office:value="8.9" calcext:value-type="float">
            <text:p>8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C228]+[.F228]" office:value-type="float" office:value="16" calcext:value-type="float">
            <text:p>16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23]-[.G223])*[.H228]+[.G228]+[.F228]"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table:formula="of:=[.J228]-[.J186]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formula="of:=[.I228]+[.C228]" office:value-type="float" office:value="17.8" calcext:value-type="float">
            <text:p>17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formula="of:=SUM([.C225:.C228])" office:value-type="float" office:value="10" calcext:value-type="float">
            <text:p>10</text:p>
          </table:table-cell>
          <table:table-cell table:formula="of:=SUM([.D225:.D228])" office:value-type="float" office:value="24" calcext:value-type="float">
            <text:p>24</text:p>
          </table:table-cell>
          <table:table-cell table:style-name="Default" table:number-columns-repeated="4"/>
          <table:table-cell table:style-name="Default" table:formula="of:=[.I228]+[.I227]+[.I224]" office:value-type="float" office:value="40" calcext:value-type="float">
            <text:p>40</text:p>
          </table:table-cell>
          <table:table-cell table:style-name="Default" table:formula="of:=SUM([.J224:.J228])" office:value-type="float" office:value="40" calcext:value-type="float">
            <text:p>40</text:p>
          </table:table-cell>
          <table:table-cell table:style-name="Default" table:formula="of:=SUM([.K224:.K228])" office:value-type="float" office:value="-10" calcext:value-type="float">
            <text:p>-10</text:p>
          </table:table-cell>
          <table:table-cell/>
          <table:table-cell table:style-name="Default" table:formula="of:=SUM([.M224:.M228])" office:value-type="float" office:value="50" calcext:value-type="float">
            <text:p>50</text:p>
          </table:table-cell>
          <table:table-cell table:style-name="Default" table:formula="of:=[.M228]+[.M227]+[.M224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25:.C229])" office:value-type="float" office:value="20" calcext:value-type="float">
            <text:p>20</text:p>
          </table:table-cell>
          <table:table-cell table:style-name="Default"/>
          <table:table-cell/>
          <table:table-cell office:value-type="string" calcext:value-type="string">
            <text:p>Clifford</text:p>
          </table:table-cell>
          <table:table-cell office:value-type="float" office:value="20" calcext:value-type="float">
            <text:p>20</text:p>
          </table:table-cell>
          <table:table-cell table:style-name="ce33" table:formula="of:=SUM([.H231:.H235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To Elbert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31]+[.F231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30]-[.G230])*[.H231]+[.G231]+[.F231]"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[.I231]-[.I238]" office:value-type="float" office:value="-3.8" calcext:value-type="float">
            <text:p>-3.8</text:p>
          </table:table-cell>
          <table:table-cell office:value-type="float" office:value="4" calcext:value-type="float">
            <text:p>4</text:p>
          </table:table-cell>
          <table:table-cell table:formula="of:=[.I231]+[.C231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2]+[.F232]" office:value-type="float" office:value="15" calcext:value-type="float">
            <text:p>15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30]-[.G230])*[.H232]+[.G232]+[.F23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I232]-[.I239]" office:value-type="float" office:value="-2.4" calcext:value-type="float">
            <text:p>-2.4</text:p>
          </table:table-cell>
          <table:table-cell office:value-type="float" office:value="2" calcext:value-type="float">
            <text:p>2</text:p>
          </table:table-cell>
          <table:table-cell table:formula="of:=[.I232]+[.C232]" office:value-type="float" office:value="15" calcext:value-type="float">
            <text:p>15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3]+[.F233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3]+[.G233]+[.F23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I233]-[.I240]" office:value-type="float" office:value="-0.199999999999999" calcext:value-type="float">
            <text:p>-0.199999999999999</text:p>
          </table:table-cell>
          <table:table-cell office:value-type="float" office:value="0" calcext:value-type="float">
            <text:p>0</text:p>
          </table:table-cell>
          <table:table-cell table:formula="of:=[.I233]+[.C233]" office:value-type="float" office:value="11" calcext:value-type="float">
            <text:p>1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4]+[.F234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4]+[.G234]+[.F234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I234]-[.I241]" office:value-type="float" office:value="-2.2" calcext:value-type="float">
            <text:p>-2.2</text:p>
          </table:table-cell>
          <table:table-cell office:value-type="float" office:value="2" calcext:value-type="float">
            <text:p>2</text:p>
          </table:table-cell>
          <table:table-cell table:formula="of:=[.I234]+[.C234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31:.D234])" office:value-type="float" office:value="80" calcext:value-type="float">
            <text:p>8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30]-[.G230])*[.H235]+[.G235]+[.F235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I235]-[.I2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35]+[.C23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1:.C235])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table:formula="of:=SUM([.I231:.I235])" office:value-type="float" office:value="72" calcext:value-type="float">
            <text:p>72</text:p>
          </table:table-cell>
          <table:table-cell table:style-name="Default" table:formula="of:=SUM([.J231:.J235])" office:value-type="float" office:value="40" calcext:value-type="float">
            <text:p>40</text:p>
          </table:table-cell>
          <table:table-cell table:style-name="Default" table:formula="of:=SUM([.K231:.K235])" office:value-type="float" office:value="-8.6" calcext:value-type="float">
            <text:p>-8.6</text:p>
          </table:table-cell>
          <table:table-cell/>
          <table:table-cell table:style-name="Default" table:formula="of:=SUM([.M231:.M235])" office:value-type="float" office:value="80" calcext:value-type="float">
            <text:p>80</text:p>
          </table:table-cell>
          <table:table-cell table:style-name="Default" table:formula="of:=[.M235]+[.M234]+[.M231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33" table:formula="of:=SUM([.H238:.H241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To Arthur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8]+[.F238]" office:value-type="float" office:value="33" calcext:value-type="float">
            <text:p>33</text:p>
          </table:table-cell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37]-[.G237])*[.H238]+[.G238]+[.F238]" office:value-type="float" office:value="39.8" calcext:value-type="float">
            <text:p>39.8</text:p>
          </table:table-cell>
          <table:table-cell office:value-type="float" office:value="38" calcext:value-type="float">
            <text:p>38</text:p>
          </table:table-cell>
          <table:table-cell table:formula="of:=[.J238]-[.J232]" office:value-type="float" office:value="38" calcext:value-type="float">
            <text:p>38</text:p>
          </table:table-cell>
          <table:table-cell/>
          <table:table-cell table:formula="of:=[.I238]+[.C238]" office:value-type="float" office:value="39.8" calcext:value-type="float">
            <text:p>39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9]+[.F23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237]-[.G237])*[.H239]+[.G239]+[.F239]" office:value-type="float" office:value="15.4" calcext:value-type="float">
            <text:p>15.4</text:p>
          </table:table-cell>
          <table:table-cell office:value-type="float" office:value="14" calcext:value-type="float">
            <text:p>14</text:p>
          </table:table-cell>
          <table:table-cell table:formula="of:=[.J239]-[.J233]" office:value-type="float" office:value="14" calcext:value-type="float">
            <text:p>14</text:p>
          </table:table-cell>
          <table:table-cell/>
          <table:table-cell table:formula="of:=[.I239]+[.C239]" office:value-type="float" office:value="15.4" calcext:value-type="float">
            <text:p>15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0]+[.F240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237]-[.G237])*[.H240]+[.G240]+[.F240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formula="of:=[.J240]-[.J234]" office:value-type="float" office:value="4" calcext:value-type="float">
            <text:p>4</text:p>
          </table:table-cell>
          <table:table-cell/>
          <table:table-cell table:formula="of:=[.I240]+[.C240]" office:value-type="float" office:value="11.2" calcext:value-type="float">
            <text:p>11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1]+[.F241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237]-[.G237])*[.H241]+[.G241]+[.F241]" office:value-type="float" office:value="14.2" calcext:value-type="float">
            <text:p>14.2</text:p>
          </table:table-cell>
          <table:table-cell office:value-type="float" office:value="13" calcext:value-type="float">
            <text:p>13</text:p>
          </table:table-cell>
          <table:table-cell table:formula="of:=[.J241]-[.J235]" office:value-type="float" office:value="2" calcext:value-type="float">
            <text:p>2</text:p>
          </table:table-cell>
          <table:table-cell/>
          <table:table-cell table:formula="of:=[.I241]+[.C241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238:.C241])" office:value-type="float" office:value="0" calcext:value-type="float">
            <text:p>0</text:p>
          </table:table-cell>
          <table:table-cell table:formula="of:=SUM([.D238:.D241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2]+[.G242]" office:value-type="float" office:value="0" calcext:value-type="float">
            <text:p>0</text:p>
          </table:table-cell>
          <table:table-cell table:formula="of:=([.I237]-[.G237])*[.H242]+[.G242]+[.F242]" office:value-type="float" office:value="0" calcext:value-type="float">
            <text:p>0</text:p>
          </table:table-cell>
          <table:table-cell/>
          <table:table-cell table:style-name="ce31" table:formula="of:=SUM([.K238:.K241])" office:value-type="float" office:value="58" calcext:value-type="float">
            <text:p>58</text:p>
          </table:table-cell>
          <table:table-cell/>
          <table:table-cell table:formula="of:=[.I242]+[.C24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8:.C242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SUM([.I238:.I242])" office:value-type="float" office:value="80.6" calcext:value-type="float">
            <text:p>80.6</text:p>
          </table:table-cell>
          <table:table-cell table:style-name="Default" table:formula="of:=SUM([.J238:.J242])" office:value-type="float" office:value="75" calcext:value-type="float">
            <text:p>75</text:p>
          </table:table-cell>
          <table:table-cell table:style-name="Default" table:formula="of:=SUM([.K238:.K242])" office:value-type="float" office:value="116" calcext:value-type="float">
            <text:p>116</text:p>
          </table:table-cell>
          <table:table-cell/>
          <table:table-cell table:style-name="Default" table:formula="of:=SUM([.M238:.M242])" office:value-type="float" office:value="80.6" calcext:value-type="float">
            <text:p>80.6</text:p>
          </table:table-cell>
          <table:table-cell table:style-name="Default" table:formula="of:=[.M242]+[.M241]+[.M238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Ward</text:p>
          </table:table-cell>
          <table:table-cell office:value-type="float" office:value="22" calcext:value-type="float">
            <text:p>22</text:p>
          </table:table-cell>
          <table:table-cell table:style-name="ce33" table:formula="of:=SUM([.H245:.H249])*100"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5]+[.F245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44]-[.G244])*[.H245]+[.G245]+[.F245]"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F245]-[.I24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5]+[.C245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6]+[.F246]" office:value-type="float" office:value="16" calcext:value-type="float">
            <text:p>16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44]-[.G244])*[.H246]+[.G246]+[.F24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246]-[.I2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6]+[.C246]" office:value-type="float" office:value="16" calcext:value-type="float">
            <text:p>1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7]+[.F247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7]+[.G247]+[.F2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247]-[.I24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7]+[.C247]" office:value-type="float" office:value="12" calcext:value-type="float">
            <text:p>1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8]+[.F248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8]+[.G248]+[.F248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248]-[.I2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8]+[.C248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45:.D248])" office:value-type="float" office:value="82" calcext:value-type="float">
            <text:p>82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44]-[.G244])*[.H249]+[.G249]+[.F249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249]-[.I249]" office:value-type="float" office:value="0" calcext:value-type="float">
            <text:p>0</text:p>
          </table:table-cell>
          <table:table-cell/>
          <table:table-cell table:formula="of:=[.I249]+[.C24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45:.C249])" office:value-type="float" office:value="14" calcext:value-type="float">
            <text:p>14</text:p>
          </table:table-cell>
          <table:table-cell table:style-name="Default" table:number-columns-repeated="5"/>
          <table:table-cell table:style-name="Default" table:formula="of:=SUM([.I245:.I249])" office:value-type="float" office:value="68" calcext:value-type="float">
            <text:p>68</text:p>
          </table:table-cell>
          <table:table-cell table:style-name="Default"/>
          <table:table-cell table:style-name="Default" table:formula="of:=SUM([.K245:.K249])" office:value-type="float" office:value="0" calcext:value-type="float">
            <text:p>0</text:p>
          </table:table-cell>
          <table:table-cell table:formula="of:=SUM([.L245:.L249])" office:value-type="float" office:value="14" calcext:value-type="float">
            <text:p>14</text:p>
          </table:table-cell>
          <table:table-cell table:style-name="Default" table:formula="of:=SUM([.M245:.M249])" office:value-type="float" office:value="82" calcext:value-type="float">
            <text:p>82</text:p>
          </table:table-cell>
          <table:table-cell table:style-name="Default" table:formula="of:=[.M249]+[.M248]+[.M245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10"/>
          <table:table-cell table:style-name="Default" office:value-type="float" office:value="13" calcext:value-type="float">
            <text:p>13</text:p>
          </table:table-cell>
          <table:table-cell/>
          <table:table-cell table:style-name="Default" table:number-columns-repeated="2"/>
          <table:table-cell table:number-columns-repeated="18"/>
        </table:table-row>
      </table:table>
      <table:named-expressions/>
      <table:database-ranges>
        <table:database-range table:name="__Anonymous_Sheet_DB__1" table:target-range-address="Sheet2.A37:Sheet2.N2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 style:data-style-name="N2" text:time-value="16:16:42.07446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0T09:06:50.176302100</meta:creation-date>
    <meta:editing-duration>P1DT11H38M6S</meta:editing-duration>
    <meta:editing-cycles>167</meta:editing-cycles>
    <meta:generator>LibreOffice/26.2.4.2$Windows_X86_64 LibreOffice_project/0229ac93fcf0d7cbc6376066c6f35021cef002dc</meta:generator>
    <dc:date>2026-07-20T16:21:47.647453600</dc:date>
    <meta:document-statistic meta:table-count="2" meta:cell-count="4135" meta:object-count="0"/>
  </office:meta>
</office:document-meta>
</file>