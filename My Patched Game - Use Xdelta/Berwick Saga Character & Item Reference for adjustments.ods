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26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4"/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 table:formula="of:=[.BB45]*[.BC44]/[.BB44]" office:value-type="float" office:value="2079.20792079208" calcext:value-type="float">
            <text:p>2079.20792079208</text:p>
          </table:table-cell>
          <table:table-cell table:number-columns-repeated="11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156.19047619048" calcext:value-type="float">
            <text:p>6156.1904761904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61904761904762" calcext:value-type="float">
            <text:p>7.61904761904762</text:p>
          </table:table-cell>
          <table:table-cell table:number-columns-repeated="3" office:value-type="float" office:value="7.84313725490196" calcext:value-type="float">
            <text:p>7.8431372549019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16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9" calcext:value-type="float">
            <text:p>1009.615384615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table:number-columns-repeated="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2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74]/[.BF74]/[.BG74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yrmShield</text:p>
          </table:table-cell>
          <table:table-cell table:formula="of:=[.BF75]*[.BG75]*[.BH74]" office:value-type="float" office:value="10773.3333333333" calcext:value-type="float">
            <text:p>10773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BE75]/[.BF75]/[.BG75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atherL</text:p>
          </table:table-cell>
          <table:table-cell table:formula="of:=[.BF76]*[.BG76]*[.BH76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7.77934936350778/2"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6" calcext:value-type="float">
            <text:p>3028.846153846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WideL</text:p>
          </table:table-cell>
          <table:table-cell table:formula="of:=[.BF77]*[.BG77]*[.BH77]" office:value-type="float" office:value="2450.49504950495" calcext:value-type="float">
            <text:p>2450.4950495049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ronL</text:p>
          </table:table-cell>
          <table:table-cell table:formula="of:=[.BF78]*[.BG78]*[.BH78]" office:value-type="float" office:value="4364.21499292787" calcext:value-type="float">
            <text:p>4364.2149929278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Great</text:p>
          </table:table-cell>
          <table:table-cell table:formula="of:=[.BF79]*[.BG79]*[.BH79]" office:value-type="float" office:value="10214.2857142857" calcext:value-type="float">
            <text:p>10214.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string" calcext:value-type="string">
            <text:p>IronL</text:p>
          </table:table-cell>
          <table:table-cell table:formula="of:=[.BF80]*[.BG80]*[.BH80]" office:value-type="float" office:value="8642.85714285714" calcext:value-type="float">
            <text:p>8642.8571428571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Verian</text:p>
          </table:table-cell>
          <table:table-cell table:formula="of:=[.BF81]*[.BG81]*[.BH81]" office:value-type="float" office:value="1905.94059405941" calcext:value-type="float">
            <text:p>1905.940594059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</text:p>
          </table:table-cell>
          <table:table-cell table:formula="of:=[.BF82]*[.BG82]*[.BH82]" office:value-type="float" office:value="925.742574257426" calcext:value-type="float">
            <text:p>925.742574257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SolL+</text:p>
          </table:table-cell>
          <table:table-cell table:formula="of:=[.BF83]*[.BG83]*[.BH83]" office:value-type="float" office:value="1190.24045261669" calcext:value-type="float">
            <text:p>1190.240452616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24"/>
          <table:table-cell office:value-type="string" calcext:value-type="string">
            <text:p>ImpOffL</text:p>
          </table:table-cell>
          <table:table-cell table:formula="of:=[.BF84]*[.BG84]*[.BH84]" office:value-type="float" office:value="1454.73833097595" calcext:value-type="float">
            <text:p>1454.7383309759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/>
          <table:table-cell office:value-type="string" calcext:value-type="string">
            <text:p>ImpKnightL</text:p>
          </table:table-cell>
          <table:table-cell table:formula="of:=[.BF85]*[.BG85]*[.BH85]" office:value-type="float" office:value="1719.23620933522" calcext:value-type="float">
            <text:p>1719.236209335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.88967468175389" calcext:value-type="float">
            <text:p>3.88967468175389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erianMshield</text:p>
          </table:table-cell>
          <table:table-cell table:formula="of:=[.BF86]*[.BG86]*[.BH86]" office:value-type="float" office:value="1584.76190476191" calcext:value-type="float">
            <text:p>1584.7619047619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mpSoldierMshield</text:p>
          </table:table-cell>
          <table:table-cell table:formula="of:=[.BF87]*[.BG87]*[.BH87]" office:value-type="float" office:value="1036.19047619048" calcext:value-type="float">
            <text:p>1036.1904761904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mpSolMshield+</text:p>
          </table:table-cell>
          <table:table-cell table:formula="of:=[.BF88]*[.BG88]*[.BH88]" office:value-type="float" office:value="1295.2380952381" calcext:value-type="float">
            <text:p>1295.238095238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OffMshield</text:p>
          </table:table-cell>
          <table:table-cell table:formula="of:=[.BF89]*[.BG89]*[.BH89]" office:value-type="float" office:value="1554.28571428571" calcext:value-type="float">
            <text:p>1554.2857142857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14"/>
          <table:table-cell office:value-type="string" calcext:value-type="string">
            <text:p>ImpKnightMsh</text:p>
          </table:table-cell>
          <table:table-cell table:formula="of:=[.BF90]*[.BG90]*[.BH90]" office:value-type="float" office:value="1813.33333333333" calcext:value-type="float">
            <text:p>1813.333333333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VerianSShield</text:p>
          </table:table-cell>
          <table:table-cell table:formula="of:=[.BF91]*[.BG91]*[.BH91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ImpSolSShield</text:p>
          </table:table-cell>
          <table:table-cell table:formula="of:=[.BF92]*[.BG92]*[.BH92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ImpSolShield+</text:p>
          </table:table-cell>
          <table:table-cell table:formula="of:=[.BF93]*[.BG93]*[.BH93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ImpOffSShield</text:p>
          </table:table-cell>
          <table:table-cell table:formula="of:=[.BF94]*[.BG94]*[.BH94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ImpKnightSshield</text:p>
          </table:table-cell>
          <table:table-cell table:formula="of:=[.BF95]*[.BG95]*[.BH95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24"/>
          <table:table-cell office:value-type="string" calcext:value-type="string">
            <text:p>Aspis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E97]/[.BF97]/[.BG97]"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WindShield</text:p>
          </table:table-cell>
          <table:table-cell table:style-name="ce8" table:formula="of:=[.BF98]*[.BG98]*[.BH98]+1000" office:value-type="float" office:value="3331.42857142857" calcext:value-type="float">
            <text:p>3331.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17"/>
          <table:table-cell office:value-type="string" calcext:value-type="string">
            <text:p>MithrilS</text:p>
          </table:table-cell>
          <table:table-cell table:style-name="ce8" table:formula="of:=[.BF99]*[.BG99]*[.BH99]+1000" office:value-type="float" office:value="7156.19047619048" calcext:value-type="float">
            <text:p>7156.1904761904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etalShield</text:p>
          </table:table-cell>
          <table:table-cell table:style-name="ce8" table:formula="of:=[.BF100]*[.BG100]*[.BH100]" office:value-type="float" office:value="3108.57142857143" calcext:value-type="float">
            <text:p>3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10"/>
          <table:table-cell office:value-type="string" calcext:value-type="string">
            <text:p>LadyShield</text:p>
          </table:table-cell>
          <table:table-cell table:style-name="ce8" table:formula="of:=[.BF101]*[.BG101]*[.BH101]+1000" office:value-type="float" office:value="4108.57142857143" calcext:value-type="float">
            <text:p>4108.5714285714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10"/>
          <table:table-cell office:value-type="string" calcext:value-type="string">
            <text:p>Aiantos</text:p>
          </table:table-cell>
          <table:table-cell table:style-name="ce8" table:formula="of:=[.BF102]*[.BG102]*[.BH102]+1000" office:value-type="float" office:value="6440" calcext:value-type="float">
            <text:p>64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oundShield</text:p>
          </table:table-cell>
          <table:table-cell table:style-name="ce8" table:formula="of:=[.BF103]*[.BG103]*[.BH103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6"/>
          <table:table-cell table:style-name="ce8" table:formula="of:=[.BF104]*[.BG104]*[.BH104]+1000" office:value-type="float" office:value="2280" calcext:value-type="float">
            <text:p>2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6"/>
          <table:table-cell table:formula="of:=[.BF105]*[.BG105]*[.BH105]" office:value-type="float" office:value="114.285714285714" calcext:value-type="float">
            <text:p>114.2857142857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3" calcext:value-type="float">
            <text:p>817.3076923076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ImpSolSshield</text:p>
          </table:table-cell>
          <table:table-cell table:formula="of:=[.BF106]*[.BG106]*[.BH106]" office:value-type="float" office:value="259.047619047619" calcext:value-type="float">
            <text:p>259.0476190476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VerianSshield</text:p>
          </table:table-cell>
          <table:table-cell table:formula="of:=[.BF107]*[.BG107]*[.BH107]" office:value-type="float" office:value="533.333333333334" calcext:value-type="float">
            <text:p>533.333333333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ImpSolSshield+</text:p>
          </table:table-cell>
          <table:table-cell table:formula="of:=[.BF108]*[.BG108]*[.BH108]" office:value-type="float" office:value="518.095238095238" calcext:value-type="float">
            <text:p>518.095238095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officer</text:p>
          </table:table-cell>
          <table:table-cell table:formula="of:=[.BF109]*[.BG109]*[.BH109]" office:value-type="float" office:value="777.142857142857" calcext:value-type="float">
            <text:p>777.1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knight</text:p>
          </table:table-cell>
          <table:table-cell table:formula="of:=[.BF110]*[.BG110]*[.BH110]" office:value-type="float" office:value="1036.19047619048" calcext:value-type="float">
            <text:p>1036.1904761904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3" calcext:value-type="float">
            <text:p>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13"/>
          <table:table-cell table:formula="of:=[.BF111]*[.BG111]*[.BH111]" office:value-type="float" office:value="129.52380952381" calcext:value-type="float">
            <text:p>12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PrototypeShield</text:p>
          </table:table-cell>
          <table:table-cell table:formula="of:=[.BF112]*[.BG112]*[.BH112]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.61904761904762" calcext:value-type="float">
            <text:p>7.61904761904762</text:p>
          </table:table-cell>
          <table:table-cell table:number-columns-repeated="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668.57142857143" calcext:value-type="float">
            <text:p>1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5" calcext:value-type="float">
            <text:p>3342.8571428571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7" calcext:value-type="float">
            <text:p>1379.59183673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9" calcext:value-type="float">
            <text:p>541.2244897959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2" calcext:value-type="float">
            <text:p>1114.285714285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8" calcext:value-type="float">
            <text:p>827.7551020408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2942.30769230768" calcext:value-type="float">
            <text:p>2942.307692307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3999.99999999999" calcext:value-type="float">
            <text:p>3999.999999999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8076.92307692305" calcext:value-type="float">
            <text:p>8076.9230769230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table:table-column table:style-name="co2" table:default-cell-style-name="ce22"/>
        <table:table-column table:style-name="co3" table:default-cell-style-name="ce22"/>
        <table:table-column table:style-name="co1" table:number-columns-repeated="8" table:default-cell-style-name="ce22"/>
        <table:table-column table:style-name="co1" table:default-cell-style-name="ce30"/>
        <table:table-column table:style-name="co4" table:default-cell-style-name="Default"/>
        <table:table-column table:style-name="co1" table:number-columns-repeated="2" table:default-cell-style-name="ce22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24" table:formula="of:=SUM([.H32:.H36])*100" office:value-type="float" office:value="100" calcext:value-type="float">
            <text:p>100</text:p>
          </table:table-cell>
          <table:table-cell table:style-name="ce25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24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/>
          <table:table-cell table:style-name="ce22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25"/>
          <table:table-cell table:style-name="ce27"/>
          <table:table-cell table:style-name="ce22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25"/>
          <table:table-cell table:style-name="ce27"/>
          <table:table-cell table:style-name="ce22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25"/>
          <table:table-cell table:style-name="ce27"/>
          <table:table-cell table:style-name="ce22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25"/>
          <table:table-cell table:style-name="ce27"/>
          <table:table-cell table:style-name="ce22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25"/>
          <table:table-cell table:style-name="ce22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24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22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27" table:formula="of:=[.J44]-[.E38]" office:value-type="string" office:string-value="" calcext:value-type="error">
            <text:p>#VALUE!</text:p>
          </table:table-cell>
          <table:table-cell table:style-name="ce22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27" table:formula="of:=[.J45]-[.E39]" office:value-type="string" office:string-value="" calcext:value-type="error">
            <text:p>#VALUE!</text:p>
          </table:table-cell>
          <table:table-cell table:style-name="ce22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27" table:formula="of:=[.J46]-[.E40]" office:value-type="string" office:string-value="" calcext:value-type="error">
            <text:p>#VALUE!</text:p>
          </table:table-cell>
          <table:table-cell table:style-name="ce22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27" table:formula="of:=[.J47]-[.E41]" office:value-type="string" office:string-value="" calcext:value-type="error">
            <text:p>#VALUE!</text:p>
          </table:table-cell>
          <table:table-cell table:style-name="ce22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22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24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26" office:value-type="string" calcext:value-type="string">
            <text:p>To sylvis</text:p>
          </table:table-cell>
          <table:table-cell table:style-name="ce22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28" table:formula="of:=[.J50]-[.J44]" office:value-type="float" office:value="1" calcext:value-type="float">
            <text:p>1</text:p>
          </table:table-cell>
          <table:table-cell table:style-name="ce30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28" table:formula="of:=[.J51]-[.J45]" office:value-type="float" office:value="-1" calcext:value-type="float">
            <text:p>-1</text:p>
          </table:table-cell>
          <table:table-cell table:style-name="ce30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28" table:formula="of:=[.J52]-[.J46]" office:value-type="float" office:value="1" calcext:value-type="float">
            <text:p>1</text:p>
          </table:table-cell>
          <table:table-cell table:style-name="ce30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28" table:formula="of:=[.J53]-[.J47]" office:value-type="float" office:value="1" calcext:value-type="float">
            <text:p>1</text:p>
          </table:table-cell>
          <table:table-cell table:style-name="ce30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table:formula="of:=[.J54]-[.J48]" office:value-type="float" office:value="0" calcext:value-type="float">
            <text:p>0</text:p>
          </table:table-cell>
          <table:table-cell table:style-name="ce30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24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Dean</text:p>
          </table:table-cell>
          <table:table-cell table:style-name="ce22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29" table:formula="of:=[.I56]-[.I62]" office:value-type="float" office:value="-2.4" calcext:value-type="float">
            <text:p>-2.4</text:p>
          </table:table-cell>
          <table:table-cell table:style-name="ce22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29" table:formula="of:=[.I57]-[.I63]" office:value-type="float" office:value="-1.3" calcext:value-type="float">
            <text:p>-1.3</text:p>
          </table:table-cell>
          <table:table-cell table:style-name="ce22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29" table:formula="of:=[.I58]-[.I64]" office:value-type="float" office:value="-0.0499999999999998" calcext:value-type="float">
            <text:p>-0.0499999999999998</text:p>
          </table:table-cell>
          <table:table-cell table:style-name="ce22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29" table:formula="of:=[.I59]-[.I65]" office:value-type="float" office:value="-5.25" calcext:value-type="float">
            <text:p>-5.25</text:p>
          </table:table-cell>
          <table:table-cell table:style-name="ce22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29" table:formula="of:=[.I60]-[.I66]" office:value-type="float" office:value="0" calcext:value-type="float">
            <text:p>0</text:p>
          </table:table-cell>
          <table:table-cell table:style-name="ce22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24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22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22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22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24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Faye</text:p>
          </table:table-cell>
          <table:table-cell table:style-name="ce26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22" table:formula="of:=[.I68]-[.I98]" office:value-type="float" office:value="8.4" calcext:value-type="float">
            <text:p>8.4</text:p>
          </table:table-cell>
          <table:table-cell table:style-name="ce29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22" table:formula="of:=[.I69]-[.I99]-1" office:value-type="float" office:value="2.3" calcext:value-type="float">
            <text:p>2.3</text:p>
          </table:table-cell>
          <table:table-cell table:style-name="ce29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22" table:formula="of:=[.I70]-[.I100]" office:value-type="float" office:value="2.9" calcext:value-type="float">
            <text:p>2.9</text:p>
          </table:table-cell>
          <table:table-cell table:style-name="ce29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22" table:formula="of:=[.I71]-[.I101]" office:value-type="float" office:value="-6.6" calcext:value-type="float">
            <text:p>-6.6</text:p>
          </table:table-cell>
          <table:table-cell table:style-name="ce29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22" table:formula="of:=SUM([.K68:.K71])" office:value-type="float" office:value="7" calcext:value-type="float">
            <text:p>7</text:p>
          </table:table-cell>
          <table:table-cell table:style-name="ce29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24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/>
          <table:table-cell table:style-name="ce26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22"/>
          <table:table-cell table:style-name="ce29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22"/>
          <table:table-cell table:style-name="ce29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table:style-name="ce29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22"/>
          <table:table-cell table:style-name="ce29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9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24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Alvina</text:p>
          </table:table-cell>
          <table:table-cell table:style-name="ce22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29" table:formula="of:=[.J80]-[.J92]" office:value-type="float" office:value="-3" calcext:value-type="float">
            <text:p>-3</text:p>
          </table:table-cell>
          <table:table-cell table:style-name="ce29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9" table:formula="of:=[.J81]-[.J93]" office:value-type="float" office:value="-1" calcext:value-type="float">
            <text:p>-1</text:p>
          </table:table-cell>
          <table:table-cell table:style-name="ce29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9" table:formula="of:=[.J82]-[.J94]" office:value-type="float" office:value="-4" calcext:value-type="float">
            <text:p>-4</text:p>
          </table:table-cell>
          <table:table-cell table:style-name="ce29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29" table:formula="of:=[.J83]-[.J95]" office:value-type="float" office:value="-1" calcext:value-type="float">
            <text:p>-1</text:p>
          </table:table-cell>
          <table:table-cell table:style-name="ce29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29" table:formula="of:=[.J84]-[.J96]" office:value-type="float" office:value="-8.3" calcext:value-type="float">
            <text:p>-8.3</text:p>
          </table:table-cell>
          <table:table-cell table:style-name="ce29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24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Larentia</text:p>
          </table:table-cell>
          <table:table-cell table:style-name="ce22" office:value-type="string" calcext:value-type="string">
            <text:p>To Elbert</text:p>
          </table:table-cell>
          <table:table-cell table:style-name="ce26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29" table:formula="of:=[.J86]-[.I80]" office:value-type="float" office:value="3" calcext:value-type="float">
            <text:p>3</text:p>
          </table:table-cell>
          <table:table-cell table:style-name="ce22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29" table:formula="of:=[.J87]-[.I81]" office:value-type="float" office:value="-3" calcext:value-type="float">
            <text:p>-3</text:p>
          </table:table-cell>
          <table:table-cell table:style-name="ce22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29" table:formula="of:=[.J88]-[.I82]" office:value-type="float" office:value="1" calcext:value-type="float">
            <text:p>1</text:p>
          </table:table-cell>
          <table:table-cell table:style-name="ce22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29" table:formula="of:=[.J89]-[.I83]" office:value-type="float" office:value="-1" calcext:value-type="float">
            <text:p>-1</text:p>
          </table:table-cell>
          <table:table-cell table:style-name="ce22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29" table:formula="of:=[.J90]-[.I84]" office:value-type="float" office:value="63.4" calcext:value-type="float">
            <text:p>63.4</text:p>
          </table:table-cell>
          <table:table-cell table:style-name="ce22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24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ruby</text:p>
          </table:table-cell>
          <table:table-cell table:style-name="ce22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29" table:formula="of:=[.J92]-[.J86]" office:value-type="float" office:value="0" calcext:value-type="float">
            <text:p>0</text:p>
          </table:table-cell>
          <table:table-cell table:style-name="ce22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29" table:formula="of:=[.J93]-[.J87]" office:value-type="float" office:value="3" calcext:value-type="float">
            <text:p>3</text:p>
          </table:table-cell>
          <table:table-cell table:style-name="ce22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29" table:formula="of:=[.J94]-[.J88]" office:value-type="float" office:value="3" calcext:value-type="float">
            <text:p>3</text:p>
          </table:table-cell>
          <table:table-cell table:style-name="ce22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29" table:formula="of:=[.J95]-[.J89]" office:value-type="float" office:value="2" calcext:value-type="float">
            <text:p>2</text:p>
          </table:table-cell>
          <table:table-cell table:style-name="ce22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29" table:formula="of:=[.J96]-[.J90]" office:value-type="float" office:value="0.899999999999992" calcext:value-type="float">
            <text:p>0.899999999999992</text:p>
          </table:table-cell>
          <table:table-cell table:style-name="ce22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24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22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22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22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22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table:formula="of:=SUM([.I98:.I101])" office:value-type="float" office:value="62" calcext:value-type="float">
            <text:p>62</text:p>
          </table:table-cell>
          <table:table-cell table:style-name="ce22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24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Faye</text:p>
          </table:table-cell>
          <table:table-cell table:style-name="ce22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22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22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22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22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22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24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Faramir</text:p>
          </table:table-cell>
          <table:table-cell table:style-name="ce22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30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30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30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30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30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24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Faye</text:p>
          </table:table-cell>
          <table:table-cell table:style-name="ce26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30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30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30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30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0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24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ico Stat</text:p>
          </table:table-cell>
          <table:table-cell table:style-name="ce22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0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0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0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2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24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Czene</text:p>
          </table:table-cell>
          <table:table-cell table:style-name="ce26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30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30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30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30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22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24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Alvina</text:p>
          </table:table-cell>
          <table:table-cell table:style-name="ce22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22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22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22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22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[.J138]-[.J96]" office:value-type="float" office:value="-65.3" calcext:value-type="float">
            <text:p>-65.3</text:p>
          </table:table-cell>
          <table:table-cell table:style-name="ce22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24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Alvina</text:p>
          </table:table-cell>
          <table:table-cell table:style-name="ce22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22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22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22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22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22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24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Arthur</text:p>
          </table:table-cell>
          <table:table-cell table:style-name="ce22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22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22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22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22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22" table:formula="of:=SUM([.K146:.K149])" office:value-type="float" office:value="2" calcext:value-type="float">
            <text:p>2</text:p>
          </table:table-cell>
          <table:table-cell table:style-name="ce22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24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Arthur</text:p>
          </table:table-cell>
          <table:table-cell table:style-name="ce22"/>
          <table:table-cell table:style-name="ce26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22" table:formula="of:=[.J152]-[.J140]" office:value-type="float" office:value="-2" calcext:value-type="float">
            <text:p>-2</text:p>
          </table:table-cell>
          <table:table-cell table:style-name="ce22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22" table:formula="of:=[.J153]-[.J141]" office:value-type="float" office:value="-4" calcext:value-type="float">
            <text:p>-4</text:p>
          </table:table-cell>
          <table:table-cell table:style-name="ce22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22" table:formula="of:=[.J154]-[.J142]" office:value-type="float" office:value="-4" calcext:value-type="float">
            <text:p>-4</text:p>
          </table:table-cell>
          <table:table-cell table:style-name="ce22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22" table:formula="of:=[.J155]-[.J143]" office:value-type="float" office:value="2" calcext:value-type="float">
            <text:p>2</text:p>
          </table:table-cell>
          <table:table-cell table:style-name="ce22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22" office:value-type="float" office:value="-8" calcext:value-type="float">
            <text:p>-8</text:p>
          </table:table-cell>
          <table:table-cell table:style-name="ce22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24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Adel</text:p>
          </table:table-cell>
          <table:table-cell table:style-name="ce22" office:value-type="string" calcext:value-type="string">
            <text:p>To Arthur</text:p>
          </table:table-cell>
          <table:table-cell table:style-name="ce26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30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30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30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30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22" office:value-type="float" office:value="-8" calcext:value-type="float">
            <text:p>-8</text:p>
          </table:table-cell>
          <table:table-cell table:style-name="ce22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24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lbert</text:p>
          </table:table-cell>
          <table:table-cell table:style-name="ce26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22" table:formula="of:=[.J164]-[.J146]" office:value-type="float" office:value="-5" calcext:value-type="float">
            <text:p>-5</text:p>
          </table:table-cell>
          <table:table-cell table:style-name="ce30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22" table:formula="of:=[.J165]-[.J147]" office:value-type="float" office:value="-4" calcext:value-type="float">
            <text:p>-4</text:p>
          </table:table-cell>
          <table:table-cell table:style-name="ce30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22" table:formula="of:=[.J166]-[.J148]" office:value-type="float" office:value="1" calcext:value-type="float">
            <text:p>1</text:p>
          </table:table-cell>
          <table:table-cell table:style-name="ce30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22" table:formula="of:=[.J167]-[.J149]" office:value-type="float" office:value="-5" calcext:value-type="float">
            <text:p>-5</text:p>
          </table:table-cell>
          <table:table-cell table:style-name="ce30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22" table:formula="of:=[.J168]-[.J150]" office:value-type="float" office:value="62" calcext:value-type="float">
            <text:p>62</text:p>
          </table:table-cell>
          <table:table-cell table:style-name="ce22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24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office:value-type="string" calcext:value-type="string">
            <text:p>To Daoud</text:p>
          </table:table-cell>
          <table:table-cell table:style-name="ce22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22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22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22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22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22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24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lbert</text:p>
          </table:table-cell>
          <table:table-cell table:style-name="ce22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22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22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22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22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22" table:formula="of:=SUM([.K176:.K179])" office:value-type="float" office:value="5.2" calcext:value-type="float">
            <text:p>5.2</text:p>
          </table:table-cell>
          <table:table-cell table:style-name="ce22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24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22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24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24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24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24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24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24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24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24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22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24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20:54:50.89381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2H29M8S</meta:editing-duration>
    <meta:editing-cycles>175</meta:editing-cycles>
    <meta:generator>LibreOffice/26.2.4.2$Windows_X86_64 LibreOffice_project/0229ac93fcf0d7cbc6376066c6f35021cef002dc</meta:generator>
    <dc:date>2026-07-20T20:56:05.096627700</dc:date>
    <meta:document-statistic meta:table-count="2" meta:cell-count="4328" meta:object-count="0"/>
  </office:meta>
</office:document-meta>
</file>